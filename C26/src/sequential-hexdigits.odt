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OpenSymbol" svg:font-family="OpenSymbol" style:font-charset="x-symbol"/>
  </office:font-face-decls>
  <office:automatic-styles>
    <style:style style:name="P1" style:family="paragraph" style:parent-style-name="Preformatted_20_Text">
      <style:text-properties officeooo:rsid="0008ade3" officeooo:paragraph-rsid="0008ade3"/>
    </style:style>
    <style:style style:name="P2" style:family="paragraph" style:parent-style-name="Text_20_body">
      <style:text-properties officeooo:rsid="00091e6b" officeooo:paragraph-rsid="00091e6b"/>
    </style:style>
    <style:style style:name="P3" style:family="paragraph" style:parent-style-name="Text_20_body">
      <style:text-properties officeooo:rsid="0009a359" officeooo:paragraph-rsid="0009a359"/>
    </style:style>
    <style:style style:name="P4" style:family="paragraph" style:parent-style-name="Quotations">
      <style:text-properties officeooo:paragraph-rsid="00091e6b"/>
    </style:style>
    <style:style style:name="P5" style:family="paragraph" style:parent-style-name="Text_20_body">
      <style:text-properties officeooo:rsid="00090468" officeooo:paragraph-rsid="00090468"/>
    </style:style>
    <style:style style:name="P6" style:family="paragraph" style:parent-style-name="Text_20_body">
      <style:text-properties officeooo:rsid="000aba0d" officeooo:paragraph-rsid="000aba0d"/>
    </style:style>
    <style:style style:name="P7" style:family="paragraph" style:parent-style-name="Heading_20_1">
      <style:paragraph-properties fo:break-before="page"/>
    </style:style>
    <style:style style:name="P8" style:family="paragraph" style:parent-style-name="Heading_20_2">
      <style:text-properties officeooo:rsid="0008ade3" officeooo:paragraph-rsid="0008ade3"/>
    </style:style>
    <style:style style:name="P9" style:family="paragraph" style:parent-style-name="Heading_20_2">
      <style:text-properties officeooo:rsid="00091e6b" officeooo:paragraph-rsid="00091e6b"/>
    </style:style>
    <style:style style:name="P10" style:family="paragraph" style:parent-style-name="Heading_20_2">
      <style:paragraph-properties fo:break-before="page"/>
      <style:text-properties officeooo:rsid="00091e6b" officeooo:paragraph-rsid="00091e6b"/>
    </style:style>
    <style:style style:name="P11" style:family="paragraph" style:parent-style-name="Heading_20_2" style:list-style-name="">
      <style:text-properties officeooo:rsid="00091e6b" officeooo:paragraph-rsid="00091e6b"/>
    </style:style>
    <style:style style:name="P12" style:family="paragraph" style:parent-style-name="Heading_20_2">
      <style:text-properties officeooo:rsid="0009a359" officeooo:paragraph-rsid="0009a359"/>
    </style:style>
    <style:style style:name="P13" style:family="paragraph" style:parent-style-name="Heading_20_3">
      <style:text-properties officeooo:rsid="0008ade3" officeooo:paragraph-rsid="0008ade3"/>
    </style:style>
    <style:style style:name="P14" style:family="paragraph" style:parent-style-name="Text_20_body">
      <style:text-properties style:font-name="Liberation Serif" officeooo:rsid="0008ade3" officeooo:paragraph-rsid="0008ade3"/>
    </style:style>
    <style:style style:name="P15" style:family="paragraph" style:parent-style-name="Text_20_body" style:list-style-name="L1">
      <style:text-properties officeooo:rsid="0008ade3" officeooo:paragraph-rsid="0008ade3"/>
    </style:style>
    <style:style style:name="P16" style:family="paragraph" style:parent-style-name="Text_20_body">
      <style:text-properties fo:font-style="normal" officeooo:rsid="00091e6b" officeooo:paragraph-rsid="00091e6b" style:font-style-asian="normal" style:font-style-complex="normal"/>
    </style:style>
    <style:style style:name="P17" style:family="paragraph" style:parent-style-name="Text_20_body">
      <style:text-properties officeooo:rsid="00091e6b" officeooo:paragraph-rsid="00091e6b"/>
    </style:style>
    <style:style style:name="T1" style:family="text">
      <style:text-properties style:font-name="Liberation Serif"/>
    </style:style>
    <style:style style:name="T2" style:family="text">
      <style:text-properties style:font-name="Liberation Serif" officeooo:rsid="00091e6b"/>
    </style:style>
    <style:style style:name="T3" style:family="text">
      <style:text-properties style:font-name="Liberation Mono"/>
    </style:style>
    <style:style style:name="T4" style:family="text">
      <style:text-properties style:font-name="Liberation Mono" officeooo:rsid="00091e6b"/>
    </style:style>
    <style:style style:name="T5" style:family="text">
      <style:text-properties style:font-name="Liberation Mono" fo:font-style="normal" style:font-style-asian="normal" style:font-style-complex="normal"/>
    </style:style>
    <style:style style:name="T6" style:family="text">
      <style:text-properties officeooo:rsid="00091e6b"/>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9a359" style:font-style-asian="normal" style:font-style-complex="normal"/>
    </style:style>
    <style:style style:name="T10" style:family="text">
      <style:text-properties fo:font-style="normal" officeooo:rsid="000aba0d"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0bf05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for C2y</text:p>
      <text:p text:style-name="P1">WG14 <text:span text:style-name="T12">3192</text:span></text:p>
      <text:p text:style-name="P1"/>
      <text:p text:style-name="P1">Title: <text:s text:c="14"/>Sequential Hexdigits</text:p>
      <text:p text:style-name="P1">Author, affiliation: Alex Celeste, Perforce</text:p>
      <text:p text:style-name="P1">Date: <text:s text:c="15"/>2023-11-30</text:p>
      <text:p text:style-name="P1">Proposal category: <text:s text:c="2"/>Clarification/enhancement</text:p>
      <text:p text:style-name="P1">Target audience: <text:s text:c="4"/>Users</text:p>
      <text:p text:style-name="Standard"/>
      <text:h text:style-name="Heading_20_2" text:outline-level="2">Abstract</text:h>
      <text:p text:style-name="P14">We propose to enhance the guarantees made by the Standard about the values of character constants so that the promises allowing arithmetic for decimal digits are consistently made available for hexadecimal digits as well.</text:p>
      <text:p text:style-name="P14">The <text:s/>proposed change does not appear to have any impact on real implementations and simply makes a guarantee to users about something which was already true.</text:p>
      <text:h text:style-name="P7" text:outline-level="1">Sequential Hexdigits</text:h>
      <text:p text:style-name="P1">Reply-to: <text:s text:c="4"/>Alex Celeste (<text:a xlink:type="simple" xlink:href="mailto:aceleste@perforce.com" text:style-name="Internet_20_link" text:visited-style-name="Visited_20_Internet_20_Link">aceleste@perforce.com</text:a>)</text:p>
      <text:p text:style-name="P1">Document No: <text:s/>N<text:span text:style-name="T12">3192</text:span></text:p>
      <text:p text:style-name="P1">Revises: <text:s text:c="5"/>(n/a)</text:p>
      <text:p text:style-name="P1">Date: <text:s text:c="8"/>2023-11-30</text:p>
      <text:p text:style-name="P1"/>
      <text:h text:style-name="P8" text:outline-level="2">Summary of Changes</text:h>
      <text:h text:style-name="P13" text:outline-level="3">N<text:span text:style-name="T12">3192</text:span></text:h>
      <text:list text:style-name="L1">
        <text:list-item>
          <text:p text:style-name="P15">original proposal</text:p>
        </text:list-item>
      </text:list>
      <text:h text:style-name="P8" text:outline-level="2">Introduction</text:h>
      <text:p text:style-name="P5">In section 5.2.1 “Character sets”, the Standard says that:</text:p>
      <text:p text:style-name="Quotations">In both the source and execution basic character sets, the value of each character after <text:span text:style-name="T3">0</text:span> in the above list of decimal digits shall be one greater than the value of the previous.</text:p>
      <text:p text:style-name="P5">No other prescription is made for the specific values of any characters.</text:p>
      <text:p text:style-name="P5">This is handy, because it very conveniently allows conversion from text to integer value by doing arithmetic against a read character value and <text:span text:style-name="T3">'0'</text:span> or <text:span text:style-name="T3">'9'</text:span>, such as the check <text:span text:style-name="T3">(x &gt;= '0' &amp;&amp; x &lt;= '9')</text:span><text:span text:style-name="T1"> to serve as an “is decimal digit” test, and subsequently </text:span><text:span text:style-name="T3">val = x – '0';</text:span><text:span text:style-name="T1"> to get the value of the character as a decimal digit.</text:span></text:p>
      <text:p text:style-name="P5">However, because no guarantee is made for any other characters, the equivalent code for the hexadecimal digits A through F is technically non-portable (<text:span text:style-name="T3">((x &gt;= 'a' &amp;&amp; x &lt;= 'f') || (x &gt;= 'A' &amp;&amp; x &lt;= 'F'))</text:span>, <text:span text:style-name="T3">x – 'a'</text:span>, <text:span text:style-name="T3">x – 'A'</text:span>). <text:span text:style-name="T6">This makes extending decimal-handling code (which implicitly covers base-2 and base-8 because the digit ranges are included) to also cover hexadecimal, onerous to do in a strictly conforming way.</text:span></text:p>
      <text:h text:style-name="P9" text:outline-level="2">Proposal</text:h>
      <text:p text:style-name="P2">We propose that two new clauses are added to the end of the existing sentence in 5.2.1 paragraph 3:</text:p>
      <text:p text:style-name="P4">…; the value of each character after <text:span text:style-name="T4">a</text:span><text:span text:style-name="T2">, up to and including </text:span><text:span text:style-name="T4">f</text:span><text:span text:style-name="T2">,</text:span><text:span text:style-name="T1"> </text:span>in the above <text:span text:style-name="T6">list of lowercase letters </text:span>shall be one greater than the value of the previous; <text:span text:style-name="T6">and the value of each character after </text:span><text:span text:style-name="T4">A</text:span><text:span text:style-name="T6">, up to and including </text:span><text:span text:style-name="T4">F</text:span><text:span text:style-name="T6">, in the above list of uppercase letters, shall be one greater than the value of the previous</text:span>.</text:p>
      <text:p text:style-name="P2">A paragraph break for readability may be appropriate. Less repetition to unambiguously say the same thing may be appropriate.</text:p>
      <text:h text:style-name="P11" text:outline-level="2"/>
      <text:h text:style-name="P10" text:outline-level="2">Impact</text:h>
      <text:p text:style-name="P2">As far as we can tell, all character sets in common use already support this guarantee.</text:p>
      <text:p text:style-name="P2">The vast majority of character sets in use anywhere are derived by varying degrees from ASCII, which places all 26 Roman lowercase and uppercase characters in two contiguous blocks anyway, so not only does the A-to-F assumption hold, but on the majority of systems A-to-Z is valid as well.</text:p>
      <text:p text:style-name="P2">The remaining minority of character sets in use all appear to be variations of EBCDIC, which has gaps in the alphabetic blocks and therefore does not support the A-to-Z assumption, <text:span text:style-name="T7">but</text:span><text:span text:style-name="T8"> does guarantee contiguity of eight-character blocks, so the EBCDIC invariant subset </text:span><text:a xlink:type="simple" xlink:href="https://en.wikipedia.org/wiki/EBCDIC#Code_page_layout" text:style-name="Internet_20_link" text:visited-style-name="Visited_20_Internet_20_Link"><text:span text:style-name="T10">[1]</text:span></text:a><text:span text:style-name="T8"> still guarantees that the Roman characters A-to-H are contiguous and therefore that the hexadecimal assumption holds.</text:span></text:p>
      <text:p text:style-name="P2"><text:span text:style-name="T8">Therefore, we do not expect any implementation should actually need to change, and this is a backwards compatible enhancement to the text </text:span><text:span text:style-name="T9">that retroactively makes existing </text:span><text:span text:style-name="T10">user</text:span><text:span text:style-name="T9"> code more portable.</text:span></text:p>
      <text:p text:style-name="P6"><text:span text:style-name="T9">L</text:span><text:span text:style-name="T8">ibrary code is unlikely to be affected as the Standard library ctype.h is more likely to be implemented using other techniques (i.e. lookup) </text:span><text:a xlink:type="simple" xlink:href="https://github.com/bminor/glibc/blob/master/ctype/ctype.h" text:style-name="Internet_20_link" text:visited-style-name="Visited_20_Internet_20_Link"><text:span text:style-name="T8">[2]</text:span></text:a><text:span text:style-name="T8">. However, simpler libraries demonstrate the assumption case </text:span><text:a xlink:type="simple" xlink:href="https://github.com/Barracuda72/libc/blob/master/ctype/isxdigit.c" text:style-name="Internet_20_link" text:visited-style-name="Visited_20_Internet_20_Link"><text:span text:style-name="T8">[3]</text:span></text:a><text:span text:style-name="T8">, and even complex implementations treat the assumption sa valid without necessarily relying on it </text:span><text:a xlink:type="simple" xlink:href="https://github.com/llvm/llvm-project/blob/ba523106579fd26d52e16c1a6f4eeb839d84351f/clang/test/Analysis/std-c-library-functions.c#L222" text:style-name="Internet_20_link" text:visited-style-name="Visited_20_Internet_20_Link"><text:span text:style-name="T8">[4]</text:span></text:a><text:span text:style-name="T8">.</text:span></text:p>
      <text:p text:style-name="P16">This proposal should therefore also go on the “Papers of Interest” list for implementers wishing to support previous editions of the C Standard, as the assumption is likely to be back-portable.</text:p>
      <text:p text:style-name="P3"><text:span text:style-name="T8">This proposal does </text:span><text:span text:style-name="T11">not</text:span><text:span text:style-name="T8"> affect the definition of a “hexadecimal digit”, which may include other characters depending on the locale (the C++ </text:span><text:span text:style-name="T5">std::isxdigit</text:span><text:span text:style-name="T8"> is capable of distinguishing these, while C’s </text:span><text:span text:style-name="T5">isxdigit</text:span><text:span text:style-name="T8"> is not). This proposal only touches characters that the Standard already requires to be available and to have some value.</text:span></text:p>
      <text:p text:style-name="P2"/>
      <text:h text:style-name="P12" text:outline-level="2">References</text:h>
      <text:p text:style-name="P3"><text:a xlink:type="simple" xlink:href="https://www.open-std.org/jtc1/sc22/wg14/www/docs/n3096.pdf" text:style-name="Internet_20_link" text:visited-style-name="Visited_20_Internet_20_Link">C23 public draft n3096</text:a></text:p>
      <text:p text:style-name="P3"><text:a xlink:type="simple" xlink:href="https://en.wikipedia.org/wiki/EBCDIC#Code_page_layout" text:style-name="Internet_20_link" text:visited-style-name="Visited_20_Internet_20_Link">EBCDIC Wikipedia</text:a></text:p>
      <text:p text:style-name="P6"><text:a xlink:type="simple" xlink:href="https://github.com/bminor/glibc/blob/master/ctype/ctype.h" text:style-name="Internet_20_link" text:visited-style-name="Visited_20_Internet_20_Link">glibc ctype.h</text:a></text:p>
      <text:p text:style-name="P6"><text:a xlink:type="simple" xlink:href="https://github.com/Barracuda72/libc/blob/master/ctype/isxdigit.c" text:style-name="Internet_20_link" text:visited-style-name="Visited_20_Internet_20_Link">Barracude72 isxdigit</text:a></text:p>
      <text:p text:style-name="P6"><text:a xlink:type="simple" xlink:href="https://github.com/llvm/llvm-project/blob/ba523106579fd26d52e16c1a6f4eeb839d84351f/clang/test/Analysis/std-c-library-functions.c#L222" text:style-name="Internet_20_link" text:visited-style-name="Visited_20_Internet_20_Link">Clang test for A-to-F</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Bold" style:font-family-generic="roman"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style:font-style-name="Bold" style:font-family-generic="roman" style:font-pitch="variable" fo:font-size="24pt" fo:font-weight="bold" style:font-size-asian="18pt" style:font-weight-asian="bold" style:font-size-complex="18pt" style:font-weight-complex="bold"/>
    </style:style>
    <style:style style:name="Appendix" style:family="paragraph" style:parent-style-name="Heading" style:next-style-name="Text_20_body" style:class="chapter">
      <style:paragraph-properties fo:text-align="center" style:justify-single-word="false"/>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Bold" style:font-family-generic="roman" style:font-pitch="variable" fo:font-size="18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2" fo:font-family="'Liberation Serif'"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style-name="Bold" style:font-family-generic="roman" style:font-pitch="variable"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4:22:38.832852920</meta:creation-date>
    <dc:date>2023-12-14T00:58:14.477053233</dc:date>
    <meta:editing-duration>PT7M18S</meta:editing-duration>
    <meta:editing-cycles>2</meta:editing-cycles>
    <meta:generator>LibreOffice/7.4.7.2$Linux_X86_64 LibreOffice_project/40$Build-2</meta:generator>
    <meta:document-statistic meta:table-count="0" meta:image-count="0" meta:object-count="0" meta:page-count="3" meta:paragraph-count="42" meta:word-count="688" meta:character-count="4279" meta:non-whitespace-character-count="3577"/>
  </office:meta>
</office:document-meta>
</file>
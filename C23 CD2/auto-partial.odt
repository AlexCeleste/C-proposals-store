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text-properties officeooo:paragraph-rsid="0010cc93"/>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officeooo:rsid="0010cc93" officeooo:paragraph-rsid="0010cc93"/>
    </style:style>
    <style:style style:name="P4" style:family="paragraph" style:parent-style-name="Heading_20_2">
      <style:paragraph-properties fo:break-before="page"/>
      <style:text-properties officeooo:rsid="00268368" officeooo:paragraph-rsid="00268368"/>
    </style:style>
    <style:style style:name="P5" style:family="paragraph" style:parent-style-name="Heading_20_2">
      <style:text-properties officeooo:paragraph-rsid="000dba44"/>
    </style:style>
    <style:style style:name="P6" style:family="paragraph" style:parent-style-name="Heading_20_2">
      <style:text-properties officeooo:rsid="0010cc93" officeooo:paragraph-rsid="0010cc93"/>
    </style:style>
    <style:style style:name="P7" style:family="paragraph" style:parent-style-name="Heading_20_2">
      <style:text-properties style:font-name="Liberation Serif" fo:font-size="18pt" fo:font-weight="bold" officeooo:rsid="0010cc93" officeooo:paragraph-rsid="0010cc93" style:font-name-asian="DejaVu Sans" style:font-size-asian="18pt" style:font-weight-asian="bold" style:font-name-complex="DejaVu Sans" style:font-size-complex="18pt" style:font-weight-complex="bold"/>
    </style:style>
    <style:style style:name="P8" style:family="paragraph" style:parent-style-name="Heading_20_2">
      <style:text-properties officeooo:rsid="002844d5" officeooo:paragraph-rsid="002844d5"/>
    </style:style>
    <style:style style:name="P9" style:family="paragraph" style:parent-style-name="Heading_20_2">
      <style:text-properties officeooo:rsid="003bc2fc" officeooo:paragraph-rsid="003bc2fc"/>
    </style:style>
    <style:style style:name="P10" style:family="paragraph" style:parent-style-name="Heading_20_3">
      <style:text-properties officeooo:paragraph-rsid="0010cc93"/>
    </style:style>
    <style:style style:name="P11" style:family="paragraph" style:parent-style-name="Heading_20_3">
      <style:text-properties officeooo:rsid="00138e16" officeooo:paragraph-rsid="00138e16"/>
    </style:style>
    <style:style style:name="P12" style:family="paragraph" style:parent-style-name="Heading_20_3">
      <style:text-properties officeooo:rsid="00268368" officeooo:paragraph-rsid="00268368"/>
    </style:style>
    <style:style style:name="P13" style:family="paragraph" style:parent-style-name="Heading_20_3">
      <style:text-properties officeooo:rsid="0026c6de" officeooo:paragraph-rsid="0026c6de"/>
    </style:style>
    <style:style style:name="P14" style:family="paragraph" style:parent-style-name="Preformatted_20_Text">
      <style:text-properties officeooo:paragraph-rsid="000dba44"/>
    </style:style>
    <style:style style:name="P15" style:family="paragraph" style:parent-style-name="Preformatted_20_Text">
      <style:text-properties officeooo:paragraph-rsid="0010cc93"/>
    </style:style>
    <style:style style:name="P16" style:family="paragraph" style:parent-style-name="Preformatted_20_Text">
      <style:paragraph-properties fo:margin-top="0cm" fo:margin-bottom="0.499cm" style:contextual-spacing="false"/>
      <style:text-properties officeooo:paragraph-rsid="000dba44"/>
    </style:style>
    <style:style style:name="P17" style:family="paragraph" style:parent-style-name="Preformatted_20_Text">
      <style:paragraph-properties fo:margin-top="0cm" fo:margin-bottom="0.499cm" style:contextual-spacing="false"/>
      <style:text-properties officeooo:paragraph-rsid="0010cc93"/>
    </style:style>
    <style:style style:name="P18" style:family="paragraph" style:parent-style-name="Quotations">
      <style:text-properties fo:font-weight="bold" officeooo:rsid="001a0414" officeooo:paragraph-rsid="001a0414" style:font-weight-asian="bold" style:font-weight-complex="bold"/>
    </style:style>
    <style:style style:name="P19" style:family="paragraph" style:parent-style-name="Quotations">
      <style:text-properties fo:font-weight="bold" officeooo:rsid="001a0414" officeooo:paragraph-rsid="0032adf7" style:font-weight-asian="bold" style:font-weight-complex="bold"/>
    </style:style>
    <style:style style:name="P20" style:family="paragraph" style:parent-style-name="Quotations">
      <style:text-properties fo:font-weight="bold" officeooo:rsid="001b2df2" officeooo:paragraph-rsid="001b2df2" style:font-weight-asian="bold" style:font-weight-complex="bold"/>
    </style:style>
    <style:style style:name="P21" style:family="paragraph" style:parent-style-name="Quotations">
      <style:text-properties fo:font-weight="bold" officeooo:rsid="001b2df2" officeooo:paragraph-rsid="004131b6" style:font-weight-asian="bold" style:font-weight-complex="bold"/>
    </style:style>
    <style:style style:name="P22" style:family="paragraph" style:parent-style-name="Quotations">
      <style:text-properties fo:font-weight="bold" officeooo:rsid="001db7ed" officeooo:paragraph-rsid="001db7ed" style:font-weight-asian="bold" style:font-weight-complex="bold"/>
    </style:style>
    <style:style style:name="P23" style:family="paragraph" style:parent-style-name="Quotations">
      <style:text-properties fo:font-weight="bold" officeooo:rsid="001db7ed" officeooo:paragraph-rsid="004363e1" style:font-weight-asian="bold" style:font-weight-complex="bold"/>
    </style:style>
    <style:style style:name="P24" style:family="paragraph" style:parent-style-name="Quotations">
      <style:text-properties fo:font-weight="bold" officeooo:rsid="001c25c5" officeooo:paragraph-rsid="0041cc79" style:font-weight-asian="bold" style:font-weight-complex="bold"/>
    </style:style>
    <style:style style:name="P25" style:family="paragraph" style:parent-style-name="Quotations">
      <style:text-properties fo:font-weight="bold" officeooo:rsid="004131b6" officeooo:paragraph-rsid="004131b6" style:font-weight-asian="bold" style:font-weight-complex="bold"/>
    </style:style>
    <style:style style:name="P26" style:family="paragraph" style:parent-style-name="Quotations">
      <style:text-properties officeooo:rsid="0013f780" officeooo:paragraph-rsid="0013f780"/>
    </style:style>
    <style:style style:name="P27" style:family="paragraph" style:parent-style-name="Quotations">
      <style:text-properties officeooo:rsid="00191f51" officeooo:paragraph-rsid="00191f51"/>
    </style:style>
    <style:style style:name="P28" style:family="paragraph" style:parent-style-name="Quotations">
      <style:text-properties fo:font-weight="normal" officeooo:rsid="001c25c5" officeooo:paragraph-rsid="001c25c5" style:font-weight-asian="normal" style:font-weight-complex="normal"/>
    </style:style>
    <style:style style:name="P29" style:family="paragraph" style:parent-style-name="Quotations">
      <style:text-properties fo:font-weight="normal" officeooo:rsid="0032adf7" officeooo:paragraph-rsid="0041cc79" style:font-weight-asian="normal" style:font-weight-complex="normal"/>
    </style:style>
    <style:style style:name="P30" style:family="paragraph" style:parent-style-name="Quotations">
      <style:text-properties fo:font-weight="normal" officeooo:rsid="001b2df2" officeooo:paragraph-rsid="001b2df2" style:font-weight-asian="normal" style:font-weight-complex="normal"/>
    </style:style>
    <style:style style:name="P31" style:family="paragraph" style:parent-style-name="Quotations">
      <style:text-properties fo:font-weight="normal" officeooo:rsid="001b2df2" officeooo:paragraph-rsid="004131b6" style:font-weight-asian="normal" style:font-weight-complex="normal"/>
    </style:style>
    <style:style style:name="P32" style:family="paragraph" style:parent-style-name="Quotations">
      <style:text-properties fo:font-weight="normal" officeooo:rsid="004131b6" officeooo:paragraph-rsid="004131b6" style:font-weight-asian="normal" style:font-weight-complex="normal"/>
    </style:style>
    <style:style style:name="P33" style:family="paragraph" style:parent-style-name="Quotations">
      <style:text-properties fo:font-weight="normal" officeooo:rsid="001db7ed" officeooo:paragraph-rsid="004363e1" style:font-weight-asian="normal" style:font-weight-complex="normal"/>
    </style:style>
    <style:style style:name="P34" style:family="paragraph" style:parent-style-name="Quotations">
      <style:text-properties officeooo:paragraph-rsid="001b2df2"/>
    </style:style>
    <style:style style:name="P35" style:family="paragraph" style:parent-style-name="Quotations">
      <style:text-properties officeooo:rsid="001fad4a" officeooo:paragraph-rsid="001fad4a"/>
    </style:style>
    <style:style style:name="P36" style:family="paragraph" style:parent-style-name="Quotations">
      <style:text-properties fo:font-style="normal" officeooo:rsid="0019c0c4" officeooo:paragraph-rsid="0019c0c4" style:font-style-asian="normal" style:font-style-complex="normal"/>
    </style:style>
    <style:style style:name="P37" style:family="paragraph" style:parent-style-name="Quotations">
      <style:paragraph-properties fo:margin-top="0cm" fo:margin-bottom="0cm" style:contextual-spacing="false"/>
      <style:text-properties fo:font-style="italic" officeooo:rsid="0059f598" officeooo:paragraph-rsid="00138e16" style:font-style-asian="italic" style:font-style-complex="italic"/>
    </style:style>
    <style:style style:name="P38" style:family="paragraph" style:parent-style-name="Quotations">
      <style:paragraph-properties fo:margin-top="0cm" fo:margin-bottom="0cm" style:contextual-spacing="false"/>
      <style:text-properties fo:font-style="italic" officeooo:paragraph-rsid="00138e16" style:font-style-asian="italic" style:font-style-complex="italic"/>
    </style:style>
    <style:style style:name="P39" style:family="paragraph" style:parent-style-name="Quotations">
      <style:paragraph-properties fo:margin-top="0cm" fo:margin-bottom="0cm" style:contextual-spacing="false"/>
      <style:text-properties fo:font-style="italic" officeooo:rsid="00138e16" officeooo:paragraph-rsid="00138e16" style:font-style-asian="italic" style:font-style-complex="italic"/>
    </style:style>
    <style:style style:name="P40" style:family="paragraph" style:parent-style-name="Quotations">
      <style:paragraph-properties fo:margin-top="0cm" fo:margin-bottom="0cm" style:contextual-spacing="false"/>
      <style:text-properties fo:font-style="normal" officeooo:rsid="00138e16" officeooo:paragraph-rsid="00138e16" style:font-style-asian="normal" style:font-style-complex="normal"/>
    </style:style>
    <style:style style:name="P41" style:family="paragraph" style:parent-style-name="Quotations">
      <style:paragraph-properties fo:margin-top="0cm" fo:margin-bottom="0cm" style:contextual-spacing="false"/>
      <style:text-properties fo:font-style="normal" fo:font-weight="bold" officeooo:rsid="0059f598" officeooo:paragraph-rsid="00138e16" style:font-style-asian="normal" style:font-weight-asian="bold" style:font-style-complex="normal" style:font-weight-complex="bold"/>
    </style:style>
    <style:style style:name="P42" style:family="paragraph" style:parent-style-name="Quotations">
      <style:paragraph-properties fo:margin-top="0cm" fo:margin-bottom="0cm" style:contextual-spacing="false"/>
      <style:text-properties officeooo:paragraph-rsid="00138e16"/>
    </style:style>
    <style:style style:name="P43" style:family="paragraph" style:parent-style-name="Quotations">
      <style:paragraph-properties fo:margin-top="0cm" fo:margin-bottom="0cm" style:contextual-spacing="false"/>
      <style:text-properties fo:font-weight="bold" officeooo:rsid="00164b33" officeooo:paragraph-rsid="00164b33" style:font-weight-asian="bold" style:font-weight-complex="bold"/>
    </style:style>
    <style:style style:name="P44" style:family="paragraph" style:parent-style-name="Quotations">
      <style:paragraph-properties fo:margin-top="0cm" fo:margin-bottom="0cm" style:contextual-spacing="false"/>
      <style:text-properties fo:font-weight="bold" officeooo:rsid="001a0414" officeooo:paragraph-rsid="001a0414" style:font-weight-asian="bold" style:font-weight-complex="bold"/>
    </style:style>
    <style:style style:name="P45" style:family="paragraph" style:parent-style-name="Quotations">
      <style:paragraph-properties fo:margin-top="0cm" fo:margin-bottom="0cm" style:contextual-spacing="false"/>
      <style:text-properties style:font-name="Liberation Mono" officeooo:rsid="001fad4a" officeooo:paragraph-rsid="001fad4a"/>
    </style:style>
    <style:style style:name="P46" style:family="paragraph" style:parent-style-name="Quotations">
      <style:paragraph-properties fo:margin-top="0cm" fo:margin-bottom="0cm" style:contextual-spacing="false"/>
      <style:text-properties style:font-name="Liberation Mono" officeooo:rsid="001fad4a" officeooo:paragraph-rsid="0034fbe7"/>
    </style:style>
    <style:style style:name="P47" style:family="paragraph" style:parent-style-name="Quotations">
      <style:paragraph-properties fo:margin-top="0cm" fo:margin-bottom="0cm" style:contextual-spacing="false"/>
      <style:text-properties style:font-name="Liberation Mono" officeooo:rsid="00216984" officeooo:paragraph-rsid="00216984"/>
    </style:style>
    <style:style style:name="P48" style:family="paragraph" style:parent-style-name="Quotations">
      <style:paragraph-properties fo:margin-top="0cm" fo:margin-bottom="0cm" style:contextual-spacing="false"/>
      <style:text-properties style:font-name="Liberation Mono" officeooo:rsid="00216984" officeooo:paragraph-rsid="0034fbe7"/>
    </style:style>
    <style:style style:name="P49" style:family="paragraph" style:parent-style-name="Quotations">
      <style:paragraph-properties fo:margin-top="0cm" fo:margin-bottom="0cm" style:contextual-spacing="false"/>
      <style:text-properties style:font-name="Liberation Mono" officeooo:rsid="0026c6de" officeooo:paragraph-rsid="0026c6de"/>
    </style:style>
    <style:style style:name="P50" style:family="paragraph" style:parent-style-name="Quotations">
      <style:paragraph-properties fo:margin-top="0cm" fo:margin-bottom="0cm" style:contextual-spacing="false"/>
      <style:text-properties style:font-name="Liberation Mono" fo:font-style="normal" fo:font-weight="bold" officeooo:rsid="0059f598" officeooo:paragraph-rsid="00138e16" style:font-style-asian="normal" style:font-weight-asian="bold" style:font-style-complex="normal" style:font-weight-complex="bold"/>
    </style:style>
    <style:style style:name="P51" style:family="paragraph" style:parent-style-name="Quotations">
      <style:paragraph-properties fo:margin-top="0cm" fo:margin-bottom="0cm" style:contextual-spacing="false"/>
      <style:text-properties style:font-name="Liberation Mono" officeooo:rsid="0044fe10" officeooo:paragraph-rsid="0044fe10"/>
    </style:style>
    <style:style style:name="P52" style:family="paragraph" style:parent-style-name="Quotations">
      <style:paragraph-properties fo:margin-top="0cm" fo:margin-bottom="0cm" style:contextual-spacing="false"/>
      <style:text-properties style:font-name="Liberation Mono" officeooo:rsid="0044fe10" officeooo:paragraph-rsid="0045bda0"/>
    </style:style>
    <style:style style:name="P53" style:family="paragraph" style:parent-style-name="Quotations">
      <style:paragraph-properties fo:margin-top="0cm" fo:margin-bottom="0cm" style:contextual-spacing="false"/>
      <style:text-properties style:font-name="Liberation Serif" officeooo:rsid="001fad4a" officeooo:paragraph-rsid="001fad4a"/>
    </style:style>
    <style:style style:name="P54" style:family="paragraph" style:parent-style-name="Quotations">
      <style:paragraph-properties fo:margin-top="0cm" fo:margin-bottom="0cm" style:contextual-spacing="false"/>
      <style:text-properties style:font-name="Liberation Serif" officeooo:rsid="00216984" officeooo:paragraph-rsid="00216984"/>
    </style:style>
    <style:style style:name="P55" style:family="paragraph" style:parent-style-name="Quotations">
      <style:paragraph-properties fo:margin-top="0cm" fo:margin-bottom="0cm" style:contextual-spacing="false"/>
      <style:text-properties style:font-name="Liberation Serif" officeooo:rsid="00216984" officeooo:paragraph-rsid="0034fbe7"/>
    </style:style>
    <style:style style:name="P56" style:family="paragraph" style:parent-style-name="Quotations">
      <style:paragraph-properties fo:margin-top="0cm" fo:margin-bottom="0cm" style:contextual-spacing="false"/>
      <style:text-properties style:font-name="Liberation Serif" fo:font-style="normal" fo:font-weight="normal" officeooo:rsid="0059f598" officeooo:paragraph-rsid="00138e16" style:font-style-asian="normal" style:font-weight-asian="normal" style:font-style-complex="normal" style:font-weight-complex="normal"/>
    </style:style>
    <style:style style:name="P57" style:family="paragraph" style:parent-style-name="Quotations">
      <style:paragraph-properties fo:margin-top="0cm" fo:margin-bottom="0cm" style:contextual-spacing="false"/>
      <style:text-properties style:font-name="Liberation Serif" officeooo:rsid="0044fe10" officeooo:paragraph-rsid="0044fe10"/>
    </style:style>
    <style:style style:name="P58" style:family="paragraph" style:parent-style-name="Quotations">
      <style:paragraph-properties fo:margin-top="0cm" fo:margin-bottom="0cm" style:contextual-spacing="false"/>
      <style:text-properties fo:font-weight="normal" officeooo:rsid="00164b33" officeooo:paragraph-rsid="00164b33" style:font-weight-asian="normal" style:font-weight-complex="normal"/>
    </style:style>
    <style:style style:name="P59" style:family="paragraph" style:parent-style-name="Text_20_body">
      <style:text-properties officeooo:rsid="000e1b6f" officeooo:paragraph-rsid="000e1b6f"/>
    </style:style>
    <style:style style:name="P60" style:family="paragraph" style:parent-style-name="Text_20_body">
      <style:text-properties officeooo:rsid="0010cc93" officeooo:paragraph-rsid="0010cc93"/>
    </style:style>
    <style:style style:name="P61" style:family="paragraph" style:parent-style-name="Text_20_body">
      <style:text-properties officeooo:rsid="00119a2d" officeooo:paragraph-rsid="00119a2d"/>
    </style:style>
    <style:style style:name="P62" style:family="paragraph" style:parent-style-name="Text_20_body">
      <style:text-properties officeooo:rsid="0011aca4" officeooo:paragraph-rsid="0011aca4"/>
    </style:style>
    <style:style style:name="P63" style:family="paragraph" style:parent-style-name="Text_20_body">
      <style:text-properties officeooo:rsid="00138e16" officeooo:paragraph-rsid="00138e16"/>
    </style:style>
    <style:style style:name="P64" style:family="paragraph" style:parent-style-name="Text_20_body">
      <style:text-properties officeooo:rsid="005e17cc" officeooo:paragraph-rsid="00138e16"/>
    </style:style>
    <style:style style:name="P65" style:family="paragraph" style:parent-style-name="Text_20_body">
      <style:text-properties officeooo:rsid="0013f780" officeooo:paragraph-rsid="0013f780"/>
    </style:style>
    <style:style style:name="P66" style:family="paragraph" style:parent-style-name="Text_20_body">
      <style:text-properties officeooo:rsid="001545a0" officeooo:paragraph-rsid="001545a0"/>
    </style:style>
    <style:style style:name="P67" style:family="paragraph" style:parent-style-name="Text_20_body">
      <style:text-properties officeooo:rsid="00159239" officeooo:paragraph-rsid="00159239"/>
    </style:style>
    <style:style style:name="P68" style:family="paragraph" style:parent-style-name="Text_20_body">
      <style:text-properties officeooo:rsid="00164b33" officeooo:paragraph-rsid="00164b33"/>
    </style:style>
    <style:style style:name="P69" style:family="paragraph" style:parent-style-name="Text_20_body">
      <style:text-properties officeooo:rsid="00188cdc" officeooo:paragraph-rsid="00188cdc"/>
    </style:style>
    <style:style style:name="P70" style:family="paragraph" style:parent-style-name="Text_20_body">
      <style:text-properties officeooo:rsid="0018aabb" officeooo:paragraph-rsid="0018aabb"/>
    </style:style>
    <style:style style:name="P71" style:family="paragraph" style:parent-style-name="Text_20_body">
      <style:text-properties officeooo:rsid="00191f51" officeooo:paragraph-rsid="00191f51"/>
    </style:style>
    <style:style style:name="P72" style:family="paragraph" style:parent-style-name="Text_20_body">
      <style:text-properties officeooo:rsid="0019c0c4" officeooo:paragraph-rsid="0019c0c4"/>
    </style:style>
    <style:style style:name="P73" style:family="paragraph" style:parent-style-name="Text_20_body">
      <style:text-properties officeooo:rsid="001b2df2" officeooo:paragraph-rsid="001b2df2"/>
    </style:style>
    <style:style style:name="P74" style:family="paragraph" style:parent-style-name="Text_20_body">
      <style:text-properties officeooo:rsid="001c25c5" officeooo:paragraph-rsid="001c25c5"/>
    </style:style>
    <style:style style:name="P75" style:family="paragraph" style:parent-style-name="Text_20_body">
      <style:text-properties officeooo:rsid="001db7ed" officeooo:paragraph-rsid="001db7ed"/>
    </style:style>
    <style:style style:name="P76" style:family="paragraph" style:parent-style-name="Text_20_body">
      <style:text-properties officeooo:rsid="001fad4a" officeooo:paragraph-rsid="001fad4a"/>
    </style:style>
    <style:style style:name="P77" style:family="paragraph" style:parent-style-name="Text_20_body">
      <style:text-properties officeooo:rsid="00236021" officeooo:paragraph-rsid="00236021"/>
    </style:style>
    <style:style style:name="P78" style:family="paragraph" style:parent-style-name="Text_20_body">
      <style:text-properties officeooo:rsid="00268368" officeooo:paragraph-rsid="00268368"/>
    </style:style>
    <style:style style:name="P79" style:family="paragraph" style:parent-style-name="Text_20_body">
      <style:text-properties officeooo:rsid="0026c6de" officeooo:paragraph-rsid="0026c6de"/>
    </style:style>
    <style:style style:name="P80" style:family="paragraph" style:parent-style-name="Text_20_body">
      <style:text-properties style:font-name="Liberation Serif" officeooo:rsid="000fd6a5" officeooo:paragraph-rsid="000fd6a5"/>
    </style:style>
    <style:style style:name="P81" style:family="paragraph" style:parent-style-name="Text_20_body">
      <style:text-properties style:font-name="Liberation Serif" officeooo:rsid="000fd6a5" officeooo:paragraph-rsid="0010cc93"/>
    </style:style>
    <style:style style:name="P82" style:family="paragraph" style:parent-style-name="Text_20_body">
      <style:text-properties style:font-name="Liberation Serif" officeooo:rsid="001545a0" officeooo:paragraph-rsid="001545a0"/>
    </style:style>
    <style:style style:name="P83" style:family="paragraph" style:parent-style-name="Text_20_body">
      <style:text-properties officeooo:rsid="002844d5" officeooo:paragraph-rsid="002844d5"/>
    </style:style>
    <style:style style:name="P84" style:family="paragraph" style:parent-style-name="Text_20_body">
      <style:text-properties officeooo:rsid="00378f94" officeooo:paragraph-rsid="00378f94"/>
    </style:style>
    <style:style style:name="P85" style:family="paragraph" style:parent-style-name="Text_20_body">
      <style:text-properties officeooo:rsid="003bc2fc" officeooo:paragraph-rsid="003bc2fc"/>
    </style:style>
    <style:style style:name="P86" style:family="paragraph" style:parent-style-name="Quotations">
      <style:paragraph-properties fo:margin-top="0cm" fo:margin-bottom="0cm" style:contextual-spacing="false"/>
      <style:text-properties style:font-name="Liberation Serif" fo:font-style="normal" officeooo:rsid="0044fe10" officeooo:paragraph-rsid="0044fe10" style:font-style-asian="normal" style:font-style-complex="normal"/>
    </style:style>
    <style:style style:name="P87" style:family="paragraph" style:parent-style-name="Quotations">
      <style:paragraph-properties fo:margin-top="0cm" fo:margin-bottom="0cm" style:contextual-spacing="false"/>
      <style:text-properties style:font-name="Liberation Mono" fo:font-style="normal" officeooo:rsid="0044fe10" officeooo:paragraph-rsid="0044fe10" style:font-style-asian="normal" style:font-style-complex="normal"/>
    </style:style>
    <style:style style:name="P88" style:family="paragraph" style:parent-style-name="Quotations">
      <style:paragraph-properties fo:margin-top="0cm" fo:margin-bottom="0cm" style:contextual-spacing="false"/>
      <style:text-properties style:font-name="Liberation Mono" fo:font-style="normal" officeooo:rsid="0044fe10" officeooo:paragraph-rsid="0045bda0" style:font-style-asian="normal" style:font-style-complex="normal"/>
    </style:style>
    <style:style style:name="P89" style:family="paragraph" style:parent-style-name="Text_20_body" style:list-style-name="L1">
      <style:text-properties officeooo:rsid="0010cc93" officeooo:paragraph-rsid="0010cc93"/>
    </style:style>
    <style:style style:name="P90" style:family="paragraph" style:parent-style-name="Text_20_body" style:list-style-name="L2">
      <style:text-properties officeooo:rsid="0010cc93" officeooo:paragraph-rsid="0010cc93"/>
    </style:style>
    <style:style style:name="P91" style:family="paragraph" style:parent-style-name="Text_20_body" style:list-style-name="L3">
      <style:text-properties officeooo:rsid="0010cc93" officeooo:paragraph-rsid="0010cc93"/>
    </style:style>
    <style:style style:name="P92" style:family="paragraph" style:parent-style-name="Text_20_body" style:list-style-name="L3">
      <style:text-properties officeooo:rsid="00119a2d" officeooo:paragraph-rsid="00119a2d"/>
    </style:style>
    <style:style style:name="P93" style:family="paragraph" style:parent-style-name="Text_20_body" style:list-style-name="L4">
      <style:text-properties officeooo:rsid="0013f780" officeooo:paragraph-rsid="0013f780"/>
    </style:style>
    <style:style style:name="P94" style:family="paragraph" style:parent-style-name="Text_20_body" style:list-style-name="L4">
      <style:text-properties officeooo:rsid="001545a0" officeooo:paragraph-rsid="001545a0"/>
    </style:style>
    <style:style style:name="T1" style:family="text">
      <style:text-properties style:font-name="Liberation Mono"/>
    </style:style>
    <style:style style:name="T2" style:family="text">
      <style:text-properties style:font-name="Liberation Mono" fo:font-size="10pt" fo:language="en" fo:country="GB" officeooo:rsid="0047f592" style:font-name-asian="Liberation Mono" style:font-size-asian="10pt" style:font-name-complex="Liberation Mono" style:font-size-complex="10pt"/>
    </style:style>
    <style:style style:name="T3" style:family="text">
      <style:text-properties style:font-name="Liberation Mono" fo:font-size="10pt" fo:language="en" fo:country="GB" officeooo:rsid="0045c5a5" style:font-name-asian="Liberation Mono" style:font-size-asian="10pt" style:font-name-complex="Liberation Mono" style:font-size-complex="10pt"/>
    </style:style>
    <style:style style:name="T4" style:family="text">
      <style:text-properties style:font-name="Liberation Mono" fo:font-size="10pt" fo:language="en" fo:country="GB" officeooo:rsid="000dba44" style:font-name-asian="Liberation Mono" style:font-size-asian="10pt" style:font-name-complex="Liberation Mono" style:font-size-complex="10pt"/>
    </style:style>
    <style:style style:name="T5" style:family="text">
      <style:text-properties style:font-name="Liberation Mono" fo:font-size="10pt" fo:language="en" fo:country="GB" officeooo:rsid="000e1b6f" style:font-name-asian="Liberation Mono" style:font-size-asian="10pt" style:font-name-complex="Liberation Mono" style:font-size-complex="10pt"/>
    </style:style>
    <style:style style:name="T6" style:family="text">
      <style:text-properties style:font-name="Liberation Mono" fo:font-size="10pt" fo:language="en" fo:country="GB" officeooo:rsid="004aa768" style:font-name-asian="Liberation Mono" style:font-size-asian="10pt" style:font-name-complex="Liberation Mono" style:font-size-complex="10pt"/>
    </style:style>
    <style:style style:name="T7" style:family="text">
      <style:text-properties style:font-name="Liberation Mono" fo:font-size="10pt" fo:language="en" fo:country="GB" officeooo:rsid="000ddac1" style:font-name-asian="Liberation Mono" style:font-size-asian="10pt" style:font-name-complex="Liberation Mono" style:font-size-complex="10pt"/>
    </style:style>
    <style:style style:name="T8" style:family="text">
      <style:text-properties style:font-name="Liberation Mono" fo:font-size="10pt" fo:language="en" fo:country="GB" officeooo:rsid="0010cc93" style:font-name-asian="Liberation Mono" style:font-size-asian="10pt" style:font-name-complex="Liberation Mono" style:font-size-complex="10pt"/>
    </style:style>
    <style:style style:name="T9" style:family="text">
      <style:text-properties style:font-name="Liberation Mono" fo:font-size="10pt" fo:language="en" fo:country="GB" officeooo:rsid="003bc2fc" style:font-name-asian="Liberation Mono" style:font-size-asian="10pt" style:font-name-complex="Liberation Mono" style:font-size-complex="10pt"/>
    </style:style>
    <style:style style:name="T10" style:family="text">
      <style:text-properties style:font-name="Liberation Mono" fo:font-weight="bold" officeooo:rsid="001c25c5" style:font-weight-asian="bold" style:font-weight-complex="bold"/>
    </style:style>
    <style:style style:name="T11" style:family="text">
      <style:text-properties style:font-name="Liberation Mono" fo:font-weight="bold" officeooo:rsid="00191f51" style:font-weight-asian="bold" style:font-weight-complex="bold"/>
    </style:style>
    <style:style style:name="T12" style:family="text">
      <style:text-properties style:font-name="Liberation Mono" fo:font-style="normal" fo:font-weight="bold" officeooo:rsid="0059f598" style:font-style-asian="normal" style:font-weight-asian="bold" style:font-style-complex="normal" style:font-weight-complex="bold"/>
    </style:style>
    <style:style style:name="T13" style:family="text">
      <style:text-properties style:font-name="Liberation Mono" fo:font-style="normal" style:font-style-asian="normal" style:font-style-complex="normal"/>
    </style:style>
    <style:style style:name="T14" style:family="text">
      <style:text-properties style:font-name="Liberation Mono" fo:font-style="normal" officeooo:rsid="00268368" style:font-style-asian="normal" style:font-style-complex="normal"/>
    </style:style>
    <style:style style:name="T15" style:family="text">
      <style:text-properties style:font-name="Liberation Mono" fo:font-style="normal" fo:font-weight="normal" officeooo:rsid="003e2376" style:font-style-asian="normal" style:font-weight-asian="normal" style:font-style-complex="normal" style:font-weight-complex="normal"/>
    </style:style>
    <style:style style:name="T16" style:family="text">
      <style:text-properties style:font-name="Liberation Mono" fo:font-weight="normal" style:font-weight-asian="normal" style:font-weight-complex="normal"/>
    </style:style>
    <style:style style:name="T17" style:family="text">
      <style:text-properties style:font-name="Liberation Mono" officeooo:rsid="00268368"/>
    </style:style>
    <style:style style:name="T18" style:family="text">
      <style:text-properties fo:language="en" fo:country="GB"/>
    </style:style>
    <style:style style:name="T19" style:family="text">
      <style:text-properties fo:language="en" fo:country="GB" officeooo:rsid="0047f592"/>
    </style:style>
    <style:style style:name="T20" style:family="text">
      <style:text-properties fo:language="en" fo:country="GB" officeooo:rsid="000e1b6f"/>
    </style:style>
    <style:style style:name="T21" style:family="text">
      <style:text-properties fo:language="en" fo:country="GB" officeooo:rsid="004aa768"/>
    </style:style>
    <style:style style:name="T22" style:family="text">
      <style:text-properties style:font-name="Liberation Serif"/>
    </style:style>
    <style:style style:name="T23" style:family="text">
      <style:text-properties style:font-name="Liberation Serif" officeooo:rsid="000fd6a5"/>
    </style:style>
    <style:style style:name="T24" style:family="text">
      <style:text-properties style:font-name="Liberation Serif" fo:font-style="normal" officeooo:rsid="00268368" style:font-style-asian="normal" style:font-style-complex="normal"/>
    </style:style>
    <style:style style:name="T25" style:family="text">
      <style:text-properties style:font-name="Liberation Serif" fo:font-style="italic" style:font-style-asian="italic" style:font-style-complex="italic"/>
    </style:style>
    <style:style style:name="T26" style:family="text">
      <style:text-properties style:font-name="Liberation Serif" fo:font-weight="normal" style:font-weight-asian="normal" style:font-weight-complex="normal"/>
    </style:style>
    <style:style style:name="T27" style:family="text">
      <style:text-properties style:font-name="Liberation Serif" officeooo:rsid="003e2ab5"/>
    </style:style>
    <style:style style:name="T28" style:family="text">
      <style:text-properties officeooo:rsid="0010cc93"/>
    </style:style>
    <style:style style:name="T29" style:family="text">
      <style:text-properties officeooo:rsid="00119a2d"/>
    </style:style>
    <style:style style:name="T30" style:family="text">
      <style:text-properties fo:font-style="italic" style:font-style-asian="italic" style:font-style-complex="italic"/>
    </style:style>
    <style:style style:name="T31" style:family="text">
      <style:text-properties fo:font-style="italic" officeooo:rsid="00268368" style:font-style-asian="italic" style:font-style-complex="italic"/>
    </style:style>
    <style:style style:name="T32" style:family="text">
      <style:text-properties fo:font-style="italic" officeooo:rsid="004ad563"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db7ed" style:font-style-asian="italic" style:font-weight-asian="normal" style:font-style-complex="italic" style:font-weight-complex="normal"/>
    </style:style>
    <style:style style:name="T35" style:family="text">
      <style:text-properties fo:font-style="italic" fo:font-weight="normal" officeooo:rsid="003f7853" style:font-style-asian="italic" style:font-weight-asian="normal" style:font-style-complex="italic" style:font-weight-complex="normal"/>
    </style:style>
    <style:style style:name="T36" style:family="text">
      <style:text-properties fo:font-style="italic" fo:font-weight="bold" officeooo:rsid="004ad563" style:font-style-asian="italic" style:font-weight-asian="bold" style:font-style-complex="italic" style:font-weight-complex="bold"/>
    </style:style>
    <style:style style:name="T37" style:family="text">
      <style:text-properties officeooo:rsid="00138e16"/>
    </style:style>
    <style:style style:name="T38" style:family="text">
      <style:text-properties fo:font-style="normal" style:font-style-asian="normal" style:font-style-complex="normal"/>
    </style:style>
    <style:style style:name="T39" style:family="text">
      <style:text-properties fo:font-style="normal" officeooo:rsid="0019c0c4" style:font-style-asian="normal" style:font-style-complex="normal"/>
    </style:style>
    <style:style style:name="T40" style:family="text">
      <style:text-properties fo:font-style="normal" officeooo:rsid="00268368" style:font-style-asian="normal" style:font-style-complex="normal"/>
    </style:style>
    <style:style style:name="T41" style:family="text">
      <style:text-properties fo:font-style="normal" officeooo:rsid="0045bda0" style:font-style-asian="normal" style:font-style-complex="normal"/>
    </style:style>
    <style:style style:name="T42" style:family="text">
      <style:text-properties fo:font-style="normal" officeooo:rsid="004729a4" style:font-style-asian="normal" style:font-style-complex="normal"/>
    </style:style>
    <style:style style:name="T43" style:family="text">
      <style:text-properties fo:font-style="normal" fo:font-weight="bold" officeooo:rsid="0059f598"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db7ed" style:font-style-asian="normal" style:font-weight-asian="normal" style:font-style-complex="normal" style:font-weight-complex="normal"/>
    </style:style>
    <style:style style:name="T46" style:family="text">
      <style:text-properties fo:font-style="normal" fo:font-weight="normal" officeooo:rsid="003e2376" style:font-style-asian="normal" style:font-weight-asian="normal" style:font-style-complex="normal" style:font-weight-complex="normal"/>
    </style:style>
    <style:style style:name="T47" style:family="text">
      <style:text-properties officeooo:rsid="0007d57f"/>
    </style:style>
    <style:style style:name="T48" style:family="text">
      <style:text-properties fo:font-weight="bold" style:font-weight-asian="bold" style:font-weight-complex="bold"/>
    </style:style>
    <style:style style:name="T49" style:family="text">
      <style:text-properties fo:font-weight="bold" officeooo:rsid="00159239" style:font-weight-asian="bold" style:font-weight-complex="bold"/>
    </style:style>
    <style:style style:name="T50" style:family="text">
      <style:text-properties fo:font-weight="bold" officeooo:rsid="00164b33" style:font-weight-asian="bold" style:font-weight-complex="bold"/>
    </style:style>
    <style:style style:name="T51" style:family="text">
      <style:text-properties fo:font-weight="bold" officeooo:rsid="0018aabb" style:font-weight-asian="bold" style:font-weight-complex="bold"/>
    </style:style>
    <style:style style:name="T52" style:family="text">
      <style:text-properties fo:font-weight="bold" officeooo:rsid="00191f51" style:font-weight-asian="bold" style:font-weight-complex="bold"/>
    </style:style>
    <style:style style:name="T53" style:family="text">
      <style:text-properties fo:font-weight="bold" officeooo:rsid="001c25c5" style:font-weight-asian="bold" style:font-weight-complex="bold"/>
    </style:style>
    <style:style style:name="T54" style:family="text">
      <style:text-properties fo:font-weight="bold" officeooo:rsid="00236021" style:font-weight-asian="bold" style:font-weight-complex="bold"/>
    </style:style>
    <style:style style:name="T55" style:family="text">
      <style:text-properties fo:font-weight="bold" officeooo:rsid="002491c2" style:font-weight-asian="bold" style:font-weight-complex="bold"/>
    </style:style>
    <style:style style:name="T56" style:family="text">
      <style:text-properties fo:font-weight="bold" officeooo:rsid="004ad563" style:font-weight-asian="bold" style:font-weight-complex="bold"/>
    </style:style>
    <style:style style:name="T57" style:family="text">
      <style:text-properties officeooo:rsid="00159239"/>
    </style:style>
    <style:style style:name="T58" style:family="text">
      <style:text-properties officeooo:rsid="00164b33"/>
    </style:style>
    <style:style style:name="T59" style:family="text">
      <style:text-properties fo:font-weight="normal" style:font-weight-asian="normal" style:font-weight-complex="normal"/>
    </style:style>
    <style:style style:name="T60" style:family="text">
      <style:text-properties fo:font-weight="normal" officeooo:rsid="001b2df2" style:font-weight-asian="normal" style:font-weight-complex="normal"/>
    </style:style>
    <style:style style:name="T61" style:family="text">
      <style:text-properties fo:font-weight="normal" officeooo:rsid="001db7ed" style:font-weight-asian="normal" style:font-weight-complex="normal"/>
    </style:style>
    <style:style style:name="T62" style:family="text">
      <style:text-properties fo:font-weight="normal" officeooo:rsid="00322e85" style:font-weight-asian="normal" style:font-weight-complex="normal"/>
    </style:style>
    <style:style style:name="T63" style:family="text">
      <style:text-properties fo:font-weight="normal" officeooo:rsid="0032adf7" style:font-weight-asian="normal" style:font-weight-complex="normal"/>
    </style:style>
    <style:style style:name="T64" style:family="text">
      <style:text-properties fo:font-weight="normal" officeooo:rsid="003c2b7b" style:font-weight-asian="normal" style:font-weight-complex="normal"/>
    </style:style>
    <style:style style:name="T65" style:family="text">
      <style:text-properties fo:font-weight="normal" officeooo:rsid="003f7853" style:font-weight-asian="normal" style:font-weight-complex="normal"/>
    </style:style>
    <style:style style:name="T66" style:family="text">
      <style:text-properties fo:font-weight="normal" officeooo:rsid="004131b6" style:font-weight-asian="normal" style:font-weight-complex="normal"/>
    </style:style>
    <style:style style:name="T67" style:family="text">
      <style:text-properties officeooo:rsid="0018aabb"/>
    </style:style>
    <style:style style:name="T68" style:family="text">
      <style:text-properties officeooo:rsid="00191f51"/>
    </style:style>
    <style:style style:name="T69" style:family="text">
      <style:text-properties officeooo:rsid="0019c0c4"/>
    </style:style>
    <style:style style:name="T70" style:family="text">
      <style:text-properties style:text-position="super 58%" fo:font-style="normal" officeooo:rsid="0019c0c4" style:font-style-asian="normal" style:font-style-complex="normal"/>
    </style:style>
    <style:style style:name="T71" style:family="text">
      <style:text-properties style:text-position="super 58%" fo:font-weight="normal" style:font-weight-asian="normal" style:font-weight-complex="normal"/>
    </style:style>
    <style:style style:name="T72" style:family="text">
      <style:text-properties style:text-position="super 58%" fo:font-weight="normal" officeooo:rsid="0032adf7" style:font-weight-asian="normal" style:font-weight-complex="normal"/>
    </style:style>
    <style:style style:name="T73" style:family="text">
      <style:text-properties officeooo:rsid="001c25c5"/>
    </style:style>
    <style:style style:name="T74" style:family="text">
      <style:text-properties style:text-position="0% 100%" fo:font-weight="normal" style:font-weight-asian="normal" style:font-weight-complex="normal"/>
    </style:style>
    <style:style style:name="T75" style:family="text">
      <style:text-properties officeooo:rsid="00216984"/>
    </style:style>
    <style:style style:name="T76" style:family="text">
      <style:text-properties officeooo:rsid="00236021"/>
    </style:style>
    <style:style style:name="T77" style:family="text">
      <style:text-properties officeooo:rsid="002491c2"/>
    </style:style>
    <style:style style:name="T78" style:family="text">
      <style:text-properties officeooo:rsid="00268368"/>
    </style:style>
    <style:style style:name="T79" style:family="text">
      <style:text-properties officeooo:rsid="0027c318"/>
    </style:style>
    <style:style style:name="T80" style:family="text">
      <style:text-properties officeooo:rsid="00304e68"/>
    </style:style>
    <style:style style:name="T81" style:family="text">
      <style:text-properties officeooo:rsid="0031ddbb"/>
    </style:style>
    <style:style style:name="T82" style:family="text">
      <style:text-properties officeooo:rsid="0032adf7"/>
    </style:style>
    <style:style style:name="T83" style:family="text">
      <style:text-properties officeooo:rsid="0034a5ab"/>
    </style:style>
    <style:style style:name="T84" style:family="text">
      <style:text-properties officeooo:rsid="0034fbe7"/>
    </style:style>
    <style:style style:name="T85" style:family="text">
      <style:text-properties officeooo:rsid="0036c1a3"/>
    </style:style>
    <style:style style:name="T86" style:family="text">
      <style:text-properties officeooo:rsid="00378f94"/>
    </style:style>
    <style:style style:name="T87" style:family="text">
      <style:text-properties officeooo:rsid="00398ccc"/>
    </style:style>
    <style:style style:name="T88" style:family="text">
      <style:text-properties officeooo:rsid="003c2b7b"/>
    </style:style>
    <style:style style:name="T89" style:family="text">
      <style:text-properties officeooo:rsid="003e2376"/>
    </style:style>
    <style:style style:name="T90" style:family="text">
      <style:text-properties officeooo:rsid="004131b6"/>
    </style:style>
    <style:style style:name="T91" style:family="text">
      <style:text-properties officeooo:rsid="004ad563"/>
    </style:style>
    <style:style style:name="T92" style:family="text">
      <style:text-properties officeooo:rsid="004c57a3"/>
    </style:style>
    <style:style style:name="T93" style:family="text">
      <style:text-properties officeooo:rsid="004e5d18"/>
    </style:style>
    <style:style style:name="T94" style:family="text">
      <style:text-properties style:font-name="Liberation 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ource_20_Text"><text:span text:style-name="T4">Comment response</text:span></text:span><text:span text:style-name="Source_20_Text"><text:span text:style-name="T18"> for C23 <text:s/></text:span></text:span></text:p>
      <text:p text:style-name="P14"><text:bookmark text:name="LC2"/><text:span text:style-name="Source_20_Text"><text:span text:style-name="T18">WG14 </text:span></text:span><text:span text:style-name="Source_20_Text"><text:span text:style-name="T9">3076</text:span></text:span></text:p>
      <text:p text:style-name="P14"><text:bookmark text:name="LC3"/></text:p>
      <text:p text:style-name="P14"><text:bookmark text:name="LC4"/><text:span text:style-name="Source_20_Text"><text:span text:style-name="T18">Title: <text:s text:c="14"/></text:span></text:span><text:span text:style-name="Source_20_Text"><text:span text:style-name="T20">A</text:span></text:span><text:span text:style-name="Source_20_Text"><text:span text:style-name="T5">uto as a placeholder type specifier</text:span></text:span></text:p>
      <text:p text:style-name="P14"><text:bookmark text:name="LC5"/><text:span text:style-name="Source_20_Text"><text:span text:style-name="T18">Author, affiliation: Alex Gilding, Perforce <text:s/></text:span></text:span></text:p>
      <text:p text:style-name="P14"><text:bookmark text:name="LC6"/><text:span text:style-name="Source_20_Text"><text:span text:style-name="T18">Date: <text:s text:c="15"/>202</text:span></text:span><text:span text:style-name="Source_20_Text"><text:span text:style-name="T5">3</text:span></text:span><text:span text:style-name="Source_20_Text"><text:span text:style-name="T18">-</text:span></text:span><text:span text:style-name="Source_20_Text"><text:span text:style-name="T2">0</text:span></text:span><text:span text:style-name="Source_20_Text"><text:span text:style-name="T5">1</text:span></text:span><text:span text:style-name="Source_20_Text"><text:span text:style-name="T18">-</text:span></text:span><text:span text:style-name="Source_20_Text"><text:span text:style-name="T19">0</text:span></text:span><text:span text:style-name="Source_20_Text"><text:span text:style-name="T3">5</text:span></text:span><text:span text:style-name="Source_20_Text"><text:span text:style-name="T18"> <text:s/></text:span></text:span></text:p>
      <text:p text:style-name="P14"><text:bookmark text:name="LC7"/><text:span text:style-name="Source_20_Text"><text:span text:style-name="T18">Proposal category: <text:s text:c="2"/></text:span></text:span><text:span text:style-name="Source_20_Text"><text:span text:style-name="T20">National Body Comment Response</text:span></text:span><text:span text:style-name="Source_20_Text"><text:span text:style-name="T18"> <text:s/></text:span></text:span></text:p>
      <text:p text:style-name="P16"><text:bookmark text:name="LC8"/><text:span text:style-name="Source_20_Text"><text:span text:style-name="T18">Target audience: <text:s text:c="4"/>Com</text:span></text:span><text:span text:style-name="Source_20_Text"><text:span text:style-name="T5">mittee wording review</text:span></text:span><text:span text:style-name="Source_20_Text"><text:span text:style-name="T18"> <text:s/></text:span></text:span></text:p>
      <text:h text:style-name="P5" text:outline-level="2"><text:bookmark text:name="abstract"/>Abstract</text:h>
      <text:p text:style-name="P59">This is a response to US National Body Comments 121, 122 and 123 against the CD ballot draft of the C23 Standard.</text:p>
      <text:p text:style-name="P59">The comments request two main changes to the way the <text:span text:style-name="T1">auto</text:span><text:span text:style-name="T22"> specifier works: it should become a type specifier rather than remaining a storage class specifier, because it does not describe a storage class any more; and it should permit partial deduction </text:span><text:span text:style-name="T23">of the type of the initializing value by allowing derived types to derive from the placeholder it describes.</text:span></text:p>
      <text:p text:style-name="P80">Both of these changes should improve compatibility with C++, the first mostly for implementers and readers of the text; the second to better conform to common user expectations about how the feature should be available.</text:p>
      <text:h text:style-name="P1" text:outline-level="1">Auto as a placeholder type specifier</text:h>
      <text:p text:style-name="P15"><text:bookmark text:name="LC11"/><text:span text:style-name="Source_20_Text"><text:span text:style-name="T18">Reply-to: <text:s text:c="11"/>Alex Gilding (agilding@perforce.com) <text:s/></text:span></text:span></text:p>
      <text:p text:style-name="P15"><text:bookmark text:name="LC21"/><text:span text:style-name="Source_20_Text"><text:span text:style-name="T18">Document No: <text:s text:c="8"/></text:span></text:span><text:span text:style-name="Source_20_Text"><text:span text:style-name="T9">N3076</text:span></text:span><text:span text:style-name="Source_20_Text"><text:span text:style-name="T18"> <text:s/></text:span></text:span></text:p>
      <text:p text:style-name="P15"><text:bookmark text:name="LC31"/><text:span text:style-name="Source_20_Text"><text:span text:style-name="T18">Revises Document No: </text:span></text:span><text:span text:style-name="Source_20_Text"><text:span text:style-name="T8">N</text:span></text:span><text:span text:style-name="Source_20_Text"><text:span text:style-name="T6">/</text:span></text:span><text:span text:style-name="Source_20_Text"><text:span text:style-name="T8">A</text:span></text:span></text:p>
      <text:p text:style-name="P17"><text:bookmark text:name="LC41"/><text:span text:style-name="Source_20_Text"><text:span text:style-name="T18">Date: <text:s text:c="15"/>202</text:span></text:span><text:span text:style-name="Source_20_Text"><text:span text:style-name="T8">3</text:span></text:span><text:span text:style-name="Source_20_Text"><text:span text:style-name="T18">-</text:span></text:span><text:span text:style-name="Source_20_Text"><text:span text:style-name="T7">0</text:span></text:span><text:span text:style-name="Source_20_Text"><text:span text:style-name="T8">1</text:span></text:span><text:span text:style-name="Source_20_Text"><text:span text:style-name="T18">-</text:span></text:span><text:span text:style-name="Source_20_Text"><text:span text:style-name="T21">0</text:span></text:span><text:span text:style-name="Source_20_Text"><text:span text:style-name="T7">5</text:span></text:span><text:span text:style-name="Source_20_Text"><text:span text:style-name="T18"> <text:s/></text:span></text:span></text:p>
      <text:h text:style-name="P7" text:outline-level="2">Proposal History</text:h>
      <text:p text:style-name="P60">This is the first version of this document. However, the changes are applied to the feature that was introduced by:</text:p>
      <text:h text:style-name="P10" text:outline-level="3">N2953 <text:span text:style-name="T28">Type inference for object definitions</text:span></text:h>
      <text:list xml:id="list451675898" text:style-name="L1">
        <text:list-item>
          <text:p text:style-name="P89">Adopted into C23 at July 2022 meeting</text:p>
        </text:list-item>
      </text:list>
      <text:h text:style-name="Heading_20_3" text:outline-level="3">N3067 CD 9899 ballot comments</text:h>
      <text:list xml:id="list3522584785" text:style-name="L2">
        <text:list-item>
          <text:p text:style-name="P90">Comments 121, 122 and 123 request changes to the specification and mechanism of the <text:span text:style-name="T1">auto</text:span> specifier from the version which was adopted.</text:p>
        </text:list-item>
      </text:list>
      <text:p text:style-name="P81"/>
      <text:h text:style-name="P6" text:outline-level="2">Introduction</text:h>
      <text:p text:style-name="P60">The adopted specification for <text:span text:style-name="T1">auto</text:span> aimed to meet two goals:</text:p>
      <text:list xml:id="list2699521471" text:style-name="L3">
        <text:list-item>
          <text:p text:style-name="P91">not break any existing code that provided explicit type specifiers (code relying on implicit type specifiers is <text:span text:style-name="T29">no longer allowed</text:span>);</text:p>
        </text:list-item>
        <text:list-item>
          <text:p text:style-name="P92">inherit the <text:span text:style-name="T30">exact</text:span> semantics of the feature as already implemented by GCC and Clang via the <text:span text:style-name="T1">__auto_type</text:span> specifier found in the GNU C dialect.</text:p>
        </text:list-item>
      </text:list>
      <text:p text:style-name="P61"><text:span text:style-name="T1">auto</text:span> can therefore be combined with other type specifiers, but as it is currently provided it is not completely compatible with the C++ feature. This is because the C++ feature specified in C++20/[dcl.type.auto.deduct] relies on wording from the definition of templates (C++20/[temp.deduct]), which are completely missing from C; an equivalent feature needs to be reconstructed instead of using a common specification.</text:p>
      <text:p text:style-name="P61">However, the missing specifications also leave the C feature far more limited in scope, so reconstructing only the parts relevant to object definitions is not as difficult as initially feared.</text:p>
      <text:p text:style-name="P61">Additionally, changing the definition of <text:span text:style-name="T1">auto</text:span> from a storage class to a type specifier is separately possible and comparatively easy. This is a prerequisite task for partial deduction which can be integrated separately.</text:p>
      <text:h text:style-name="P4" text:outline-level="2">Proposed Resolutions</text:h>
      <text:h text:style-name="Heading_20_3" text:outline-level="3">Resolution 121: <text:span text:style-name="T1">auto</text:span> as a type specifier</text:h>
      <text:p text:style-name="P62">US NB Comment 121 requests that <text:span text:style-name="T1">auto</text:span> be made into a type specifier rather than being left as a storage class. Treating it as a storage class seems to make unnecessary complexity for implementers and introduces incompatibility with C++. It leaves in the ambiguity of declarations with no type at all needing one to be implicitly added by the compiler (implicit <text:span text:style-name="T1">int</text:span> becoming implicitly-deduced, but still<text:span text:style-name="T30"> syntactically </text:span>implicit), makes the specification more complicated, and serves no purpose because the specifier does not describe a storage class (it can be used with static and thread storage durations).</text:p>
      <text:p text:style-name="P63">Changing the specification to refer to a type specifier simplifies all of this and is also simpler for implementers, who can choose to interpret the keyword as one of two internally-different specifiers depending on the language mode, rather than a storage class specifier with varying effects <text:span text:style-name="T78">(i.e. one grammar can contain two </text:span><text:span text:style-name="T31">different</text:span><text:span text:style-name="T78"> syntactic </text:span><text:span text:style-name="T17">auto</text:span><text:span text:style-name="T78"> side-by-side)</text:span>. This is interesting to developers also shipping combined C++ compilers who would like to be able to reuse as much of their internals as possible.</text:p>
      <text:h text:style-name="P11" text:outline-level="3">Proposed Resolution</text:h>
      <text:p text:style-name="P63">Introduce the term “placeholder type specifier” as found in C++. A <text:span text:style-name="T30">placeholder type specifier</text:span> is simply a syntactic <text:span text:style-name="T78">type specifier </text:span><text:span text:style-name="T38">that has some additional constraints on where it may appear </text:span><text:span text:style-name="T40">(i.e. not in a </text:span><text:span text:style-name="T31">type-name</text:span><text:span text:style-name="T40">)</text:span><text:span text:style-name="T38">. </text:span><text:span text:style-name="T40">This is an italicized term of art.</text:span></text:p>
      <text:p text:style-name="P63"><text:span text:style-name="T38">Change all references to </text:span><text:span text:style-name="T13">auto</text:span><text:span text:style-name="T38"> as a storage class specifier to refer to it as a </text:span><text:span text:style-name="T40">(</text:span><text:span text:style-name="T38">placeholder</text:span><text:span text:style-name="T40">)</text:span><text:span text:style-name="T38"> type specifier. Change all references to declarations that omit a type (</text:span><text:span text:style-name="T40">of which </text:span><text:span text:style-name="T38">there are now none), to declarations that contain a </text:span><text:span text:style-name="T30">placeholder type specifier</text:span><text:span text:style-name="T38">. Allow the </text:span><text:span text:style-name="T30">placeholder type specifier</text:span><text:span text:style-name="T38"> to form part of any type specifier multiset, </text:span><text:span text:style-name="T40">where it is ignored if it is not the only component of the type specifier (this subsumes usages like </text:span><text:span text:style-name="T14">auto int x = 10;</text:span><text:span text:style-name="T24"> by making the type </text:span><text:span text:style-name="T14">auto int</text:span><text:span text:style-name="T24">, in which </text:span><text:span text:style-name="T14">auto</text:span><text:span text:style-name="T24"> is ignored and therefore just </text:span><text:span text:style-name="T14">int</text:span><text:span text:style-name="T40">)</text:span><text:span text:style-name="T38">.</text:span></text:p>
      <text:h text:style-name="P12" text:outline-level="3">Resolution 122: support pointer and array declarators</text:h>
      <text:p text:style-name="P78">US NB comment 122 requests that C explicitly require support for pointer and array declarators.</text:p>
      <text:p text:style-name="P78">Using explicit pointer declarators is common practice in C++, and users would be surprised not to find it in C as well. C++ also supports deduction of function return types and array element types in pointer-to-function and pointer-to-array declarators (but <text:span text:style-name="T30">not</text:span> function parameter types).</text:p>
      <text:p text:style-name="P78">Note that C++ deduces the type of a <text:span text:style-name="T30">braced-initializer</text:span> to be a <text:span text:style-name="T1">std::initializer_list</text:span>, not an array. The syntax <text:span text:style-name="T1">auto a[] = { … };</text:span> is therefore not valid C++. <text:span text:style-name="T30">However</text:span>, lacking this library feature, C users will expect arrays to substitute for it; and in any case there is no additional complexity in allowing this form so long as we do not bother with complicated element coercion rules, and simply demand the elements be explicitly compatible. (It would actually introduce more wording to disallow this.)</text:p>
      <text:p text:style-name="P78"><text:soft-page-break/>This form was explicitly requested by the US NB so it is included here. The comments from Intel are not concerned about a C++ compatibility issue here because definitions are mostly at block scope.</text:p>
      <text:h text:style-name="P12" text:outline-level="3">Proposed Resolution</text:h>
      <text:p text:style-name="P78">Building on resolution 121, allow <text:span text:style-name="T30">derived types</text:span> to be constructed from the <text:span text:style-name="T30">placeholder type</text:span>, so long as the sequence of derived constructions matches the same outermost sequence of derived type constructions on the initializer expression.</text:p>
      <text:p text:style-name="P79">This trivially and elegantly allows the following forms:</text:p>
      <text:p text:style-name="P49">auto * p1 = …</text:p>
      <text:p text:style-name="P49">auto p2[] = { … }</text:p>
      <text:p text:style-name="P49">auto (*p3)[3] = …;</text:p>
      <text:p text:style-name="P49">auto (*p4)(void) = …;</text:p>
      <text:p text:style-name="P49"/>
      <text:p text:style-name="P79">and disallows</text:p>
      <text:p text:style-name="P49">atomic (auto) a = …;</text:p>
      <text:p text:style-name="P49">int (*f)(auto) = …;</text:p>
      <text:p text:style-name="P49"/>
      <text:p text:style-name="P79">Note that while the <text:span text:style-name="T1">atomic</text:span> derived type is not allowed because it uses <text:span text:style-name="T1">auto</text:span> as a <text:span text:style-name="T30">type-name</text:span>, atomically-<text:span text:style-name="T30">qualifying</text:span> the declared object is perfectly OK. This is a rare difference in the behaviour of the <text:span text:style-name="T1">atomic</text:span> specifier and qualifier.</text:p>
      <text:h text:style-name="P13" text:outline-level="3">Resolution 123: no undefined behaviour on non-identifier declarators</text:h>
      <text:p text:style-name="P79">Defining the behaviour as undefined when the declarator is not a (possibly-parenthesized) plain identifier allows implementations to do stupid things. This should be well-specified as either an error or well-supported.</text:p>
      <text:h text:style-name="P13" text:outline-level="3">Proposed Resolution</text:h>
      <text:p text:style-name="P79">No additional action is needed because the changes to support resolution 122 remove this restriction and allow the full range of declarator syntaxes, with appropriate constraints when they do not make sense. This is therefore resolved by addressing the first two points.</text:p>
      <text:h text:style-name="P8" text:outline-level="2">Impact</text:h>
      <text:p text:style-name="P83">As integrated into C23, the <text:span text:style-name="T1">auto</text:span> specifier was an <text:span text:style-name="T48">exact</text:span> standardization of the GNU C <text:span text:style-name="T1">__auto_type</text:span> specifier, renamed to look like the C++ keyword. This has the advantage of being completely back<text:span text:style-name="T93">ed</text:span> by long-established practice.</text:p>
      <text:p text:style-name="P83">This proposal significantly extends the feature to more closely match it as it appears in C++. This is <text:span text:style-name="T30">not</text:span> invention, but it is also not the exact GNU C feature we initially promised to standardize.</text:p>
      <text:p text:style-name="P83">Feedback from US NB implementers seemed to indicate that being more generous with the syntax to allow additional C++-ish forms (i.e. <text:span text:style-name="T1">auto * px =</text:span>) is preferable to sticking to exact C dialect practice, because the C++ practice is more useful to them.</text:p>
      <text:h text:style-name="P2" text:outline-level="2">Proposed Wording</text:h>
      <text:p text:style-name="P63">Changes are proposed against the wording in C2<text:span text:style-name="T47">3</text:span> draft n3054. Bolded text <text:span text:style-name="T87">within an existing paragraph</text:span> is new text.</text:p>
      <text:p text:style-name="P65"/>
      <text:p text:style-name="P70">Modify 6.7 “Declarations”:</text:p>
      <text:p text:style-name="P70">The first sentence of paragraph 12 does not imply a declaration can have no type specifier:</text:p>
      <text:p text:style-name="Quotations">A declaration such that the declaration specifiers contain <text:span text:style-name="T51">a placeholder</text:span> type specifier <text:span text:style-name="T51">(6.7.9)</text:span> or that is declared with <text:span text:style-name="T1">constexpr</text:span> is said to be underspecified.</text:p>
      <text:p text:style-name="P70">Add a forward reference to 6.7.2:</text:p>
      <text:p text:style-name="Quotations">Forward references: declarators (6.7.6), enumeration specifiers (6.7.2.2), initialization (6.7.10), type names (6.7.7), <text:span text:style-name="T51">type specifiers (6.7.2),</text:span><text:span text:style-name="T67"> </text:span>type qualifiers (6.7.3).</text:p>
      <text:p text:style-name="P65"/>
      <text:p text:style-name="P65">Modify 6.7.1 “Storage-class specifiers” to remove all mention of <text:span text:style-name="T1">auto</text:span>:</text:p>
      <text:list xml:id="list305628080" text:style-name="L4">
        <text:list-item>
          <text:p text:style-name="P93">Remove <text:span text:style-name="T1">auto</text:span> from the list in paragraph 1.</text:p>
        </text:list-item>
        <text:list-item>
          <text:p text:style-name="P93">Remove the second bullet-point, from paragraph 2, and delete footnote 138. Remove <text:span text:style-name="T1">auto</text:span> from what is currently the third bullet-point.</text:p>
        </text:list-item>
        <text:list-item>
          <text:p text:style-name="P93">Remove the entire second sentence from paragraph 4.</text:p>
        </text:list-item>
        <text:list-item>
          <text:p text:style-name="P93">Remove <text:span text:style-name="T1">auto,</text:span> from the first bullet-point in paragraph 6.</text:p>
        </text:list-item>
        <text:list-item>
          <text:p text:style-name="P93">Remove the final part of the sentence in paragraph 7 that forward-references 6.7.9.</text:p>
        </text:list-item>
        <text:list-item>
          <text:p text:style-name="P94">Remove the entire paragraph 11.</text:p>
        </text:list-item>
        <text:list-item>
          <text:p text:style-name="P94">In footnote 142, change the typewriter-face word “<text:span text:style-name="T1">auto</text:span><text:span text:style-name="T22">” to the normal-face word “automatic” (this is not about the specifier anyway).</text:span></text:p>
        </text:list-item>
      </text:list>
      <text:p text:style-name="P82"/>
      <text:p text:style-name="P64">Modify 6.<text:span text:style-name="T37">7.2</text:span> “<text:span text:style-name="T37">Type specifiers</text:span>”:</text:p>
      <text:p text:style-name="P63">Add a new entry to the list in paragraph 1:</text:p>
      <text:p text:style-name="P37">...</text:p>
      <text:p text:style-name="P39">atomic-type-specifier</text:p>
      <text:p text:style-name="P38">struct-or-union-specifier</text:p>
      <text:p text:style-name="P38">enum-specifier</text:p>
      <text:p text:style-name="P39">typedef-name</text:p>
      <text:p text:style-name="P39">typeof-specifier</text:p>
      <text:p text:style-name="P50">auto</text:p>
      <text:p text:style-name="P56"/>
      <text:p text:style-name="P67">Delete the first part of the first sentence of paragraph 2, up to the comma (“Except where the type is inferred (6.7.9),”).</text:p>
      <text:p text:style-name="P63">Add a final bullet point to the multiset list in paragraph 2:</text:p>
      <text:p text:style-name="P40"><text:soft-page-break/>...</text:p>
      <text:p text:style-name="P40">– enum specifier</text:p>
      <text:p text:style-name="P40">– typedef name</text:p>
      <text:p text:style-name="P40">– typeof specifier</text:p>
      <text:p text:style-name="P42"><text:span text:style-name="T43">– </text:span><text:span text:style-name="T12">auto</text:span></text:p>
      <text:p text:style-name="P41"/>
      <text:p text:style-name="P65">Add a new paragraph before paragraph 3:</text:p>
      <text:p text:style-name="P26">The specifier <text:span text:style-name="T1">auto</text:span> may also appear, at most once, as <text:span text:style-name="T57">an element</text:span> of any other type specifier in the above list of multisets.</text:p>
      <text:p text:style-name="P67">Add a reference to type <text:span text:style-name="T58">inference in paragraph 5:</text:span></text:p>
      <text:p text:style-name="Quotations">Specifiers for structures, unions, enumerations, atomic types, and typeof specifiers are discussed in 6.7.2.1 through 6.7.2.5. Declarations of typedef names are discussed in 6.7.8. <text:span text:style-name="T50">Type inference from the placeholder type specifier is discussed in 6.7.9.</text:span> The characteristics of the other types are discussed in 6.2.5.</text:p>
      <text:p text:style-name="Text_20_body">Delete paragraph 6.</text:p>
      <text:p text:style-name="Text_20_body">Add a sentence to the end of paragraph 7:</text:p>
      <text:p text:style-name="Quotations">Each of the comma-separated multisets designates the same type, except that for bit-fields, it is implementation-defined whether the specifier <text:span text:style-name="T1">int</text:span> designates the same type as <text:span text:style-name="T1">signed int</text:span> or the same type as <text:span text:style-name="T1">unsigned int</text:span>. <text:span text:style-name="T52">If the specifier </text:span><text:span text:style-name="T11">auto</text:span><text:span text:style-name="T52"> appears as an element of any other </text:span><text:span text:style-name="T36">specifier-qualifier-list</text:span><text:span text:style-name="T52"> in the list above, it is ignored, designating the same type as would be selected if </text:span><text:span text:style-name="T11">auto</text:span><text:span text:style-name="T52"> was not present.</text:span></text:p>
      <text:p text:style-name="P71">Add a new paragraph after paragraph 7:</text:p>
      <text:p text:style-name="P27">When the specifier <text:span text:style-name="T1">auto</text:span> appears as the only type specifier <text:span text:style-name="T91">in a </text:span><text:span text:style-name="T32">specifier-qualifier-list</text:span>, <text:span text:style-name="T69">i</text:span><text:span text:style-name="T92">t</text:span><text:span text:style-name="T69"> i</text:span><text:span text:style-name="T92">s</text:span><text:span text:style-name="T69"> a</text:span> <text:span text:style-name="T30">placeholder type specifier</text:span><text:span text:style-name="T38"> </text:span><text:span text:style-name="T70">footnote)</text:span><text:span text:style-name="T39">. The </text:span><text:span text:style-name="T38">designate</text:span><text:span text:style-name="T39">d type is inferred from the declaration initializer as discussed in 6.7.9</text:span><text:span text:style-name="T38">.</text:span></text:p>
      <text:p text:style-name="P36">footnote) This only appear<text:span text:style-name="T80">s</text:span> in the declaration specifiers of a declaration and not in any other context where the name of a type is used (6.7.7).</text:p>
      <text:p text:style-name="P72">(This removes the need to point out what optional elements of a declaration appertain to, because the designated type is now concretely associated with the <text:span text:style-name="T1">auto</text:span> specifier in the type position.)</text:p>
      <text:p text:style-name="P67">Add forward reference<text:span text:style-name="T68">s</text:span> to <text:span text:style-name="T68">6.7.7 and </text:span>6.7.9 at the end of the section:</text:p>
      <text:p text:style-name="Quotations">Forward references: atomic type specifiers (6.7.2.4), enumeration specifiers (6.7.2.2), structure and union specifiers (6.7.2.1), tags (6.7.2.3), <text:span text:style-name="T52">type names (6.7.7),</text:span> type definitions (6.7.8)<text:span text:style-name="T48">, </text:span><text:span text:style-name="T49">type </text:span><text:span text:style-name="T51">inference</text:span><text:span text:style-name="T49"> (6.7.9)</text:span>.</text:p>
      <text:p text:style-name="Text_20_body"/>
      <text:p text:style-name="P66">Modify example 4 in 6.7.6.2 “Array declarators” to remove keyword-highlighting from the word “auto” in comments, which has nothing to do with the specifier in this context.</text:p>
      <text:p text:style-name="P66"/>
      <text:p text:style-name="P68">Modify 6.7.7 “Type names”:</text:p>
      <text:p text:style-name="P68"><text:soft-page-break/>Add a “Constraints” section before paragraph 2:</text:p>
      <text:p text:style-name="P43">Constraints</text:p>
      <text:p text:style-name="P43"><text:span text:style-name="T59">A</text:span><text:span text:style-name="T46">n </text:span><text:span text:style-name="T15">auto</text:span><text:span text:style-name="T44"> specifier</text:span><text:span text:style-name="T59"> shall not appear as part of a </text:span><text:span text:style-name="T33">type name</text:span><text:span text:style-name="T59">.</text:span></text:p>
      <text:p text:style-name="P58"/>
      <text:p text:style-name="P69">(This is enough to rule out the use of <text:span text:style-name="T1">auto</text:span> in casts, <text:span text:style-name="T1">sizeof</text:span>, etc. contexts where it makes no sense. <text:span text:style-name="T89">It also forbids compound literals, which we may find a use case for allowing later.</text:span>)</text:p>
      <text:p text:style-name="P69"/>
      <text:p text:style-name="P69">Modify 6.7.9 “Type inference”:</text:p>
      <text:p text:style-name="P18">6.7.9 <text:s/>Type inference</text:p>
      <text:p text:style-name="P44">Constraints</text:p>
      <text:p text:style-name="P18"><text:span text:style-name="T59">A declaration for which the type is inferred shall contain the </text:span><text:span text:style-name="T30">placeholder type specifie</text:span><text:span text:style-name="T25">r</text:span><text:span text:style-name="T22"> </text:span><text:span text:style-name="T27">(6.7.2)</text:span><text:span text:style-name="T26">.</text:span></text:p>
      <text:p text:style-name="P21"><text:span text:style-name="T66">Ea</text:span><text:span text:style-name="T59">ch </text:span><text:span text:style-name="T33">init-declarator </text:span><text:span text:style-name="T66">in such a declaration </text:span><text:span text:style-name="T59">shall have the form </text:span><text:span text:style-name="T71">footnote)</text:span><text:span text:style-name="T59">:</text:span></text:p>
      <text:p text:style-name="P20"><text:span text:style-name="T59"><text:tab/></text:span><text:span text:style-name="T33">declarator</text:span><text:span text:style-name="T59"> </text:span><text:span text:style-name="T16">=</text:span><text:span text:style-name="T59"> </text:span><text:span text:style-name="T33">initializer</text:span></text:p>
      <text:p text:style-name="P31">footnote) In other words, the declaration <text:span text:style-name="T81">is </text:span>always <text:span text:style-name="T81">a definition </text:span><text:span text:style-name="T90">(of an object, not a function), </text:span><text:span text:style-name="T81">with </text:span>an explicit initializer.</text:p>
      <text:p text:style-name="P28">The placeholder type specifier shall not appear within the parameters of a function type derivation.</text:p>
      <text:p text:style-name="P24"><text:span text:style-name="T59">If the initializer is a </text:span><text:span text:style-name="T34">braced-</text:span><text:span text:style-name="T33">initializer</text:span><text:span text:style-name="T59"> </text:span><text:span text:style-name="T61">(6.7.10)</text:span><text:span text:style-name="T59">, </text:span><text:span text:style-name="T61">there shall be an explicit </text:span><text:span text:style-name="T34">initializer-list</text:span><text:span text:style-name="T45">, and </text:span><text:span text:style-name="T44">all</text:span><text:span text:style-name="T59"> elements of the </text:span><text:span text:style-name="T34">initializer-list</text:span><text:span text:style-name="T45"> </text:span><text:span text:style-name="T44">shall</text:span><text:span text:style-name="T59"> have </text:span><text:span text:style-name="T62">the same</text:span><text:span text:style-name="T59"> type </text:span><text:span text:style-name="T72">footnote)</text:span><text:span text:style-name="T59">.</text:span></text:p>
      <text:p text:style-name="P29">footnote) Compatible types need not be the same.</text:p>
      <text:p text:style-name="P25"><text:span text:style-name="T59">If the declaration declares more than one identifier, each declared identifier shall infer the same </text:span><text:span text:style-name="T33">inferred type</text:span><text:span text:style-name="T44"> for the placeholder type specifier.</text:span></text:p>
      <text:p text:style-name="P44">Semantics</text:p>
      <text:p text:style-name="P19"><text:span text:style-name="T65">If the initializer is an </text:span><text:span text:style-name="T35">assignment-expression</text:span><text:span text:style-name="T65">, t</text:span><text:span text:style-name="T59">he</text:span><text:span text:style-name="T65"> </text:span><text:span text:style-name="T60">type of the declared </text:span><text:span text:style-name="T64">identifier</text:span><text:span text:style-name="T60"> </text:span><text:span text:style-name="T59">is the type of the </text:span><text:span text:style-name="T63">initializer</text:span><text:span text:style-name="T59"> after lvalue, array to pointer or function to pointer conversion, additionally qualified by qualifiers and amended by attributes as they appear in the declaration specifiers, if any </text:span><text:span text:style-name="T71">177)</text:span><text:span text:style-name="T59">.</text:span></text:p>
      <text:p text:style-name="P23"><text:span text:style-name="T59">If the initializer is a </text:span><text:span text:style-name="T33">braced-initializer</text:span><text:span text:style-name="T59">, the</text:span><text:span text:style-name="T65"> type of the declared identifier</text:span><text:span text:style-name="T59"> is an array type, with an element type that is the type of the initializers of the initializer list </text:span><text:span text:style-name="T71">footnote)</text:span><text:span text:style-name="T74">.</text:span><text:span text:style-name="T59"> If a size is not provided in an array declarator, it is deduced according to the rules for an array of unknown size </text:span><text:span text:style-name="T63">(6.7.10)</text:span><text:span text:style-name="T59">.</text:span></text:p>
      <text:p text:style-name="P33"><text:span text:style-name="T59">footnote) No coercion or deduction of a common type is performed, as the type of all initializers in the list </text:span><text:span text:style-name="T82">is the same, </text:span><text:span text:style-name="T59">per the constraints.</text:span></text:p>
      <text:p text:style-name="P30">If the type specified for the declarator is a derived type constructed from the placeholder type, the type of the initializer shall <text:span text:style-name="T73">be </text:span><text:span text:style-name="T83">a type that can be</text:span><text:span text:style-name="T73"> constructed by</text:span> <text:span text:style-name="T83">an identical</text:span> <text:span text:style-name="T73">sequence of type derivations from a complete object type.</text:span></text:p>
      <text:p text:style-name="P32"><text:soft-page-break/>If the type specified for the declarator is such a derived type, the <text:span text:style-name="T30">inferred type</text:span><text:span text:style-name="T38"> designated by the placeholder type specifier is the corresponding complete object type from which the type of the initializer is constructed. Otherwise, the </text:span><text:span text:style-name="T30">inferred type</text:span><text:span text:style-name="T38"> is the unqualified type of the declared identifier.</text:span></text:p>
      <text:p text:style-name="Text_20_body">...<text:span text:style-name="T73">then continue 6.7.9 from “NOTE 1” with the rest of the current body.</text:span></text:p>
      <text:p text:style-name="P74">Modify the last sentence of (what is currently) paragraph 4:</text:p>
      <text:p text:style-name="Quotations">Note that the final type here is a pointer type<text:span text:style-name="T48">, </text:span><text:span text:style-name="T53">even though the declarator is not </text:span><text:span text:style-name="T10">*p</text:span>.</text:p>
      <text:p text:style-name="P75">Add a forward reference:</text:p>
      <text:p text:style-name="P22">Forward references:<text:span text:style-name="T59"> initialization (6.7.10).</text:span></text:p>
      <text:p text:style-name="P76">Add a two new examples after paragraph 9:</text:p>
      <text:p text:style-name="P35"><text:span text:style-name="T48">EXAMPLE 7</text:span> <text:s/>When <text:span text:style-name="T88">a variable</text:span> is declared with a derived placeholder type, the inferred type must match the derived-from type of the initializer:</text:p>
      <text:p text:style-name="P45"><text:tab/>auto x = 10; <text:s/>// no derivation from auto</text:p>
      <text:p text:style-name="P45"><text:tab/></text:p>
      <text:p text:style-name="P45"><text:tab/>auto * px1 = &amp;x; <text:s/>// valid, initializer is a pointer</text:p>
      <text:p text:style-name="P45"><text:tab/>auto const * px2 = &amp;x; <text:s/>// valid, const is not a derivation</text:p>
      <text:p text:style-name="P46"><text:tab/>auto * px3 = x; <text:s/>// <text:span text:style-name="T84">invalid</text:span>, x does not have pointer type</text:p>
      <text:p text:style-name="P45"><text:tab/></text:p>
      <text:p text:style-name="P45"><text:tab/>auto ** ppx1 = &amp;px1; <text:s/>// valid, initializer is a pointer to a pointer</text:p>
      <text:p text:style-name="P45"><text:tab/>auto const ** ppx2 = &amp;px2; <text:s/>// valid, initializer is a pointer to a pointer to const</text:p>
      <text:p text:style-name="P45"><text:tab/>auto const ** ppx3 = &amp;px1; <text:s/>// <text:span text:style-name="T84">invalid</text:span>, cannot convert to a pointer to pointer to const</text:p>
      <text:p text:style-name="P45"><text:tab/></text:p>
      <text:p text:style-name="P45"><text:tab/>int y[10] <text:span text:style-name="T75">= {}</text:span>;</text:p>
      <text:p text:style-name="P45"><text:tab/></text:p>
      <text:p text:style-name="P45"><text:tab/><text:span text:style-name="T75">auto * py1 = &amp;y; // valid, py1 has type int(*)[10]</text:span></text:p>
      <text:p text:style-name="P45"><text:tab/><text:span text:style-name="T75">auto * py2 = y; <text:s/>// valid, py2 has type int *</text:span></text:p>
      <text:p text:style-name="P45"><text:tab/><text:span text:style-name="T75">auto (*py3)[10] = &amp;y; <text:s/>// valid, pointer to auto[10] has same derivations as pointer to int[10]</text:span></text:p>
      <text:p text:style-name="P45"/>
      <text:p text:style-name="P45"><text:tab/><text:span text:style-name="T75">int f (int, float);</text:span></text:p>
      <text:p text:style-name="P45"><text:tab/><text:span text:style-name="T75">auto * pf1 = f; <text:s/>// valid</text:span></text:p>
      <text:p text:style-name="P45"><text:tab/><text:span text:style-name="T75">auto (*pf2)(int, float) = f; <text:s/>// valid, declared type derives from placeholder return type</text:span></text:p>
      <text:p text:style-name="P46"><text:tab/><text:span text:style-name="T75">int (*pf3)(auto, auto) = f; <text:s/>// </text:span><text:span text:style-name="T84">invalid</text:span><text:span text:style-name="T75">, cannot derive from placeholder parameter type</text:span></text:p>
      <text:p text:style-name="P53"/>
      <text:p text:style-name="P54"><text:span text:style-name="T48">EXAMPLE 8</text:span> <text:s/>When <text:span text:style-name="T88">a</text:span> <text:span text:style-name="T88">variable</text:span> is initialized with a braced-initializer, it has an array type inferred from the initializer elements.</text:p>
      <text:p text:style-name="P54"/>
      <text:p text:style-name="P47"><text:tab/>auto a1 = { 1, 2, 3 }; <text:s/>// type is int[3]</text:p>
      <text:p text:style-name="P47"><text:tab/>auto a2[] = { 1, 2 }; <text:s text:c="2"/>// type is int[2]</text:p>
      <text:p text:style-name="P47"><text:soft-page-break/><text:tab/>auto a3 = { 1 }; <text:s text:c="7"/>// type is int[1]</text:p>
      <text:p text:style-name="P48"><text:tab/>auto a4[] = {}; <text:s/>// <text:span text:style-name="T84">invalid</text:span>, must have an initializer</text:p>
      <text:p text:style-name="P47"/>
      <text:p text:style-name="P47"><text:tab/>auto a5[] = { [5] = 0 }; // type is int[6]</text:p>
      <text:p text:style-name="P48"><text:tab/>auto a6[3] = { [5] = 0 }; // <text:span text:style-name="T84">invalid, </text:span><text:span text:style-name="T86">[5] is not within the array</text:span></text:p>
      <text:p text:style-name="P48"><text:tab/>auto a7 = { 1u, 2, 3.0 }; // <text:span text:style-name="T84">invalid</text:span>, initializer types are not <text:span text:style-name="T85">the same</text:span></text:p>
      <text:p text:style-name="P55"/>
      <text:p text:style-name="P57"><text:span text:style-name="T48">EXAMPLE 9</text:span> <text:s/>When a declaration contains multiple identifiers to declare, the <text:span text:style-name="T30">inferred type</text:span><text:span text:style-name="T38"> for each declarator needs to be the same, but the final object type can be different.</text:span></text:p>
      <text:p text:style-name="P86"/>
      <text:p text:style-name="P87"><text:tab/>auto x = 10, y = 20; <text:s/>// valid, both the same</text:p>
      <text:p text:style-name="P87"><text:tab/>auto w = 10, *z = &amp;x; <text:s/>// valid, both infer int</text:p>
      <text:p text:style-name="P51"><text:span text:style-name="T38"><text:s text:c="28"/>// </text:span><text:span text:style-name="T41">even though object types are different</text:span></text:p>
      <text:p text:style-name="P87"><text:tab/></text:p>
      <text:p text:style-name="P87"><text:tab/>auto a = 5, b = 6.0; <text:s/>// invalid, infer different types</text:p>
      <text:p text:style-name="P52"><text:span text:style-name="T38"><text:tab/>auto *c = &amp;x, d = z; <text:s/>// invalid, inferring different types </text:span><text:span text:style-name="T42">(int and int*)</text:span></text:p>
      <text:p text:style-name="P88"><text:s text:c="27"/>// even though object types are the same</text:p>
      <text:p text:style-name="P87"/>
      <text:p text:style-name="Text_20_body"/>
      <text:p text:style-name="P77">Modify 6.8.5 “Iteration statements”, paragraph 3:</text:p>
      <text:p text:style-name="Quotations">The declaration part of a for statement shall only declare identifiers for objects <text:span text:style-name="T54">with</text:span><text:span text:style-name="T48"> </text:span><text:span text:style-name="T54">automatic storage duration</text:span><text:span text:style-name="T76">.</text:span></text:p>
      <text:p text:style-name="Text_20_body"/>
      <text:p text:style-name="P73">Modify 6.9 “External definitions”, second sentence of paragraph 2:</text:p>
      <text:p text:style-name="P34">The <text:span text:style-name="T1">auto</text:span> <text:span text:style-name="T48">specifier</text:span> shall only appear in the declaration specifiers in an external declaration if the <text:span text:style-name="T55">declaration is a definition</text:span><text:span text:style-name="T48"> </text:span><text:span text:style-name="T55">and the</text:span><text:span text:style-name="T77"> </text:span>type is inferred <text:span text:style-name="T55">from the initializer</text:span>.</text:p>
      <text:p text:style-name="P34"/>
      <text:p text:style-name="P73">Remove undefined behaviour (77).</text:p>
      <text:p text:style-name="P73">Remove J.5.11 “Type inference”.</text:p>
      <text:p text:style-name="P84">(as currently specified in the text provided above, all behaviours are well-defined; we might choose to make some elements of this specification undefined again to allow for extensions like <text:span text:style-name="T1">int (*f) (auto, auto) = ...</text:span>)</text:p>
      <text:h text:style-name="P3" text:outline-level="2">References</text:h>
      <text:p text:style-name="P60"><text:a xlink:type="simple" xlink:href="https://www.open-std.org/jtc1/sc22/wg14/www/docs/n2953.htm" text:style-name="Internet_20_link" text:visited-style-name="Visited_20_Internet_20_Link">N2953</text:a> 2022/04/10 Gustedt, Type inference for object definitions</text:p>
      <text:p text:style-name="P60"><text:a xlink:type="simple" xlink:href="https://www.open-std.org/jtc1/sc22/wg14/www/docs/n3054.pdf" text:style-name="Internet_20_link" text:visited-style-name="Visited_20_Internet_20_Link">N3054</text:a> 2022/09/03 Meneide, Programming languages — C</text:p>
      <text:p text:style-name="P60"><text:a xlink:type="simple" xlink:href="https://www.open-std.org/jtc1/sc22/wg14/www/docs/n3067.doc" text:style-name="Internet_20_link" text:visited-style-name="Visited_20_Internet_20_Link">N3067</text:a> 2022/12/21 Keaton, CD 9899 ballot comments</text:p>
      <text:p text:style-name="P61"><text:a xlink:type="simple" xlink:href="https://open-std.org/jtc1/sc22/wg21/docs/papers/2020/n4868.pdf" text:style-name="Internet_20_link" text:visited-style-name="Visited_20_Internet_20_Link"><text:span text:style-name="T79">N4868</text:span></text:a> C++20 <text:span text:style-name="T79">working draft</text:span></text:p>
      <text:p text:style-name="P61"/>
      <text:p text:style-name="P61"/>
      <text:h text:style-name="P9" text:outline-level="2">Acknowledgments</text:h>
      <text:p text:style-name="P85">Thanks to Jens Gustedt and Aaron Ballman for some quick-turnaround on very insightful review comments and additional wording sugges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21:17:15.220849184</meta:creation-date>
    <dc:date>2023-01-08T18:34:49.248079868</dc:date>
    <meta:editing-duration>PT2H41M59S</meta:editing-duration>
    <meta:editing-cycles>42</meta:editing-cycles>
    <meta:generator>LibreOffice/7.0.4.2$Linux_X86_64 LibreOffice_project/00$Build-2</meta:generator>
    <meta:document-statistic meta:table-count="0" meta:image-count="0" meta:object-count="0" meta:page-count="10" meta:paragraph-count="183" meta:word-count="2815" meta:character-count="17328" meta:non-whitespace-character-count="14494"/>
  </office:meta>
</office:document-meta>
</file>
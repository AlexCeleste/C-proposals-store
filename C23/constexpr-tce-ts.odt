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2">
      <style:text-properties officeooo:paragraph-rsid="00154398"/>
    </style:style>
    <style:style style:name="P2" style:family="paragraph" style:parent-style-name="Preformatted_20_Text">
      <style:text-properties officeooo:paragraph-rsid="00154398"/>
    </style:style>
    <style:style style:name="P3" style:family="paragraph" style:parent-style-name="Preformatted_20_Text">
      <style:paragraph-properties fo:margin-top="0cm" fo:margin-bottom="0.499cm" style:contextual-spacing="false"/>
      <style:text-properties officeooo:paragraph-rsid="00154398"/>
    </style:style>
    <style:style style:name="P4" style:family="paragraph" style:parent-style-name="Text_20_body">
      <style:text-properties officeooo:paragraph-rsid="00154398"/>
    </style:style>
    <style:style style:name="P5" style:family="paragraph" style:parent-style-name="Heading_20_2">
      <style:text-properties officeooo:rsid="00154398" officeooo:paragraph-rsid="00154398"/>
    </style:style>
    <style:style style:name="P6" style:family="paragraph" style:parent-style-name="Heading_20_2">
      <style:paragraph-properties fo:break-before="page"/>
      <style:text-properties officeooo:rsid="00154398" officeooo:paragraph-rsid="00154398"/>
    </style:style>
    <style:style style:name="P7" style:family="paragraph" style:parent-style-name="Text_20_body">
      <style:text-properties officeooo:rsid="00154398" officeooo:paragraph-rsid="00154398"/>
    </style:style>
    <style:style style:name="P8" style:family="paragraph" style:parent-style-name="Heading_20_2">
      <style:paragraph-properties fo:break-before="page"/>
      <style:text-properties officeooo:rsid="0015da65" officeooo:paragraph-rsid="0015da65"/>
    </style:style>
    <style:style style:name="P9" style:family="paragraph" style:parent-style-name="Text_20_body">
      <style:text-properties officeooo:rsid="0015da65" officeooo:paragraph-rsid="0015da65"/>
    </style:style>
    <style:style style:name="P10" style:family="paragraph" style:parent-style-name="Text_20_body">
      <style:text-properties officeooo:rsid="001b5644" officeooo:paragraph-rsid="001b5644"/>
    </style:style>
    <style:style style:name="P11" style:family="paragraph" style:parent-style-name="Text_20_body">
      <style:text-properties officeooo:rsid="002017da" officeooo:paragraph-rsid="0021a719"/>
    </style:style>
    <style:style style:name="P12" style:family="paragraph" style:parent-style-name="Text_20_body">
      <style:text-properties officeooo:rsid="002017da" officeooo:paragraph-rsid="002fae8c"/>
    </style:style>
    <style:style style:name="P13" style:family="paragraph" style:parent-style-name="Text_20_body">
      <style:text-properties officeooo:rsid="002017da" officeooo:paragraph-rsid="002fd2a9"/>
    </style:style>
    <style:style style:name="P14" style:family="paragraph" style:parent-style-name="Text_20_body">
      <style:text-properties officeooo:rsid="00267e84" officeooo:paragraph-rsid="00267e84"/>
    </style:style>
    <style:style style:name="P15" style:family="paragraph" style:parent-style-name="Text_20_body">
      <style:text-properties officeooo:rsid="002b17d0" officeooo:paragraph-rsid="002b17d0"/>
    </style:style>
    <style:style style:name="P16" style:family="paragraph" style:parent-style-name="Preformatted_20_Text">
      <style:paragraph-properties fo:margin-left="1cm" fo:margin-right="1cm" fo:text-indent="0cm" style:auto-text-indent="false"/>
      <style:text-properties officeooo:paragraph-rsid="002fd2a9"/>
    </style:style>
    <style:style style:name="P17" style:family="paragraph" style:parent-style-name="Preformatted_20_Text">
      <style:paragraph-properties fo:margin-left="1cm" fo:margin-right="1cm" fo:margin-top="0cm" fo:margin-bottom="0.499cm" style:contextual-spacing="false" fo:text-indent="0cm" style:auto-text-indent="false"/>
      <style:text-properties officeooo:paragraph-rsid="002fd2a9"/>
    </style:style>
    <style:style style:name="P18" style:family="paragraph" style:parent-style-name="Quotations">
      <style:text-properties officeooo:paragraph-rsid="002fd2a9"/>
    </style:style>
    <style:style style:name="P19" style:family="paragraph" style:parent-style-name="Text_20_body">
      <style:text-properties officeooo:paragraph-rsid="002fd2a9"/>
    </style:style>
    <style:style style:name="P20" style:family="paragraph" style:parent-style-name="Preformatted_20_Text">
      <style:paragraph-properties fo:margin-left="1cm" fo:margin-right="1cm" fo:text-indent="0cm" style:auto-text-indent="false"/>
      <style:text-properties officeooo:paragraph-rsid="0032016a"/>
    </style:style>
    <style:style style:name="P21" style:family="paragraph" style:parent-style-name="Preformatted_20_Text">
      <style:paragraph-properties fo:margin-left="1cm" fo:margin-right="1cm" fo:margin-top="0cm" fo:margin-bottom="0.499cm" style:contextual-spacing="false" fo:text-indent="0cm" style:auto-text-indent="false"/>
      <style:text-properties officeooo:paragraph-rsid="00313eb0"/>
    </style:style>
    <style:style style:name="P22" style:family="paragraph" style:parent-style-name="Quotations">
      <style:paragraph-properties fo:margin-top="0cm" fo:margin-bottom="0cm" style:contextual-spacing="false" fo:line-height="100%"/>
      <style:text-properties fo:font-weight="bold" officeooo:paragraph-rsid="002017da" style:font-weight-asian="bold" style:font-weight-complex="bold"/>
    </style:style>
    <style:style style:name="P23" style:family="paragraph" style:parent-style-name="Preformatted_20_Text">
      <style:text-properties fo:font-weight="bold" officeooo:paragraph-rsid="006a8811" style:font-weight-asian="bold" style:font-weight-complex="bold"/>
    </style:style>
    <style:style style:name="P24" style:family="paragraph" style:parent-style-name="Quotations">
      <style:text-properties fo:font-weight="bold" officeooo:rsid="00570efb" officeooo:paragraph-rsid="00570efb" style:font-weight-asian="bold" style:font-weight-complex="bold"/>
    </style:style>
    <style:style style:name="P25" style:family="paragraph" style:parent-style-name="Quotations">
      <style:text-properties officeooo:paragraph-rsid="002017da"/>
    </style:style>
    <style:style style:name="P26" style:family="paragraph" style:parent-style-name="Text_20_body">
      <style:text-properties officeooo:paragraph-rsid="002017da"/>
    </style:style>
    <style:style style:name="P27" style:family="paragraph" style:parent-style-name="Quotations">
      <style:text-properties officeooo:rsid="00187873" officeooo:paragraph-rsid="002fd2a9"/>
    </style:style>
    <style:style style:name="P28" style:family="paragraph" style:parent-style-name="Quotations">
      <style:text-properties officeooo:rsid="00187873" officeooo:paragraph-rsid="00751198"/>
    </style:style>
    <style:style style:name="P29" style:family="paragraph" style:parent-style-name="Quotations">
      <style:paragraph-properties fo:margin-top="0cm" fo:margin-bottom="0.499cm" style:contextual-spacing="false" fo:line-height="100%"/>
      <style:text-properties officeooo:paragraph-rsid="002017da"/>
    </style:style>
    <style:style style:name="P30" style:family="paragraph" style:parent-style-name="Text_20_body">
      <style:text-properties officeooo:rsid="0015ff56" officeooo:paragraph-rsid="0015ff56"/>
    </style:style>
    <style:style style:name="P31" style:family="paragraph" style:parent-style-name="Text_20_body">
      <style:text-properties officeooo:rsid="0015ff56" officeooo:paragraph-rsid="00267e84"/>
    </style:style>
    <style:style style:name="P32" style:family="paragraph" style:parent-style-name="Text_20_body">
      <style:text-properties officeooo:paragraph-rsid="0015ff56"/>
    </style:style>
    <style:style style:name="P33" style:family="paragraph" style:parent-style-name="Text_20_body">
      <style:text-properties officeooo:rsid="0018987d" officeooo:paragraph-rsid="0018987d"/>
    </style:style>
    <style:style style:name="P34" style:family="paragraph" style:parent-style-name="Text_20_body">
      <style:text-properties officeooo:rsid="001c4c6d" officeooo:paragraph-rsid="001c4c6d"/>
    </style:style>
    <style:style style:name="P35" style:family="paragraph" style:parent-style-name="Text_20_body">
      <style:text-properties officeooo:paragraph-rsid="001d6059"/>
    </style:style>
    <style:style style:name="P36" style:family="paragraph" style:parent-style-name="Text_20_body">
      <style:text-properties officeooo:rsid="001df183" officeooo:paragraph-rsid="001df183"/>
    </style:style>
    <style:style style:name="P37" style:family="paragraph" style:parent-style-name="Text_20_body">
      <style:text-properties officeooo:rsid="001df183" officeooo:paragraph-rsid="0050ab36"/>
    </style:style>
    <style:style style:name="P38" style:family="paragraph" style:parent-style-name="Text_20_body">
      <style:text-properties officeooo:rsid="000a7f4f" officeooo:paragraph-rsid="002017da"/>
    </style:style>
    <style:style style:name="P39" style:family="paragraph" style:parent-style-name="Text_20_body">
      <style:text-properties officeooo:rsid="0036ffc1" officeooo:paragraph-rsid="002017da"/>
    </style:style>
    <style:style style:name="P40" style:family="paragraph" style:parent-style-name="Text_20_body">
      <style:text-properties officeooo:rsid="0024b1ce" officeooo:paragraph-rsid="0024b1ce"/>
    </style:style>
    <style:style style:name="P41" style:family="paragraph" style:parent-style-name="Text_20_body">
      <style:text-properties officeooo:paragraph-rsid="00267e84"/>
    </style:style>
    <style:style style:name="P42" style:family="paragraph" style:parent-style-name="Text_20_body">
      <style:text-properties officeooo:rsid="00287cab" officeooo:paragraph-rsid="00287cab"/>
    </style:style>
    <style:style style:name="P43" style:family="paragraph" style:parent-style-name="Text_20_body">
      <style:text-properties officeooo:rsid="0029ad61" officeooo:paragraph-rsid="0029ad61"/>
    </style:style>
    <style:style style:name="P44" style:family="paragraph" style:parent-style-name="Text_20_body">
      <style:text-properties officeooo:rsid="0011fe2d" officeooo:paragraph-rsid="002c2ff5"/>
    </style:style>
    <style:style style:name="P45" style:family="paragraph" style:parent-style-name="Text_20_body">
      <style:text-properties officeooo:rsid="002c2ff5" officeooo:paragraph-rsid="002c2ff5"/>
    </style:style>
    <style:style style:name="P46" style:family="paragraph" style:parent-style-name="Text_20_body">
      <style:text-properties officeooo:rsid="002cb31b" officeooo:paragraph-rsid="002cb31b"/>
    </style:style>
    <style:style style:name="P47" style:family="paragraph" style:parent-style-name="Text_20_body">
      <style:text-properties officeooo:paragraph-rsid="00337b5c"/>
    </style:style>
    <style:style style:name="P48" style:family="paragraph" style:parent-style-name="Text_20_body">
      <style:text-properties officeooo:rsid="00399703" officeooo:paragraph-rsid="00399703"/>
    </style:style>
    <style:style style:name="P49" style:family="paragraph" style:parent-style-name="Preformatted_20_Text">
      <style:text-properties officeooo:paragraph-rsid="006a8811"/>
    </style:style>
    <style:style style:name="P50" style:family="paragraph" style:parent-style-name="Quotations">
      <style:text-properties officeooo:paragraph-rsid="006a8811"/>
    </style:style>
    <style:style style:name="P51" style:family="paragraph" style:parent-style-name="Text_20_body">
      <style:text-properties officeooo:paragraph-rsid="006a8811"/>
    </style:style>
    <style:style style:name="P52" style:family="paragraph" style:parent-style-name="Quotations">
      <style:text-properties officeooo:paragraph-rsid="00569bcd"/>
    </style:style>
    <style:style style:name="P53" style:family="paragraph" style:parent-style-name="Quotations">
      <style:text-properties officeooo:paragraph-rsid="00583e83"/>
    </style:style>
    <style:style style:name="P54" style:family="paragraph" style:parent-style-name="Quotations">
      <style:text-properties officeooo:paragraph-rsid="0021a85e"/>
    </style:style>
    <style:style style:name="P55" style:family="paragraph" style:parent-style-name="Quotations">
      <style:text-properties fo:font-size="10pt" officeooo:rsid="0070e0fe" officeooo:paragraph-rsid="0070e0fe" style:font-size-asian="10pt" style:font-size-complex="10pt"/>
    </style:style>
    <style:style style:name="P56" style:family="paragraph" style:parent-style-name="Quotations">
      <style:text-properties fo:font-size="10pt" officeooo:rsid="007235f9" officeooo:paragraph-rsid="007235f9" style:font-size-asian="10pt" style:font-size-complex="10pt"/>
    </style:style>
    <style:style style:name="P57" style:family="paragraph" style:parent-style-name="Quotations">
      <style:text-properties officeooo:paragraph-rsid="0070e0fe"/>
    </style:style>
    <style:style style:name="P58" style:family="paragraph" style:parent-style-name="Quotations">
      <style:text-properties officeooo:rsid="0019bc37" officeooo:paragraph-rsid="002fd2a9"/>
    </style:style>
    <style:style style:name="P59" style:family="paragraph" style:parent-style-name="Quotations">
      <style:text-properties officeooo:rsid="007235f9" officeooo:paragraph-rsid="00751198"/>
    </style:style>
    <style:style style:name="P60" style:family="paragraph" style:parent-style-name="Text_20_body">
      <style:text-properties fo:font-style="normal" officeooo:rsid="002017da" officeooo:paragraph-rsid="002017da" style:font-style-asian="normal" style:font-style-complex="normal"/>
    </style:style>
    <style:style style:name="P61" style:family="paragraph" style:parent-style-name="Text_20_body">
      <style:text-properties officeooo:paragraph-rsid="0018987d"/>
    </style:style>
    <style:style style:name="P62" style:family="paragraph" style:parent-style-name="Text_20_body">
      <style:text-properties officeooo:paragraph-rsid="0021a719"/>
    </style:style>
    <style:style style:name="P63" style:family="paragraph" style:parent-style-name="Text_20_body">
      <style:text-properties officeooo:rsid="003df064" officeooo:paragraph-rsid="003df064"/>
    </style:style>
    <style:style style:name="P64" style:family="paragraph" style:parent-style-name="Text_20_body">
      <style:text-properties officeooo:rsid="0049fe25" officeooo:paragraph-rsid="0049fe25"/>
    </style:style>
    <style:style style:name="P65" style:family="paragraph" style:parent-style-name="Text_20_body">
      <style:text-properties officeooo:rsid="001f357b" officeooo:paragraph-rsid="004bd915"/>
    </style:style>
    <style:style style:name="P66" style:family="paragraph" style:parent-style-name="Text_20_body">
      <style:text-properties officeooo:rsid="001f357b" officeooo:paragraph-rsid="00537302"/>
    </style:style>
    <style:style style:name="P67" style:family="paragraph" style:parent-style-name="Text_20_body">
      <style:text-properties officeooo:rsid="00570efb" officeooo:paragraph-rsid="00570efb"/>
    </style:style>
    <style:style style:name="P68" style:family="paragraph" style:parent-style-name="Text_20_body">
      <style:text-properties officeooo:paragraph-rsid="0067b718"/>
    </style:style>
    <style:style style:name="P69" style:family="paragraph" style:parent-style-name="Text_20_body">
      <style:text-properties officeooo:rsid="006d4037" officeooo:paragraph-rsid="006d4037"/>
    </style:style>
    <style:style style:name="P70" style:family="paragraph" style:parent-style-name="Text_20_body">
      <style:text-properties officeooo:rsid="001867ac" officeooo:paragraph-rsid="002c2ff5"/>
    </style:style>
    <style:style style:name="P71" style:family="paragraph" style:parent-style-name="Heading_20_3">
      <style:text-properties officeooo:rsid="001b5644" officeooo:paragraph-rsid="001b5644"/>
    </style:style>
    <style:style style:name="P72" style:family="paragraph" style:parent-style-name="Heading_20_3">
      <style:text-properties officeooo:rsid="001d6059" officeooo:paragraph-rsid="001d6059"/>
    </style:style>
    <style:style style:name="P73" style:family="paragraph" style:parent-style-name="Heading_20_3">
      <style:text-properties officeooo:rsid="002017da" officeooo:paragraph-rsid="002017da"/>
    </style:style>
    <style:style style:name="P74" style:family="paragraph" style:parent-style-name="Heading_20_3">
      <style:text-properties style:font-name="Liberation Serif" fo:font-size="14pt" style:font-size-asian="14pt" style:font-size-complex="14pt"/>
    </style:style>
    <style:style style:name="P75" style:family="paragraph" style:parent-style-name="Heading_20_3">
      <style:text-properties officeooo:rsid="00267e84" officeooo:paragraph-rsid="00267e84"/>
    </style:style>
    <style:style style:name="P76" style:family="paragraph" style:parent-style-name="Heading_20_3">
      <style:text-properties officeooo:rsid="00279188" officeooo:paragraph-rsid="00279188"/>
    </style:style>
    <style:style style:name="P77" style:family="paragraph" style:parent-style-name="Heading_20_3">
      <style:text-properties officeooo:rsid="002b17d0" officeooo:paragraph-rsid="002b17d0"/>
    </style:style>
    <style:style style:name="P78" style:family="paragraph" style:parent-style-name="Heading_20_3">
      <style:paragraph-properties fo:margin-left="1cm" fo:margin-right="1cm" fo:text-indent="0cm" style:auto-text-indent="false"/>
      <style:text-properties officeooo:paragraph-rsid="002fd2a9"/>
    </style:style>
    <style:style style:name="P79" style:family="paragraph" style:parent-style-name="Quotations" style:list-style-name="L3">
      <style:paragraph-properties fo:margin-top="0cm" fo:margin-bottom="0cm" style:contextual-spacing="false"/>
      <style:text-properties officeooo:paragraph-rsid="002017da"/>
    </style:style>
    <style:style style:name="P80" style:family="paragraph" style:parent-style-name="Quotations" style:list-style-name="L3">
      <style:text-properties officeooo:paragraph-rsid="002017da"/>
    </style:style>
    <style:style style:name="P81" style:family="paragraph" style:parent-style-name="Quotations" style:list-style-name="L3">
      <style:paragraph-properties fo:margin-left="0cm" fo:margin-right="1cm" fo:text-indent="0cm" style:auto-text-indent="false"/>
      <style:text-properties officeooo:paragraph-rsid="002017da"/>
    </style:style>
    <style:style style:name="P82" style:family="paragraph" style:parent-style-name="Quotations" style:list-style-name="L3">
      <style:paragraph-properties fo:margin-left="0cm" fo:margin-right="1cm" fo:text-indent="0cm" style:auto-text-indent="false"/>
      <style:text-properties officeooo:paragraph-rsid="00616844"/>
    </style:style>
    <style:style style:name="P83" style:family="paragraph" style:parent-style-name="Quotations" style:list-style-name="L3">
      <style:paragraph-properties fo:margin-top="0cm" fo:margin-bottom="0cm" style:contextual-spacing="false"/>
      <style:text-properties fo:font-weight="bold" officeooo:rsid="005bdcef" officeooo:paragraph-rsid="005bdcef" style:font-weight-asian="bold" style:font-weight-complex="bold"/>
    </style:style>
    <style:style style:name="P84" style:family="paragraph" style:parent-style-name="Text_20_body" style:list-style-name="L1">
      <style:text-properties officeooo:rsid="0015ff56" officeooo:paragraph-rsid="0015ff56"/>
    </style:style>
    <style:style style:name="P85" style:family="paragraph" style:parent-style-name="Text_20_body" style:list-style-name="L1">
      <style:text-properties officeooo:rsid="001745c7" officeooo:paragraph-rsid="001745c7"/>
    </style:style>
    <style:style style:name="P86" style:family="paragraph" style:parent-style-name="Text_20_body" style:list-style-name="L2">
      <style:paragraph-properties fo:margin-top="0cm" fo:margin-bottom="0cm" style:contextual-spacing="false"/>
      <style:text-properties officeooo:paragraph-rsid="001d6059"/>
    </style:style>
    <style:style style:name="P87" style:family="paragraph" style:parent-style-name="Text_20_body" style:list-style-name="L2">
      <style:paragraph-properties fo:margin-top="0cm" fo:margin-bottom="0cm" style:contextual-spacing="false"/>
      <style:text-properties officeooo:rsid="004ce322" officeooo:paragraph-rsid="004ce322"/>
    </style:style>
    <style:style style:name="P88" style:family="paragraph" style:parent-style-name="Text_20_body" style:list-style-name="L2">
      <style:text-properties officeooo:rsid="004ce322" officeooo:paragraph-rsid="004ce322"/>
    </style:style>
    <style:style style:name="P89" style:family="paragraph" style:parent-style-name="Text_20_body" style:list-style-name="L4">
      <style:text-properties officeooo:rsid="00267e84" officeooo:paragraph-rsid="00267e84"/>
    </style:style>
    <style:style style:name="T1" style:family="text">
      <style:text-properties fo:language="en" fo:country="GB"/>
    </style:style>
    <style:style style:name="T2" style:family="text">
      <style:text-properties fo:language="en" fo:country="GB" officeooo:rsid="00154398"/>
    </style:style>
    <style:style style:name="T3" style:family="text">
      <style:text-properties fo:language="en" fo:country="GB" officeooo:rsid="003a35db"/>
    </style:style>
    <style:style style:name="T4" style:family="text">
      <style:text-properties fo:language="en" fo:country="GB" officeooo:rsid="006d4037"/>
    </style:style>
    <style:style style:name="T5" style:family="text">
      <style:text-properties fo:language="en" fo:country="GB" officeooo:rsid="006e53ab"/>
    </style:style>
    <style:style style:name="T6" style:family="text">
      <style:text-properties fo:language="en" fo:country="GB" officeooo:rsid="00786c7c"/>
    </style:style>
    <style:style style:name="T7" style:family="text">
      <style:text-properties style:font-name="Liberation Mono"/>
    </style:style>
    <style:style style:name="T8" style:family="text">
      <style:text-properties style:font-name="Liberation Mono" fo:font-size="10pt" fo:language="en" fo:country="GB" officeooo:rsid="00154398" style:font-name-asian="Liberation Mono" style:font-size-asian="10pt" style:font-name-complex="Liberation Mono" style:font-size-complex="10pt"/>
    </style:style>
    <style:style style:name="T9" style:family="text">
      <style:text-properties style:font-name="Liberation Mono" fo:font-size="10pt" fo:language="en" fo:country="GB" officeooo:rsid="003a35db" style:font-name-asian="Liberation Mono" style:font-size-asian="10pt" style:font-name-complex="Liberation Mono" style:font-size-complex="10pt"/>
    </style:style>
    <style:style style:name="T10" style:family="text">
      <style:text-properties style:font-name="Liberation Mono" fo:font-size="10pt" fo:language="en" fo:country="GB" officeooo:rsid="00786c7c" style:font-name-asian="Liberation Mono" style:font-size-asian="10pt" style:font-name-complex="Liberation Mono" style:font-size-complex="10pt"/>
    </style:style>
    <style:style style:name="T11" style:family="text">
      <style:text-properties style:font-name="Liberation Mono" fo:font-size="10pt" officeooo:rsid="0024de74" style:font-size-asian="10pt" style:font-size-complex="10pt"/>
    </style:style>
    <style:style style:name="T12" style:family="text">
      <style:text-properties style:font-name="Liberation Mono" fo:font-size="10pt" officeooo:rsid="0026c3f5" style:font-size-asian="10pt" style:font-size-complex="10pt"/>
    </style:style>
    <style:style style:name="T13" style:family="text">
      <style:text-properties style:font-name="Liberation Mono" fo:font-size="10pt" officeooo:rsid="0019ddfd" style:font-size-asian="10pt" style:font-size-complex="10pt"/>
    </style:style>
    <style:style style:name="T14" style:family="text">
      <style:text-properties style:font-name="Liberation Mono" fo:font-size="12pt" officeooo:rsid="000a7f4f" style:font-size-asian="12pt" style:font-size-complex="12pt"/>
    </style:style>
    <style:style style:name="T15" style:family="text">
      <style:text-properties style:font-name="Liberation Mono" fo:font-style="normal" style:font-style-asian="normal" style:font-style-complex="normal"/>
    </style:style>
    <style:style style:name="T16" style:family="text">
      <style:text-properties style:font-name="Liberation Mono" fo:font-style="normal" officeooo:rsid="0051c4f4" style:font-style-asian="normal" style:font-style-complex="normal"/>
    </style:style>
    <style:style style:name="T17" style:family="text">
      <style:text-properties style:font-name="Liberation Mono" fo:font-style="normal" officeooo:rsid="006ccae7" style:font-style-asian="normal" style:font-style-complex="normal"/>
    </style:style>
    <style:style style:name="T18" style:family="text">
      <style:text-properties style:font-name="Liberation Mono" fo:font-style="normal" fo:font-weight="normal" style:font-style-asian="normal" style:font-weight-asian="normal" style:font-style-complex="normal" style:font-weight-complex="normal"/>
    </style:style>
    <style:style style:name="T19" style:family="text">
      <style:text-properties style:font-name="Liberation Mono" fo:font-style="normal" fo:font-weight="normal" officeooo:rsid="002cb31b" style:font-style-asian="normal" style:font-weight-asian="normal" style:font-style-complex="normal" style:font-weight-complex="normal"/>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0259d35" style:font-weight-asian="bold" style:font-weight-complex="bold"/>
    </style:style>
    <style:style style:name="T22" style:family="text">
      <style:text-properties style:font-name="Liberation Mono" fo:font-weight="bold" officeooo:rsid="0026c3f5" style:font-weight-asian="bold" style:font-weight-complex="bold"/>
    </style:style>
    <style:style style:name="T23" style:family="text">
      <style:text-properties style:font-name="Liberation Mono" fo:font-weight="bold" officeooo:rsid="002c9e2e" style:font-weight-asian="bold" style:font-weight-complex="bold"/>
    </style:style>
    <style:style style:name="T24" style:family="text">
      <style:text-properties style:font-name="Liberation Mono" officeooo:rsid="00217b35"/>
    </style:style>
    <style:style style:name="T25" style:family="text">
      <style:text-properties style:font-name="Liberation Mono" officeooo:rsid="001e749e"/>
    </style:style>
    <style:style style:name="T26" style:family="text">
      <style:text-properties style:font-name="Liberation Mono" officeooo:rsid="001c4c6d"/>
    </style:style>
    <style:style style:name="T27" style:family="text">
      <style:text-properties style:font-name="Liberation Mono" officeooo:rsid="001d6059"/>
    </style:style>
    <style:style style:name="T28" style:family="text">
      <style:text-properties style:font-name="Liberation Mono" officeooo:rsid="001f357b"/>
    </style:style>
    <style:style style:name="T29" style:family="text">
      <style:text-properties style:font-name="Liberation Mono" officeooo:rsid="002017da"/>
    </style:style>
    <style:style style:name="T30" style:family="text">
      <style:text-properties style:font-name="Liberation Mono" officeooo:rsid="0021a719"/>
    </style:style>
    <style:style style:name="T31" style:family="text">
      <style:text-properties style:font-name="Liberation Mono" officeooo:rsid="003a35db"/>
    </style:style>
    <style:style style:name="T32" style:family="text">
      <style:text-properties style:font-name="Liberation Mono" officeooo:rsid="0044e01c"/>
    </style:style>
    <style:style style:name="T33" style:family="text">
      <style:text-properties style:font-name="Liberation Mono" officeooo:rsid="00467176"/>
    </style:style>
    <style:style style:name="T34" style:family="text">
      <style:text-properties style:font-name="Liberation Mono" officeooo:rsid="00537302"/>
    </style:style>
    <style:style style:name="T35" style:family="text">
      <style:text-properties style:font-name="Liberation Mono" fo:font-weight="normal" style:font-weight-asian="normal" style:font-weight-complex="normal"/>
    </style:style>
    <style:style style:name="T36" style:family="text">
      <style:text-properties style:font-name="Liberation Mono" officeooo:rsid="0067b718"/>
    </style:style>
    <style:style style:name="T37" style:family="text">
      <style:text-properties fo:font-size="10pt" style:font-size-asian="10pt" style:font-size-complex="10pt"/>
    </style:style>
    <style:style style:name="T38" style:family="text">
      <style:text-properties fo:font-size="10pt" officeooo:rsid="00616844" style:font-size-asian="10pt" style:font-size-complex="10pt"/>
    </style:style>
    <style:style style:name="T39" style:family="text">
      <style:text-properties fo:font-size="10pt" officeooo:rsid="0019ddfd" style:font-size-asian="10pt" style:font-size-complex="10pt"/>
    </style:style>
    <style:style style:name="T40" style:family="text">
      <style:text-properties fo:font-size="10pt" officeooo:rsid="005dac9f" style:font-size-asian="10pt" style:font-size-complex="10pt"/>
    </style:style>
    <style:style style:name="T41" style:family="text">
      <style:text-properties fo:font-size="10pt" officeooo:rsid="0024de74" style:font-size-asian="10pt" style:font-size-complex="10pt"/>
    </style:style>
    <style:style style:name="T42" style:family="text">
      <style:text-properties fo:font-size="10pt" officeooo:rsid="0026c3f5" style:font-size-asian="10pt" style:font-size-complex="10pt"/>
    </style:style>
    <style:style style:name="T43" style:family="text">
      <style:text-properties fo:font-size="10pt" officeooo:rsid="00583e83" style:font-size-asian="10pt" style:font-size-complex="10pt"/>
    </style:style>
    <style:style style:name="T44" style:family="text">
      <style:text-properties fo:font-size="10pt" officeooo:rsid="00569bcd" style:font-size-asian="10pt" style:font-size-complex="10pt"/>
    </style:style>
    <style:style style:name="T45" style:family="text">
      <style:text-properties fo:font-size="10pt" officeooo:rsid="006fe7ae" style:font-size-asian="10pt" style:font-size-complex="10pt"/>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0pt" fo:font-weight="bold" officeooo:rsid="0024de74" style:font-size-asian="10pt" style:font-weight-asian="bold" style:font-size-complex="10pt" style:font-weight-complex="bold"/>
    </style:style>
    <style:style style:name="T48" style:family="text">
      <style:text-properties fo:font-size="10pt" fo:font-weight="bold" officeooo:rsid="0026c3f5" style:font-size-asian="10pt" style:font-weight-asian="bold" style:font-size-complex="10pt" style:font-weight-complex="bold"/>
    </style:style>
    <style:style style:name="T49" style:family="text">
      <style:text-properties fo:font-size="10pt" fo:font-weight="bold" officeooo:rsid="006fe7ae" style:font-size-asian="10pt" style:font-weight-asian="bold" style:font-size-complex="10pt" style:font-weight-complex="bold"/>
    </style:style>
    <style:style style:name="T50" style:family="text">
      <style:text-properties fo:font-size="10pt" fo:font-style="italic" officeooo:rsid="006020bf" style:font-size-asian="10pt" style:font-style-asian="italic" style:font-size-complex="10pt" style:font-style-complex="italic"/>
    </style:style>
    <style:style style:name="T51" style:family="text">
      <style:text-properties fo:font-size="10pt" fo:font-style="italic" officeooo:rsid="0019ddfd" style:font-size-asian="10pt" style:font-style-asian="italic" style:font-size-complex="10pt" style:font-style-complex="italic"/>
    </style:style>
    <style:style style:name="T52" style:family="text">
      <style:text-properties fo:font-size="10pt" fo:font-style="normal" officeooo:rsid="006020bf" style:font-size-asian="10pt" style:font-style-asian="normal" style:font-size-complex="10pt" style:font-style-complex="normal"/>
    </style:style>
    <style:style style:name="T53" style:family="text">
      <style:text-properties officeooo:rsid="0015da65"/>
    </style:style>
    <style:style style:name="T54" style:family="text">
      <style:text-properties style:font-name="Liberation Serif" fo:font-size="14pt" fo:font-weight="bold" officeooo:rsid="001df183" style:font-name-asian="DejaVu Sans" style:font-size-asian="12.25pt" style:font-weight-asian="bold" style:font-name-complex="DejaVu Sans" style:font-size-complex="14pt" style:font-weight-complex="bold"/>
    </style:style>
    <style:style style:name="T55" style:family="text">
      <style:text-properties style:font-name="Liberation Serif" fo:font-size="18pt" fo:font-weight="bold" officeooo:rsid="001b5644" style:font-name-asian="DejaVu Sans" style:font-size-asian="18pt" style:font-weight-asian="bold" style:font-name-complex="DejaVu Sans" style:font-size-complex="18pt" style:font-weight-complex="bold"/>
    </style:style>
    <style:style style:name="T56" style:family="text">
      <style:text-properties style:font-name="Liberation Serif" officeooo:rsid="0019bc37"/>
    </style:style>
    <style:style style:name="T57" style:family="text">
      <style:text-properties style:font-name="Liberation Serif" officeooo:rsid="001b59ac"/>
    </style:style>
    <style:style style:name="T58" style:family="text">
      <style:text-properties style:font-name="Liberation Serif" officeooo:rsid="001b59ac" style:font-name-asian="Liberation Mono" style:font-name-complex="Liberation Mono"/>
    </style:style>
    <style:style style:name="T59" style:family="text">
      <style:text-properties style:font-name="Liberation Serif" fo:font-weight="bold" style:font-weight-asian="bold" style:font-weight-complex="bold"/>
    </style:style>
    <style:style style:name="T60" style:family="text">
      <style:text-properties officeooo:rsid="001745c7"/>
    </style:style>
    <style:style style:name="T61" style:family="text">
      <style:text-properties officeooo:rsid="001773de"/>
    </style:style>
    <style:style style:name="T62" style:family="text">
      <style:text-properties officeooo:rsid="0018987d"/>
    </style:style>
    <style:style style:name="T63" style:family="text">
      <style:text-properties fo:font-style="italic" style:font-style-asian="italic" style:font-style-complex="italic"/>
    </style:style>
    <style:style style:name="T64" style:family="text">
      <style:text-properties fo:font-style="italic" officeooo:rsid="001d6059" style:font-style-asian="italic" style:font-style-complex="italic"/>
    </style:style>
    <style:style style:name="T65" style:family="text">
      <style:text-properties fo:font-style="italic" officeooo:rsid="001df183" style:font-style-asian="italic" style:font-style-complex="italic"/>
    </style:style>
    <style:style style:name="T66" style:family="text">
      <style:text-properties fo:font-style="italic" officeooo:rsid="00187873" style:font-style-asian="italic" style:font-style-complex="italic"/>
    </style:style>
    <style:style style:name="T67" style:family="text">
      <style:text-properties fo:font-style="italic" officeooo:rsid="001c919a" style:font-style-asian="italic" style:font-style-complex="italic"/>
    </style:style>
    <style:style style:name="T68" style:family="text">
      <style:text-properties fo:font-style="italic" officeooo:rsid="002cb31b" style:font-style-asian="italic" style:font-style-complex="italic"/>
    </style:style>
    <style:style style:name="T69" style:family="text">
      <style:text-properties fo:font-style="italic" officeooo:rsid="001f357b" style:font-style-asian="italic" style:font-style-complex="italic"/>
    </style:style>
    <style:style style:name="T70" style:family="text">
      <style:text-properties fo:font-style="italic" officeooo:rsid="004eb124" style:font-style-asian="italic" style:font-style-complex="italic"/>
    </style:style>
    <style:style style:name="T71" style:family="text">
      <style:text-properties fo:font-style="italic" officeooo:rsid="00569bcd" style:font-style-asian="italic" style:font-style-complex="italic"/>
    </style:style>
    <style:style style:name="T72" style:family="text">
      <style:text-properties fo:font-style="italic" officeooo:rsid="006020bf" style:font-style-asian="italic" style:font-style-complex="italic"/>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officeooo:rsid="0019bae9"/>
    </style:style>
    <style:style style:name="T75" style:family="text">
      <style:text-properties officeooo:rsid="001c4c6d"/>
    </style:style>
    <style:style style:name="T76" style:family="text">
      <style:text-properties officeooo:rsid="001d6059"/>
    </style:style>
    <style:style style:name="T77" style:family="text">
      <style:text-properties officeooo:rsid="001df183"/>
    </style:style>
    <style:style style:name="T78" style:family="text">
      <style:text-properties fo:font-style="normal" style:font-style-asian="normal" style:font-style-complex="normal"/>
    </style:style>
    <style:style style:name="T79" style:family="text">
      <style:text-properties fo:font-style="normal" officeooo:rsid="001df183" style:font-style-asian="normal" style:font-style-complex="normal"/>
    </style:style>
    <style:style style:name="T80" style:family="text">
      <style:text-properties fo:font-style="normal" officeooo:rsid="002017da" style:font-style-asian="normal" style:font-style-complex="normal"/>
    </style:style>
    <style:style style:name="T81" style:family="text">
      <style:text-properties fo:font-style="normal" officeooo:rsid="00187873" style:font-style-asian="normal" style:font-style-complex="normal"/>
    </style:style>
    <style:style style:name="T82" style:family="text">
      <style:text-properties fo:font-style="normal" officeooo:rsid="0014d7d0" style:font-style-asian="normal" style:font-style-complex="normal"/>
    </style:style>
    <style:style style:name="T83" style:family="text">
      <style:text-properties fo:font-style="normal" officeooo:rsid="002b17d0" style:font-style-asian="normal" style:font-style-complex="normal"/>
    </style:style>
    <style:style style:name="T84" style:family="text">
      <style:text-properties fo:font-style="normal" officeooo:rsid="001c919a" style:font-style-asian="normal" style:font-style-complex="normal"/>
    </style:style>
    <style:style style:name="T85" style:family="text">
      <style:text-properties fo:font-style="normal" officeooo:rsid="002cb31b" style:font-style-asian="normal" style:font-style-complex="normal"/>
    </style:style>
    <style:style style:name="T86" style:family="text">
      <style:text-properties fo:font-style="normal" officeooo:rsid="002fc4fa" style:font-style-asian="normal" style:font-style-complex="normal"/>
    </style:style>
    <style:style style:name="T87" style:family="text">
      <style:text-properties fo:font-style="normal" officeooo:rsid="002fd2a9" style:font-style-asian="normal" style:font-style-complex="normal"/>
    </style:style>
    <style:style style:name="T88" style:family="text">
      <style:text-properties fo:font-style="normal" officeooo:rsid="0019bc37" style:font-style-asian="normal" style:font-style-complex="normal"/>
    </style:style>
    <style:style style:name="T89" style:family="text">
      <style:text-properties fo:font-style="normal" officeooo:rsid="0051c4f4" style:font-style-asian="normal" style:font-style-complex="normal"/>
    </style:style>
    <style:style style:name="T90" style:family="text">
      <style:text-properties fo:font-style="normal" officeooo:rsid="006ccae7" style:font-style-asian="normal" style:font-style-complex="normal"/>
    </style:style>
    <style:style style:name="T91" style:family="text">
      <style:text-properties fo:font-style="normal" officeooo:rsid="007399c9" style:font-style-asian="normal" style:font-style-complex="normal"/>
    </style:style>
    <style:style style:name="T92" style:family="text">
      <style:text-properties fo:font-style="normal" officeooo:rsid="00751198"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02cb31b" style:font-style-asian="normal" style:font-weight-asian="bold" style:font-style-complex="normal" style:font-weight-complex="bold"/>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2cb31b" style:font-style-asian="normal" style:font-weight-asian="normal" style:font-style-complex="normal" style:font-weight-complex="normal"/>
    </style:style>
    <style:style style:name="T97" style:family="text">
      <style:text-properties fo:font-style="normal" fo:font-weight="normal" officeooo:rsid="002e9cb5" style:font-style-asian="normal" style:font-weight-asian="normal" style:font-style-complex="normal" style:font-weight-complex="normal"/>
    </style:style>
    <style:style style:name="T98" style:family="text">
      <style:text-properties fo:font-style="normal" fo:font-weight="normal" officeooo:rsid="006d4037" style:font-style-asian="normal" style:font-weight-asian="normal" style:font-style-complex="normal" style:font-weight-complex="normal"/>
    </style:style>
    <style:style style:name="T99" style:family="text">
      <style:text-properties officeooo:rsid="001f357b"/>
    </style:style>
    <style:style style:name="T100" style:family="text">
      <style:text-properties officeooo:rsid="002017da"/>
    </style:style>
    <style:style style:name="T101" style:family="text">
      <style:text-properties fo:font-weight="bold" style:font-weight-asian="bold" style:font-weight-complex="bold"/>
    </style:style>
    <style:style style:name="T102" style:family="text">
      <style:text-properties fo:font-weight="bold" officeooo:rsid="0029533a" style:font-weight-asian="bold" style:font-weight-complex="bold"/>
    </style:style>
    <style:style style:name="T103" style:family="text">
      <style:text-properties fo:font-weight="bold" officeooo:rsid="0036ffc1" style:font-weight-asian="bold" style:font-weight-complex="bold"/>
    </style:style>
    <style:style style:name="T104" style:family="text">
      <style:text-properties fo:font-weight="bold" officeooo:rsid="0014d7d0" style:font-weight-asian="bold" style:font-weight-complex="bold"/>
    </style:style>
    <style:style style:name="T105" style:family="text">
      <style:text-properties fo:font-weight="bold" officeooo:rsid="00157d70" style:font-weight-asian="bold" style:font-weight-complex="bold"/>
    </style:style>
    <style:style style:name="T106" style:family="text">
      <style:text-properties fo:font-weight="bold" officeooo:rsid="00259d35" style:font-weight-asian="bold" style:font-weight-complex="bold"/>
    </style:style>
    <style:style style:name="T107" style:family="text">
      <style:text-properties fo:font-weight="bold" officeooo:rsid="0025f0ec" style:font-weight-asian="bold" style:font-weight-complex="bold"/>
    </style:style>
    <style:style style:name="T108" style:family="text">
      <style:text-properties fo:font-weight="bold" officeooo:rsid="0026c3f5" style:font-weight-asian="bold" style:font-weight-complex="bold"/>
    </style:style>
    <style:style style:name="T109" style:family="text">
      <style:text-properties fo:font-weight="bold" officeooo:rsid="0023139f" style:font-weight-asian="bold" style:font-weight-complex="bold"/>
    </style:style>
    <style:style style:name="T110" style:family="text">
      <style:text-properties fo:font-weight="bold" officeooo:rsid="002c9e2e" style:font-weight-asian="bold" style:font-weight-complex="bold"/>
    </style:style>
    <style:style style:name="T111" style:family="text">
      <style:text-properties fo:font-weight="bold" officeooo:rsid="002e8091" style:font-weight-asian="bold" style:font-weight-complex="bold"/>
    </style:style>
    <style:style style:name="T112" style:family="text">
      <style:text-properties fo:font-weight="bold" officeooo:rsid="0041df9f" style:font-weight-asian="bold" style:font-weight-complex="bold"/>
    </style:style>
    <style:style style:name="T113" style:family="text">
      <style:text-properties fo:font-weight="bold" officeooo:rsid="001ae138" style:font-weight-asian="bold" style:font-weight-complex="bold"/>
    </style:style>
    <style:style style:name="T114" style:family="text">
      <style:text-properties fo:font-weight="bold" officeooo:rsid="001fd3cc" style:font-weight-asian="bold" style:font-weight-complex="bold"/>
    </style:style>
    <style:style style:name="T115" style:family="text">
      <style:text-properties fo:font-weight="bold" officeooo:rsid="002fae8c" style:font-weight-asian="bold" style:font-weight-complex="bold"/>
    </style:style>
    <style:style style:name="T116" style:family="text">
      <style:text-properties fo:font-weight="bold" officeooo:rsid="002fd2a9" style:font-weight-asian="bold" style:font-weight-complex="bold"/>
    </style:style>
    <style:style style:name="T117" style:family="text">
      <style:text-properties fo:font-weight="bold" officeooo:rsid="00569bcd" style:font-weight-asian="bold" style:font-weight-complex="bold"/>
    </style:style>
    <style:style style:name="T118" style:family="text">
      <style:text-properties fo:font-weight="bold" officeooo:rsid="00583e83" style:font-weight-asian="bold" style:font-weight-complex="bold"/>
    </style:style>
    <style:style style:name="T119" style:family="text">
      <style:text-properties fo:font-weight="bold" officeooo:rsid="0067b718" style:font-weight-asian="bold" style:font-weight-complex="bold"/>
    </style:style>
    <style:style style:name="T120" style:family="text">
      <style:text-properties fo:font-weight="bold" officeooo:rsid="006843d1" style:font-weight-asian="bold" style:font-weight-complex="bold"/>
    </style:style>
    <style:style style:name="T121" style:family="text">
      <style:text-properties fo:font-weight="bold" officeooo:rsid="006a165a" style:font-weight-asian="bold" style:font-weight-complex="bold"/>
    </style:style>
    <style:style style:name="T122" style:family="text">
      <style:text-properties fo:font-weight="bold" officeooo:rsid="006a8811" style:font-weight-asian="bold" style:font-weight-complex="bold"/>
    </style:style>
    <style:style style:name="T123" style:family="text">
      <style:text-properties fo:font-weight="bold" officeooo:rsid="001b5644" style:font-name-asian="DejaVu Sans" style:font-weight-asian="bold" style:font-name-complex="DejaVu Sans" style:font-weight-complex="bold"/>
    </style:style>
    <style:style style:name="T124" style:family="text">
      <style:text-properties fo:font-size="12pt"/>
    </style:style>
    <style:style style:name="T125" style:family="text">
      <style:text-properties fo:font-size="12pt" officeooo:rsid="000a7f4f" style:font-size-asian="12pt" style:font-size-complex="12pt"/>
    </style:style>
    <style:style style:name="T126" style:family="text">
      <style:text-properties fo:font-size="12pt" fo:font-style="italic" fo:font-weight="bold" officeooo:rsid="000b275e" style:font-size-asian="12pt" style:font-style-asian="italic" style:font-weight-asian="bold" style:font-size-complex="12pt" style:font-style-complex="italic" style:font-weight-complex="bold"/>
    </style:style>
    <style:style style:name="T127" style:family="text">
      <style:text-properties fo:font-size="12pt" fo:font-weight="bold" officeooo:rsid="000a7f4f" style:font-size-asian="12pt" style:font-weight-asian="bold" style:font-size-complex="12pt" style:font-weight-complex="bold"/>
    </style:style>
    <style:style style:name="T128" style:family="text">
      <style:text-properties fo:font-size="12pt" fo:font-weight="bold" officeooo:rsid="000b275e" style:font-size-asian="12pt" style:font-weight-asian="bold" style:font-size-complex="12pt" style:font-weight-complex="bold"/>
    </style:style>
    <style:style style:name="T129" style:family="text">
      <style:text-properties fo:font-size="12pt" fo:font-weight="bold" style:font-weight-asian="bold" style:font-weight-complex="bold"/>
    </style:style>
    <style:style style:name="T130" style:family="text">
      <style:text-properties officeooo:rsid="0036ffc1"/>
    </style:style>
    <style:style style:name="T131" style:family="text">
      <style:text-properties officeooo:rsid="0039b2f9"/>
    </style:style>
    <style:style style:name="T132" style:family="text">
      <style:text-properties officeooo:rsid="00187873"/>
    </style:style>
    <style:style style:name="T133" style:family="text">
      <style:text-properties officeooo:rsid="0014d7d0"/>
    </style:style>
    <style:style style:name="T134" style:family="text">
      <style:text-properties officeooo:rsid="00157d70"/>
    </style:style>
    <style:style style:name="T135" style:family="text">
      <style:text-properties officeooo:rsid="0025f0ec"/>
    </style:style>
    <style:style style:name="T136" style:family="text">
      <style:text-properties officeooo:rsid="00259d35"/>
    </style:style>
    <style:style style:name="T137" style:family="text">
      <style:text-properties fo:font-weight="normal" style:font-weight-asian="normal" style:font-weight-complex="normal"/>
    </style:style>
    <style:style style:name="T138" style:family="text">
      <style:text-properties fo:font-weight="normal" officeooo:rsid="00259d35" style:font-weight-asian="normal" style:font-weight-complex="normal"/>
    </style:style>
    <style:style style:name="T139" style:family="text">
      <style:text-properties fo:font-weight="normal" officeooo:rsid="00168b4c" style:font-weight-asian="normal" style:font-weight-complex="normal"/>
    </style:style>
    <style:style style:name="T140" style:family="text">
      <style:text-properties fo:font-weight="normal" officeooo:rsid="0029533a" style:font-weight-asian="normal" style:font-weight-complex="normal"/>
    </style:style>
    <style:style style:name="T141" style:family="text">
      <style:text-properties fo:font-weight="normal" officeooo:rsid="002c2ff5" style:font-weight-asian="normal" style:font-weight-complex="normal"/>
    </style:style>
    <style:style style:name="T142" style:family="text">
      <style:text-properties fo:font-weight="normal" officeooo:rsid="0013c69f" style:font-weight-asian="normal" style:font-weight-complex="normal"/>
    </style:style>
    <style:style style:name="T143" style:family="text">
      <style:text-properties fo:font-weight="normal" officeooo:rsid="00337b5c" style:font-weight-asian="normal" style:font-weight-complex="normal"/>
    </style:style>
    <style:style style:name="T144" style:family="text">
      <style:text-properties fo:font-weight="normal" officeooo:rsid="00583e83" style:font-weight-asian="normal" style:font-weight-complex="normal"/>
    </style:style>
    <style:style style:name="T145" style:family="text">
      <style:text-properties fo:font-weight="normal" officeooo:rsid="0067b718" style:font-weight-asian="normal" style:font-weight-complex="normal"/>
    </style:style>
    <style:style style:name="T146" style:family="text">
      <style:text-properties fo:font-weight="normal" officeooo:rsid="006a8811" style:font-weight-asian="normal" style:font-weight-complex="normal"/>
    </style:style>
    <style:style style:name="T147" style:family="text">
      <style:text-properties officeooo:rsid="0040c6ae"/>
    </style:style>
    <style:style style:name="T148" style:family="text">
      <style:text-properties officeooo:rsid="002e8091"/>
    </style:style>
    <style:style style:name="T149" style:family="text">
      <style:text-properties officeooo:rsid="0019ddfd"/>
    </style:style>
    <style:style style:name="T150" style:family="text">
      <style:text-properties officeooo:rsid="00217b35"/>
    </style:style>
    <style:style style:name="T151" style:family="text">
      <style:text-properties officeooo:rsid="0034b2f1"/>
    </style:style>
    <style:style style:name="T152" style:family="text">
      <style:text-properties officeooo:rsid="00383082"/>
    </style:style>
    <style:style style:name="T153" style:family="text">
      <style:text-properties officeooo:rsid="0034ec76"/>
    </style:style>
    <style:style style:name="T154" style:family="text">
      <style:text-properties officeooo:rsid="001e749e"/>
    </style:style>
    <style:style style:name="T155" style:family="text">
      <style:text-properties officeooo:rsid="001fd3cc"/>
    </style:style>
    <style:style style:name="T156" style:family="text">
      <style:text-properties officeooo:rsid="0021a719"/>
    </style:style>
    <style:style style:name="T157" style:family="text">
      <style:text-properties officeooo:rsid="0024b1ce"/>
    </style:style>
    <style:style style:name="T158" style:family="text">
      <style:text-properties officeooo:rsid="00267e84"/>
    </style:style>
    <style:style style:name="T159" style:family="text">
      <style:text-properties officeooo:rsid="002b17d0"/>
    </style:style>
    <style:style style:name="T160" style:family="text">
      <style:text-properties officeooo:rsid="001c919a"/>
    </style:style>
    <style:style style:name="T161" style:family="text">
      <style:text-properties officeooo:rsid="0013c69f"/>
    </style:style>
    <style:style style:name="T162" style:family="text">
      <style:text-properties officeooo:rsid="001421c6"/>
    </style:style>
    <style:style style:name="T163" style:family="text">
      <style:text-properties officeooo:rsid="0014ef88"/>
    </style:style>
    <style:style style:name="T164" style:family="text">
      <style:text-properties officeooo:rsid="0016a16e"/>
    </style:style>
    <style:style style:name="T165" style:family="text">
      <style:text-properties officeooo:rsid="002c2ff5"/>
    </style:style>
    <style:style style:name="T166" style:family="text">
      <style:text-properties officeooo:rsid="002cb31b"/>
    </style:style>
    <style:style style:name="T167" style:family="text">
      <style:text-properties officeooo:rsid="002fae8c"/>
    </style:style>
    <style:style style:name="T168" style:family="text">
      <style:text-properties officeooo:rsid="002fd2a9"/>
    </style:style>
    <style:style style:name="T169" style:family="text">
      <style:text-properties officeooo:rsid="0019bc37"/>
    </style:style>
    <style:style style:name="T170" style:family="text">
      <style:text-properties officeooo:rsid="00385cbb"/>
    </style:style>
    <style:style style:name="T171" style:family="text">
      <style:text-properties officeooo:rsid="003a35db"/>
    </style:style>
    <style:style style:name="T172" style:family="text">
      <style:text-properties officeooo:rsid="003bd33c"/>
    </style:style>
    <style:style style:name="T173" style:family="text">
      <style:text-properties officeooo:rsid="003bfac0"/>
    </style:style>
    <style:style style:name="T174" style:family="text">
      <style:text-properties officeooo:rsid="003df064"/>
    </style:style>
    <style:style style:name="T175" style:family="text">
      <style:text-properties officeooo:rsid="003fdea0"/>
    </style:style>
    <style:style style:name="T176" style:family="text">
      <style:text-properties officeooo:rsid="00417e54"/>
    </style:style>
    <style:style style:name="T177" style:family="text">
      <style:text-properties officeooo:rsid="0042fab8"/>
    </style:style>
    <style:style style:name="T178" style:family="text">
      <style:text-properties officeooo:rsid="0044e01c"/>
    </style:style>
    <style:style style:name="T179" style:family="text">
      <style:text-properties officeooo:rsid="00467176"/>
    </style:style>
    <style:style style:name="T180" style:family="text">
      <style:text-properties officeooo:rsid="00481db6"/>
    </style:style>
    <style:style style:name="T181" style:family="text">
      <style:text-properties officeooo:rsid="00498840"/>
    </style:style>
    <style:style style:name="T182" style:family="text">
      <style:text-properties officeooo:rsid="0049fe25"/>
    </style:style>
    <style:style style:name="T183" style:family="text">
      <style:text-properties officeooo:rsid="004bd915"/>
    </style:style>
    <style:style style:name="T184" style:family="text">
      <style:text-properties officeooo:rsid="004ce322"/>
    </style:style>
    <style:style style:name="T185" style:family="text">
      <style:text-properties officeooo:rsid="004e78b9"/>
    </style:style>
    <style:style style:name="T186" style:family="text">
      <style:text-properties officeooo:rsid="004eb124"/>
    </style:style>
    <style:style style:name="T187" style:family="text">
      <style:text-properties officeooo:rsid="004f27ad"/>
    </style:style>
    <style:style style:name="T188" style:family="text">
      <style:text-properties officeooo:rsid="00537302"/>
    </style:style>
    <style:style style:name="T189" style:family="text">
      <style:text-properties officeooo:rsid="0055528c"/>
    </style:style>
    <style:style style:name="T190" style:family="text">
      <style:text-properties officeooo:rsid="00569bcd"/>
    </style:style>
    <style:style style:name="T191" style:family="text">
      <style:text-properties style:text-position="super 58%"/>
    </style:style>
    <style:style style:name="T192" style:family="text">
      <style:text-properties style:text-position="super 58%" officeooo:rsid="00569bcd"/>
    </style:style>
    <style:style style:name="T193" style:family="text">
      <style:text-properties style:text-position="super 58%" style:font-name="Liberation Serif" fo:font-size="12pt" fo:font-weight="bold" officeooo:rsid="0019ddfd" style:font-size-asian="12pt" style:font-weight-asian="bold" style:font-size-complex="12pt" style:font-weight-complex="bold"/>
    </style:style>
    <style:style style:name="T194" style:family="text">
      <style:text-properties style:text-position="super 58%" officeooo:rsid="00616844"/>
    </style:style>
    <style:style style:name="T195" style:family="text">
      <style:text-properties style:text-position="super 58%" officeooo:rsid="006fe7ae"/>
    </style:style>
    <style:style style:name="T196" style:family="text">
      <style:text-properties style:text-position="super 58%" officeooo:rsid="0070e0fe"/>
    </style:style>
    <style:style style:name="T197" style:family="text">
      <style:text-properties style:text-position="super 58%" fo:font-style="normal" style:font-style-asian="normal" style:font-style-complex="normal"/>
    </style:style>
    <style:style style:name="T198" style:family="text">
      <style:text-properties officeooo:rsid="00583e83"/>
    </style:style>
    <style:style style:name="T199" style:family="text">
      <style:text-properties officeooo:rsid="00596ede"/>
    </style:style>
    <style:style style:name="T200" style:family="text">
      <style:text-properties officeooo:rsid="005e3552"/>
    </style:style>
    <style:style style:name="T201" style:family="text">
      <style:text-properties officeooo:rsid="0063052b"/>
    </style:style>
    <style:style style:name="T202" style:family="text">
      <style:text-properties officeooo:rsid="0064ab75"/>
    </style:style>
    <style:style style:name="T203" style:family="text">
      <style:text-properties officeooo:rsid="00661edb"/>
    </style:style>
    <style:style style:name="T204" style:family="text">
      <style:text-properties officeooo:rsid="0066e18d"/>
    </style:style>
    <style:style style:name="T205" style:family="text">
      <style:text-properties officeooo:rsid="0067b718"/>
    </style:style>
    <style:style style:name="T206" style:family="text">
      <style:text-properties officeooo:rsid="006a8811"/>
    </style:style>
    <style:style style:name="T207" style:family="text">
      <style:text-properties officeooo:rsid="006aeea9"/>
    </style:style>
    <style:style style:name="T208" style:family="text">
      <style:text-properties officeooo:rsid="006d4037"/>
    </style:style>
    <style:style style:name="T209" style:family="text">
      <style:text-properties officeooo:rsid="006fe7ae"/>
    </style:style>
    <style:style style:name="T210" style:family="text">
      <style:text-properties officeooo:rsid="0070e0f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ource_20_Text"><text:span text:style-name="T4">TS</text:span></text:span><text:span text:style-name="Source_20_Text"><text:span text:style-name="T2"> Draft</text:span></text:span><text:span text:style-name="Source_20_Text"><text:span text:style-name="T1"> </text:span></text:span></text:p>
      <text:p text:style-name="P2"><text:bookmark text:name="LC2"/><text:span text:style-name="Source_20_Text"><text:span text:style-name="T1">WG14 </text:span></text:span><text:span text:style-name="Source_20_Text"><text:span text:style-name="T3">3</text:span></text:span><text:span text:style-name="Source_20_Text"><text:span text:style-name="T9">2</text:span></text:span><text:span text:style-name="Source_20_Text"><text:span text:style-name="T10">66</text:span></text:span><text:span text:style-name="Source_20_Text"><text:span text:style-name="T1"> <text:s/></text:span></text:span></text:p>
      <text:p text:style-name="P2"><text:bookmark text:name="LC3"/></text:p>
      <text:p text:style-name="P2"><text:bookmark text:name="LC4"/><text:span text:style-name="Source_20_Text"><text:span text:style-name="T1">Title: <text:s text:c="14"/>TS </text:span></text:span><text:span text:style-name="Source_20_Text"><text:span text:style-name="T5">draft</text:span></text:span><text:span text:style-name="Source_20_Text"><text:span text:style-name="T1">: C Extensions to support </text:span></text:span><text:span text:style-name="Source_20_Text"><text:span text:style-name="T6">generalized function calls <text:s/></text:span></text:span></text:p>
      <text:p text:style-name="P2"><text:bookmark text:name="LC5"/><text:span text:style-name="Source_20_Text"><text:span text:style-name="T1">Author, affiliation: Alex </text:span></text:span><text:span text:style-name="Source_20_Text"><text:span text:style-name="T6">Celeste</text:span></text:span><text:span text:style-name="Source_20_Text"><text:span text:style-name="T1">, Perforce <text:s/></text:span></text:span></text:p>
      <text:p text:style-name="P2"><text:bookmark text:name="LC6"/><text:span text:style-name="Source_20_Text"><text:span text:style-name="T1">Date: <text:s text:c="15"/>202</text:span></text:span><text:span text:style-name="Source_20_Text"><text:span text:style-name="T6">4</text:span></text:span><text:span text:style-name="Source_20_Text"><text:span text:style-name="T1">-</text:span></text:span><text:span text:style-name="Source_20_Text"><text:span text:style-name="T6">05</text:span></text:span><text:span text:style-name="Source_20_Text"><text:span text:style-name="T1">-</text:span></text:span><text:span text:style-name="Source_20_Text"><text:span text:style-name="T6">20</text:span></text:span><text:span text:style-name="Source_20_Text"><text:span text:style-name="T1"> <text:s/></text:span></text:span></text:p>
      <text:p text:style-name="P2"><text:bookmark text:name="LC7"/><text:span text:style-name="Source_20_Text"><text:span text:style-name="T1">Proposal category: <text:s text:c="2"/></text:span></text:span><text:span text:style-name="Source_20_Text"><text:span text:style-name="T8">Technical Specification</text:span></text:span><text:span text:style-name="Source_20_Text"><text:span text:style-name="T1"> <text:s/></text:span></text:span></text:p>
      <text:p text:style-name="P3"><text:bookmark text:name="LC8"/><text:span text:style-name="Source_20_Text"><text:span text:style-name="T1">Target audience: <text:s text:c="4"/>Compiler/tooling developers</text:span></text:span></text:p>
      <text:h text:style-name="P1" text:outline-level="2"><text:bookmark text:name="abstract"/>Abstract</text:h>
      <text:p text:style-name="P7">This Technical Specification aims to lay out common practice guidelines for features related to extended pure function call support.</text:p>
      <text:p text:style-name="P7">Two main feature areas are covered: extended constant expressions, and proper tail calls. These extension features are of interest to application developers who want to take advantage of language-level abstractions beyond the usual restrictions of translation and execution phases. In both cases the concept of a function call is generalized to allow users to write readable code that uses C features in an intuitive way, in places where it would not be accessible in the core language.</text:p>
      <text:p text:style-name="P7">The first feature <text:span text:style-name="T53">area</text:span> is of relevance to the interop between C and C++, as it proposes to expand the overlap between these two languages and thus improve header compatibility and the usefulness of header definitions. <text:span text:style-name="T61">This feature area is largely based on C feature proposal document </text:span><text:a xlink:type="simple" xlink:href="http://www.open-std.org/jtc1/sc22/wg14/www/docs/n2917.pdf" text:style-name="Internet_20_link" text:visited-style-name="Visited_20_Internet_20_Link"><text:span text:style-name="T171">N2917</text:span></text:a><text:span text:style-name="T171">, which builds upon the features described in </text:span><text:a xlink:type="simple" xlink:href="https://www.open-std.org/jtc1/sc22/wg14/www/docs/n3018.htm" text:style-name="Internet_20_link" text:visited-style-name="Visited_20_Internet_20_Link"><text:span text:style-name="T171">N3018</text:span></text:a><text:span text:style-name="T171"> that were accepted for standardization in C23.</text:span></text:p>
      <text:p text:style-name="P7">The second feature area is also of special relevance to the wider language community, by aiming to improve interop between C and other languages already having a more generalized concept of function calls that allows for in-place replacement. <text:span text:style-name="T61">This feature area is largely based on C feature proposal document </text:span><text:a xlink:type="simple" xlink:href="http://www.open-std.org/jtc1/sc22/wg14/www/docs/n2920.pdf" text:style-name="Internet_20_link" text:visited-style-name="Visited_20_Internet_20_Link"><text:span text:style-name="T61">N2920</text:span></text:a><text:span text:style-name="T61">.</text:span></text:p>
      <text:p text:style-name="P9">In both cases the intent is to codify common and unified practice.</text:p>
      <text:h text:style-name="P6" text:outline-level="2">1. Scope</text:h>
      <text:p text:style-name="P7">This Technical Specification specifies a series of extensions of the programming language C, specified by the international standard ISO/IEC 9899:2023.</text:p>
      <text:p text:style-name="P7">Each clause in this Technical Specification deals with a specific topic. The first subclauses of clauses 4 and 5 contain a technical description of the features of the topic. These subclauses provide an overview but do not contain all the fine details. The last subclause of each clause contains the editorial changes to the standard necessary to fully specify the topic in the standard, and thereby provides a complete definition.</text:p>
      <text:p text:style-name="P7">Additional explanation and rationale are provided in the Annexes.</text:p>
      <text:h text:style-name="P5" text:outline-level="2">2. References</text:h>
      <text:p text:style-name="P7">The following referenced documents are indispensable for the application of this document. For dated references, only the edition cited applies. For undated references, the latest edition of the referenced document (including any amendments) applies.</text:p>
      <text:p text:style-name="P4"><text:a xlink:type="simple" xlink:href="http://www.open-std.org/jtc1/sc22/wg14/www/docs/n3096.pdf" text:style-name="Internet_20_link" text:visited-style-name="Visited_20_Internet_20_Link"><text:span text:style-name="T178">ISO/IEC 9899:2023 – Programming languages – C (draft n3096)</text:span></text:a></text:p>
      <text:p text:style-name="P7"><text:a xlink:type="simple" xlink:href="http://www.open-std.org/jtc1/sc22/wg21/docs/papers/2012/n3337.pdf" text:style-name="Internet_20_link" text:visited-style-name="Visited_20_Internet_20_Link">C++<text:span text:style-name="T74">11 </text:span><text:span text:style-name="T157">(draft n3337)</text:span></text:a></text:p>
      <text:p text:style-name="P40"><text:a xlink:type="simple" xlink:href="http://open-std.org/jtc1/sc22/wg21/docs/papers/2020/n4868.pdf" text:style-name="Internet_20_link" text:visited-style-name="Visited_20_Internet_20_Link">C++20 (draft n4868)</text:a></text:p>
      <text:p text:style-name="P40"><text:a xlink:type="simple" xlink:href="https://small.r7rs.org/attachment/r7rs.pdf" text:style-name="Internet_20_link" text:visited-style-name="Visited_20_Internet_20_Link">R7RS Scheme</text:a></text:p>
      <text:p text:style-name="P61"><text:a xlink:type="simple" xlink:href="http://www.open-std.org/jtc1/sc22/wg14/www/docs/n2917.pdf" text:style-name="Internet_20_link" text:visited-style-name="Visited_20_Internet_20_Link">n2917 <text:span text:style-name="T156">The </text:span><text:span text:style-name="T30">constexpr</text:span><text:span text:style-name="T156"> specifier, v2</text:span></text:a></text:p>
      <text:p text:style-name="P33"><text:a xlink:type="simple" xlink:href="http://www.open-std.org/jtc1/sc22/wg14/www/docs/n2920.pdf" text:style-name="Internet_20_link" text:visited-style-name="Visited_20_Internet_20_Link">n2920 <text:span text:style-name="T157">Tail-call elimination, v2</text:span></text:a></text:p>
      <text:p text:style-name="P62"><text:a xlink:type="simple" xlink:href="https://www.open-std.org/jtc1/sc22/wg14/www/docs/n3018.htm" text:style-name="Internet_20_link" text:visited-style-name="Visited_20_Internet_20_Link"><text:span text:style-name="T171">n3018 The </text:span><text:span text:style-name="T31">constexpr</text:span><text:span text:style-name="T171"> specifier for object definitions, v7</text:span></text:a></text:p>
      <text:h text:style-name="P5" text:outline-level="2">3. Conformance</text:h>
      <text:p text:style-name="P7">This Technical <text:span text:style-name="T53">Specification</text:span> presents in <text:span text:style-name="T53">two </text:span>separate clauses specifications for <text:span text:style-name="T53">two</text:span>, in principle independent, sets of functionality (clause 4: <text:span text:style-name="T53">extended constant expressions</text:span>, clause 5: <text:span text:style-name="T53">tail-call elimination</text:span>). As this is a Technical <text:span text:style-name="T53">Specification </text:span>there are no conformance requirements and implementers are free to select those specifications that they need. However, if functionality is implemented from one of the clauses, implementers are strongly encouraged to implement that clause in full, and not just a part of it.</text:p>
      <text:p text:style-name="P9">The purpose of this Specification being to codify common practice, implementers are strongly encouraged to document any deviations or omissions in order to establish which practices are of more and less interest to the target audience.</text:p>
      <text:p text:style-name="P7">If, at a later stage, a decision is taken to incorporate some or all of the text of this Technical <text:span text:style-name="T53">Specification</text:span> into the C standard, then at that moment the conformance issues with respect to (parts of) this text need to be addressed (conformance with respect to freestanding implementations etc.).</text:p>
      <text:h text:style-name="P8" text:outline-level="2"><text:span text:style-name="T55">4</text:span>. Extended Constant Expressions</text:h>
      <text:h text:style-name="Heading_20_3" text:outline-level="3">Introduction</text:h>
      <text:p text:style-name="P32">C requires that objects with static storage duration are only initialized with constant expressions. The rules for which kinds of expression may appear as constant expressions are quite restrictive and mostly limit users to using macro names for abstraction of values or operations. Users are also limited to testing their assertions about value behaviour at runtime because <text:span text:style-name="Source_20_Text">static_assert</text:span> is similarly limited in the kinds of expressions it can evaluate at compile-time.</text:p>
      <text:p text:style-name="P32"><text:span text:style-name="T158">This Specification</text:span> add<text:span text:style-name="T158">s</text:span> a new <text:span text:style-name="T172">function</text:span> specifier to C, <text:span text:style-name="Source_20_Text">constexpr</text:span>, as introduced to C﻿+﻿+ in C﻿+﻿+11, <text:span text:style-name="T173">and introduced to C in C23 as a storage-class specifier for objects</text:span>. <text:span text:style-name="T158">T</text:span>his specifier <text:span text:style-name="T158">is </text:span><text:span text:style-name="T173">here </text:span><text:span text:style-name="T158">added </text:span>to functions <text:span text:style-name="T158">separately from its </text:span><text:span text:style-name="T173">role as a storage class for</text:span><text:span text:style-name="T158"> objects</text:span>, and intentionally keep<text:span text:style-name="T158">s</text:span> the functionality minimal to avoid undue burden on lightweight implementations.</text:p>
      <text:p text:style-name="P30">This feature was <text:span text:style-name="T174">first</text:span> discussed during the January 2022 meeting of WG14, and the meeting established some starting directions for the feature set:</text:p>
      <text:list text:style-name="L1">
        <text:list-item>
          <text:p text:style-name="P84">WG14 would like the <text:span text:style-name="T7">constexpr</text:span> specifier to be added to C23, for objects only;</text:p>
        </text:list-item>
        <text:list-item>
          <text:p text:style-name="P84">WG14 would like UB to be prohibited from constant expressions in general;</text:p>
        </text:list-item>
        <text:list-item>
          <text:p text:style-name="P84">there was no<text:span text:style-name="T60">t</text:span> consensus to add <text:span text:style-name="T60">any additional operators </text:span><text:span text:style-name="T62">(element access)</text:span><text:span text:style-name="T60"> to the set that can be used for constant expressions, for C23;</text:span></text:p>
        </text:list-item>
        <text:list-item>
          <text:p text:style-name="P85">there was not consensus to add the <text:span text:style-name="T7">constexpr</text:span> specifier for functions, to C23;</text:p>
        </text:list-item>
        <text:list-item>
          <text:p text:style-name="P85">there was <text:span text:style-name="T63">strong</text:span> consensus to add the full <text:span text:style-name="T7">constexpr</text:span> feature for objects, extended operators (element access), and function definitions, in <text:span text:style-name="T62">some</text:span> future version of C after C23.</text:p>
        </text:list-item>
      </text:list>
      <text:p text:style-name="P63">At the July 2022 meeting of WG14, the <text:span text:style-name="T7">constexpr</text:span> keyword was adopted as a storage-class specifier for objects, which introduced the feature to C23. Th<text:span text:style-name="T176">e</text:span> specifier <text:span text:style-name="T176">as it appears in C23 </text:span>does not a<text:span text:style-name="T176">llow for</text:span> subscript access <text:span text:style-name="T176">to</text:span> <text:span text:style-name="T176">the values in </text:span>array objects, but does allow for members (and whole values) of <text:span text:style-name="T176">structure and union objects</text:span> to be used in constant expressions.</text:p>
      <text:p text:style-name="P10">The rationale for, and impact of, the inclusion of <text:span text:style-name="T7">constexpr</text:span> functions as well as constexpr objects <text:span text:style-name="T175">wa</text:span>s explained <text:span text:style-name="T159">and discussed </text:span>in WG14 document <text:a xlink:type="simple" xlink:href="http://www.open-std.org/jtc1/sc22/wg14/www/docs/n2917.pdf" text:style-name="Internet_20_link" text:visited-style-name="Visited_20_Internet_20_Link">n2917</text:a>.</text:p>
      <text:h text:style-name="P71" text:outline-level="3">4.1 Overview of extended constant expressions and definitions</text:h>
      <text:p text:style-name="P10">For the purpose of this Specification, a <text:span text:style-name="T7">constexpr</text:span> object is any object defined with the <text:span text:style-name="T7">constexpr</text:span> specifier as part of its declaration specifiers. <text:span text:style-name="T75">The value of a </text:span><text:span text:style-name="T26">constexpr</text:span><text:span text:style-name="T75"> object may be accessed as part of any kind of C constant expression (</text:span><text:span text:style-name="T177">which does not include </text:span><text:span text:style-name="T75">preprocessor </text:span><text:span text:style-name="T177">expressions</text:span><text:span text:style-name="T75">), assuming it has appropriate type. </text:span><text:span text:style-name="T26">constexpr</text:span><text:span text:style-name="T75"> objects are a feature of C23 </text:span><text:span text:style-name="T178">and are described in </text:span><text:a xlink:type="simple" xlink:href="http://www.open-std.org/jtc1/sc22/wg14/www/docs/n3096.pdf" text:style-name="Internet_20_link" text:visited-style-name="Visited_20_Internet_20_Link"><text:span text:style-name="T178">ISO/IEC 9899</text:span></text:a><text:span text:style-name="T75">.</text:span></text:p>
      <text:p text:style-name="P34">For the purpose of this Specification, a <text:span text:style-name="T7">constexpr</text:span> function is any function defined with the <text:span text:style-name="T7">constexpr</text:span> function specifier. The keyword <text:span text:style-name="T178">for the </text:span><text:span text:style-name="T32">constexpr</text:span><text:span text:style-name="T178"> storage class </text:span>is reused, and given a second role as a function specifier. A <text:span text:style-name="T7">constexpr</text:span> function definition is subject to stricter constraints than other function definitions, but is not subject to the constraint that forbids them from being called from <text:span text:style-name="T178">within </text:span>constant expressions.</text:p>
      <text:p text:style-name="P64"><text:soft-page-break/>Within a <text:span text:style-name="T7">constexpr</text:span> function, its parameters are also treated as <text:span text:style-name="T7">constexpr</text:span> objects with the values of their arguments, in the limited context of its return expression (forward reference: 4.1.2).</text:p>
      <text:p text:style-name="P34">For the purpose of this Specification, a constant expression is one of: <text:span text:style-name="T178">a named constant; </text:span>an integer constant expression; an arithmetic constant expression; an address constant expression; a structure <text:span text:style-name="T178">or union </text:span>constant expression; a null pointer constant; or any other form of constant expression accepted by the implementation. <text:span text:style-name="T178">Constant expressions are described in Section 6.6 “Constant expressions” of C23.</text:span></text:p>
      <text:p text:style-name="P34">A constant expression does not contain any diagnosable undefined behaviour. An expression containing undefined behaviour in an evaluated branch is not a constant expression for any purposes.</text:p>
      <text:p text:style-name="P34">This Specification therefore generalizes C constant expressions of all kinds, to also include element access to array objects defined with the <text:span text:style-name="T7">constexpr</text:span> storage class, and to include calls to functions defined with the <text:span text:style-name="T7">constexpr</text:span> function specifier.</text:p>
      <text:h text:style-name="P72" text:outline-level="3">4.<text:span text:style-name="T54">1.1</text:span> <text:span text:style-name="T7">constexpr</text:span> <text:span text:style-name="T179">array</text:span><text:span text:style-name="T77"> </text:span>element access</text:h>
      <text:p text:style-name="P36">C23 <text:span text:style-name="T179">allows</text:span> objects of any type to be <text:span text:style-name="T7">constexpr</text:span> objects, but does not change the expression rules to necessarily make these useful outside of initialization contexts <text:span text:style-name="T179">(which can use the </text:span><text:span text:style-name="T33">[]</text:span><text:span text:style-name="T179"> and </text:span><text:span text:style-name="T33">-&gt;</text:span><text:span text:style-name="T179"> operators in combination with </text:span><text:span text:style-name="T33">&amp;</text:span><text:span text:style-name="T179"> to create an address constant, but not to read a value)</text:span>. <text:span text:style-name="T180">This specification adds the ability to make use of the element values of array objects, </text:span><text:span text:style-name="T183">which can be declared in C23 (and their values can even be copied as a group by assignment if they are members of a containing structure), but cannot be accessed within constant expressions.</text:span></text:p>
      <text:p text:style-name="P36">For the purpose of this specification, all kinds of constant expression may also make use of the <text:span text:style-name="T179">subscript</text:span><text:span text:style-name="T99"> operator </text:span><text:span text:style-name="T28">[]</text:span><text:span text:style-name="T99">. Constant expressions may </text:span><text:span text:style-name="T69">not</text:span><text:span text:style-name="T99"> make use of the </text:span><text:span text:style-name="T28">*</text:span><text:span text:style-name="T99"> or </text:span><text:span text:style-name="T28">-&gt;</text:span><text:span text:style-name="T99"> operators to access the value of an object, because the identity and therefore storage class of the object designated by such an expression is not necessarily traceable.</text:span></text:p>
      <text:p text:style-name="P65">The <text:span text:style-name="T7">[]</text:span> operator may be used with the added restriction that the “array” operand <text:span text:style-name="T181">(the pointer-typed operand)</text:span> must be the name of a <text:span text:style-name="T7">constexpr</text:span> object <text:span text:style-name="T182">declared </text:span>with <text:span text:style-name="T182">complete </text:span>array type, <text:span text:style-name="T182">before parameter adjustment</text:span>. This is the sole exception to the rule that otherwise prohibits the use of <text:span text:style-name="T7">*</text:span> to access the value of an object (<text:span text:style-name="T7">[]</text:span> is otherwise defined in terms of <text:span text:style-name="T7">*</text:span>). The index operand must be an integer constant expression and its value must be <text:span text:style-name="T182">greater than or equal to zero, and less than the </text:span>dimension of the array.</text:p>
      <text:p text:style-name="P65"><text:span text:style-name="T77">Therefore, the </text:span><text:span text:style-name="T29">[]</text:span><text:span text:style-name="T77"> operator must have </text:span><text:span text:style-name="T100">either </text:span><text:span text:style-name="T77">a (possibly-parenthesized) identifier as the leading </text:span><text:span text:style-name="T65">postfix-expression</text:span><text:span text:style-name="T79">, </text:span><text:span text:style-name="T80">or an element access expression itself designating an array element of either a structure object or a containing array, </text:span><text:span text:style-name="T79">rather than a generalized address constant expression of pointer </text:span><text:span text:style-name="T80">type.</text:span></text:p>
      <text:p text:style-name="P60">This is symmetrical with the relaxation on the use of the function call operator with a function name in the postfix position.</text:p>
      <text:h text:style-name="P72" text:outline-level="3"><text:soft-page-break/>4.<text:span text:style-name="T77">1.2</text:span> <text:span text:style-name="T7">constexpr</text:span> functions</text:h>
      <text:p text:style-name="P35">A function declared with the <text:span text:style-name="Source_20_Text">constexpr</text:span> function specifier is subject to stricter restrictions <text:span text:style-name="T76">than other C functions</text:span>, taken from the quite restrictive set of rules used by C++11 <text:span text:style-name="T76">(ignoring those rules that are not applicable to C)</text:span>. The function body may only contain:</text:p>
      <text:list text:style-name="L2">
        <text:list-item>
          <text:p text:style-name="P86">null statements (plain semicolons) </text:p>
        </text:list-item>
        <text:list-item>
          <text:p text:style-name="P86"><text:span text:style-name="Source_20_Text">static_assert</text:span> declarations </text:p>
        </text:list-item>
        <text:list-item>
          <text:p text:style-name="P87"><text:span text:style-name="T7">typedef</text:span> declarations</text:p>
        </text:list-item>
        <text:list-item>
          <text:p text:style-name="P87">tag declarations (not in C++11)</text:p>
        </text:list-item>
        <text:list-item>
          <text:p text:style-name="P88">object definitions with the <text:span text:style-name="T7">constexpr</text:span> storage class (not in C++11)</text:p>
        </text:list-item>
      </text:list>
      <text:p text:style-name="P35">...in addition to exactly one return statement which evaluates a constant-expression according to the modified rules <text:span text:style-name="T184">of this specification</text:span>. The function must return a <text:span text:style-name="T76">non-</text:span><text:span text:style-name="T27">void</text:span><text:span text:style-name="T76"> </text:span>value. <text:span text:style-name="T76">The function may invoke itself recursively in a conditionally-evaluated expression branch </text:span><text:span text:style-name="T184">(note that if this recursive invocation is not in a conditional branch, the function will definitely never halt)</text:span><text:span text:style-name="T76">.</text:span></text:p>
      <text:p text:style-name="P35">A <text:span text:style-name="Source_20_Text">constexpr</text:span> function is implicitly also an <text:span text:style-name="Source_20_Text">inline</text:span> function, allowing it to be defined in a header. <text:span text:style-name="T76">All other considerations for the use of the C </text:span><text:span text:style-name="T27">inline</text:span><text:span text:style-name="T76"> specifier apply in the same way to C </text:span><text:span text:style-name="T27">constexpr</text:span><text:span text:style-name="T76"> functions (C++’s slightly different </text:span><text:span text:style-name="T27">inline</text:span><text:span text:style-name="T76"> rules </text:span><text:span text:style-name="T64">do not</text:span><text:span text:style-name="T76"> apply).</text:span></text:p>
      <text:p text:style-name="P35">A<text:span text:style-name="T185">n invocation of a</text:span> <text:span text:style-name="Source_20_Text">constexpr</text:span> function with arguments that are all themselves constant expressions is a constant expression. A <text:span text:style-name="Source_20_Text">constexpr</text:span> function may also be called with non-constant arguments, and in that case behaves like any other function call; <text:span text:style-name="T185">such a call is not a constant expression</text:span>. The address of a <text:span text:style-name="Source_20_Text">constexpr</text:span> function may be taken and used as any other function pointer <text:span text:style-name="T76">can</text:span>; this does not preserve the <text:span text:style-name="Source_20_Text">constexpr</text:span> specifier, <text:span text:style-name="T76">which is not part of the function’s type (in the same way that </text:span><text:span text:style-name="T27">inline</text:span><text:span text:style-name="T76"> is not part of the type)</text:span>.</text:p>
      <text:p text:style-name="P36">All kinds of constant expression may therefore make use of the function call operator in addition to the other operators permitted by C23 in a constant context, with the added restriction that the call must be to <text:span text:style-name="T99">the name of </text:span>a defined <text:span text:style-name="T28">constexpr</text:span><text:span text:style-name="T99"> </text:span>function. Function pointers cannot be invoked in a constant expression because the constexpr specifier is not preserved as part of a called function’s type. Therefore, the function call operator must have a (possibly-parenthesized) identifier as the leading <text:span text:style-name="T63">postfix-expression</text:span><text:span text:style-name="T78">, rather than a generalized address constant expression of pointer-to-function type.</text:span></text:p>
      <text:p text:style-name="P66"><text:span text:style-name="T78">This is symmetrical with the relaxation on the use of the </text:span><text:span text:style-name="T15">[]</text:span><text:span text:style-name="T78"> operator with an array name in the postfix position.</text:span></text:p>
      <text:p text:style-name="P66"><text:span text:style-name="T89">When the name of an array defined with the </text:span><text:span text:style-name="T16">constexpr</text:span><text:span text:style-name="T89"> storage class is passed as an argument to a </text:span><text:span text:style-name="T16">constexpr</text:span><text:span text:style-name="T89"> function, if (and only if) the corresponding parameter is declared with the type of an array of the same element and the same or smaller constant dimension (before adjustment), that parameter is treated as a </text:span><text:span text:style-name="T16">constexpr</text:span><text:span text:style-name="T89"> array within the function return expression according to the rules in 4.1.1, and may be indexed by integer constant expressions that make use of the values of any other parameters.</text:span></text:p>
      <text:p text:style-name="P37">Further discussion of the rationale for adopting the C++11 ruleset (as far as relevant to C) can be found in WG14 document <text:a xlink:type="simple" xlink:href="http://www.open-std.org/jtc1/sc22/wg14/www/docs/n2917.pdf" text:style-name="Internet_20_link" text:visited-style-name="Visited_20_Internet_20_Link">n2917</text:a>. Of note is that this ruleset does not require any interpreter semantics to be added to the C translator, as all value uses are pure and all function calls can be <text:soft-page-break/>expanded essentially like macros, <text:span text:style-name="T186">by direct, scope-aware, substitution of the result expression into the call site, to be evaluated using the existing constant evaluation engine</text:span>.</text:p>
      <text:p text:style-name="P37">An implementation choosing to provide more <text:span text:style-name="T186">fully-</text:span>featur<text:span text:style-name="T186">ed</text:span> <text:span text:style-name="T7">constexpr</text:span> functions, as found in C﻿+﻿+14 or later (mutable local state, loops, etc.), is therefore <text:span text:style-name="T70">very </text:span><text:span text:style-name="T63">strongly</text:span> encouraged to also provide the user with portability warnings.</text:p>
      <text:h text:style-name="P73" text:outline-level="3">4.2 Detailed changes to ISO/IEC 9899:2023</text:h>
      <text:p text:style-name="P11">Changes are relative to Working Draft <text:a xlink:type="simple" xlink:href="https://www.open-std.org/jtc1/sc22/wg14/www/docs/n3096.pdf" text:style-name="Internet_20_link" text:visited-style-name="Visited_20_Internet_20_Link">n<text:span text:style-name="T187">3096</text:span></text:a>, <text:span text:style-name="T187">the last public draft of C23 before release.</text:span></text:p>
      <text:p text:style-name="P11">The modifications are ordered according to the clauses of ISO/IEC 9899:2023 to which they refer. If a clause of ISO/IEC 9899:2023 is not mentioned, no changes to that clause are needed. New clauses are indicated with <text:span text:style-name="T101">(NEW CLAUSE)</text:span>, however resulting changes in the existing numbering are not indicated; the clause number <text:span text:style-name="T63">mm.nn</text:span><text:span text:style-name="T101">a</text:span> of new clause indicates that this clause follows immediately clause <text:span text:style-name="T63">mm.nn</text:span> at the same level.</text:p>
      <text:p text:style-name="P38">Add two new bulleted entries to 5.2.4.1 “Translation limits”, with values matching those in C++20:</text:p>
      <text:p text:style-name="P22">- <text:span text:style-name="T125">512 nested </text:span><text:span text:style-name="T14">constexpr</text:span><text:span text:style-name="T125"> function invocations</text:span></text:p>
      <text:p text:style-name="P29"><text:span text:style-name="T127">- 1048576 </text:span><text:span text:style-name="T128">nested </text:span><text:span text:style-name="T126">constant expressions</text:span><text:span text:style-name="T128"> within the evaluation of a single </text:span><text:span text:style-name="T126">constant expression</text:span></text:p>
      <text:p text:style-name="P39">Modify 6.3.2.3 “Pointers”:</text:p>
      <text:p text:style-name="P39">Modify paragraph 3:</text:p>
      <text:p text:style-name="P25">An integer constant expression with the value 0, or such an expression cast to type <text:span text:style-name="T7">void *</text:span>, <text:span text:style-name="T188">the predefined constant </text:span><text:span text:style-name="T34">nullptr</text:span><text:span text:style-name="T188">,</text:span> <text:span text:style-name="T103">or such an expression returned from a constexpr function,</text:span> is called a <text:span text:style-name="T63">null pointer constant</text:span>.</text:p>
      <text:p text:style-name="P26">Add a forward reference:</text:p>
      <text:p text:style-name="P25">equality operators (6.5.9), <text:span text:style-name="T103">function specifiers (6.7.4),</text:span><text:span text:style-name="T130"> </text:span>integer types capable of holding object pointers (7.20.1.4)</text:p>
      <text:p text:style-name="P26">Modify 6.6 "Constant expressions":</text:p>
      <text:p text:style-name="P26">Paragraph 3, relax the constraint against function calls:</text:p>
      <text:p text:style-name="P25">Constant expressions shall not contain assignment, increment, decrement, or comma operators, except when they are contained within a subexpression that is not evaluated. <text:span text:style-name="T104">If a</text:span><text:span text:style-name="Strong_20_Emphasis"><text:span text:style-name="T101"> fun</text:span></text:span><text:span text:style-name="Strong_20_Emphasis">ction-call operator appear</text:span><text:span text:style-name="Strong_20_Emphasis"><text:span text:style-name="T104">s</text:span></text:span><text:span text:style-name="Strong_20_Emphasis"> in a</text:span><text:span text:style-name="Strong_20_Emphasis"><text:span text:style-name="T131">n evaluated part of a</text:span></text:span><text:span text:style-name="Strong_20_Emphasis"> constant expression, </text:span><text:span text:style-name="Strong_20_Emphasis"><text:span text:style-name="T132">the </text:span></text:span><text:span text:style-name="Strong_20_Emphasis"><text:span text:style-name="T66">postfix-expression</text:span></text:span><text:span text:style-name="Strong_20_Emphasis"><text:span text:style-name="T81"> designating the function to call shall </text:span></text:span><text:span text:style-name="Strong_20_Emphasis"><text:span text:style-name="T82">consist</text:span></text:span><text:span text:style-name="Strong_20_Emphasis"> only </text:span><text:span text:style-name="Strong_20_Emphasis"><text:span text:style-name="T104">of </text:span></text:span><text:span text:style-name="Strong_20_Emphasis">the </text:span><text:span text:style-name="Strong_20_Emphasis"><text:span text:style-name="T133">(possibly-parenthesized) </text:span></text:span><text:span text:style-name="Strong_20_Emphasis">identifier of a function declared with the </text:span><text:span text:style-name="Source_20_Text">constexpr</text:span><text:span text:style-name="Strong_20_Emphasis"> function specifier. </text:span><text:span text:style-name="Strong_20_Emphasis"><text:span text:style-name="T134">The function to call shall be defined in the translation unit before the </text:span></text:span><text:span text:style-name="Strong_20_Emphasis"><text:span text:style-name="T105">evaluation</text:span></text:span><text:span text:style-name="Strong_20_Emphasis"><text:span text:style-name="T134"> of the outermost constant-expression containing the (possibly-nested) call.</text:span></text:span></text:p>
      <text:p text:style-name="P26">Add a new <text:span text:style-name="T190">sentence to</text:span> paragraph <text:span text:style-name="T189">7</text:span> explaining that <text:span text:style-name="T189">array</text:span> elements can be constants:</text:p>
      <text:p text:style-name="P25"><text:span text:style-name="Strong_20_Emphasis">An expression accessing an element of an array using the subscript operator is a </text:span><text:span text:style-name="Strong_20_Emphasis"><text:span text:style-name="T71">named </text:span></text:span><text:span text:style-name="Strong_20_Emphasis"><text:span text:style-name="T63">constant</text:span></text:span><text:span text:style-name="Strong_20_Emphasis"> if the </text:span><text:span text:style-name="Strong_20_Emphasis"><text:span text:style-name="T190">pointer-typed operand is an identifier that was </text:span></text:span><text:span text:style-name="Strong_20_Emphasis">declared with the </text:span><text:span text:style-name="Source_20_Text">constexpr</text:span><text:span text:style-name="Strong_20_Emphasis"> storage-class specifier</text:span><text:span text:style-name="Strong_20_Emphasis"><text:span text:style-name="T190"> and complete array type</text:span></text:span><text:span text:style-name="Strong_20_Emphasis"><text:span text:style-name="T192">footnote)</text:span></text:span><text:span text:style-name="Strong_20_Emphasis">, and the </text:span><text:soft-page-break/><text:span text:style-name="Strong_20_Emphasis">subscript index is an integer constant expression </text:span><text:span text:style-name="Strong_20_Emphasis"><text:span text:style-name="T190">greater than or equal to zero and less than the declared length of </text:span></text:span><text:span text:style-name="Strong_20_Emphasis"><text:span text:style-name="T135">the array </text:span></text:span><text:span text:style-name="Strong_20_Emphasis"><text:span text:style-name="T190">type</text:span></text:span><text:span text:style-name="Strong_20_Emphasis">.</text:span></text:p>
      <text:p text:style-name="P52"><text:span text:style-name="Strong_20_Emphasis"><text:span text:style-name="T44">footnote) before any parameter type adjustment.</text:span></text:span></text:p>
      <text:p text:style-name="P67">Add a new paragraph after paragraph 7:</text:p>
      <text:p text:style-name="P24">Within the return expression of a constexpr function <text:span text:style-name="T200">and within the array size expressions of any parameters</text:span> (but not within any declarations within the function body), the function parameter identifiers are treated as though they were declared with the <text:span text:style-name="T7">constexpr</text:span> storage-class specifier and function as <text:span text:style-name="T63">named constants</text:span><text:span text:style-name="T78">.</text:span></text:p>
      <text:p text:style-name="P26">Paragraph <text:span text:style-name="T190">8</text:span>, include function calls returning integer values:</text:p>
      <text:p text:style-name="P52">An integer constant expression 1<text:span text:style-name="T190">32</text:span>) shall have integer type and shall only have operands that are integer constants, named and compound literal constants of integer type, character constants, <text:span text:style-name="T7">sizeof</text:span> expressions whose results are integer constants, <text:span text:style-name="T7">alignof</text:span> expressions, and floating, named, <text:span text:style-name="T117">calls to constexpr functions that return a value with integer type</text:span><text:span text:style-name="T101">,</text:span> or compound literal constants of arithmetic type that are the immediate operands of casts. Cast operators in an integer constant expression shall only convert arithmetic types to integer types, except as part of an operand to the typeof operators, <text:span text:style-name="T7">sizeof</text:span> operator, or <text:span text:style-name="T7">alignof</text:span> operator.</text:p>
      <text:p text:style-name="P26">Paragraph 8, include function calls:</text:p>
      <text:p text:style-name="P53">An <text:span text:style-name="T63">arithmetic constant expression</text:span> shall have arithmetic type and shall only have operands that are integer constants, floating constants, named or compound literal constants of arithmetic type, char<text:span text:style-name="T137">acter constants, </text:span><text:span text:style-name="T35">sizeof</text:span><text:span text:style-name="T137"> expressions whose results are integer constants, </text:span><text:span text:style-name="T35">alignof</text:span><text:span text:style-name="T137"> expressions</text:span><text:span text:style-name="T101">, and calls to </text:span><text:span text:style-name="Source_20_Text"><text:span text:style-name="T101">constexpr</text:span></text:span><text:span text:style-name="T101"> functions that return a value with arithmetic type.</text:span><text:span text:style-name="T137"> Cast operators in an arithmetic constant expression shall only convert arithmetic types to arithmetic types, except as part of an operand to the typeof operators, </text:span><text:span text:style-name="T35">sizeof</text:span><text:span text:style-name="T137"> operator, or </text:span><text:span text:style-name="T35">alignof</text:span><text:span text:style-name="T137"> operator.</text:span></text:p>
      <text:p text:style-name="P26">Paragraph <text:span text:style-name="T198">12</text:span>, <text:span text:style-name="T136">modify dereferencing rules to allow member/element access:</text:span></text:p>
      <text:p text:style-name="P25">but the value of an object shall not be accessed by use of <text:span text:style-name="T101">the </text:span><text:span text:style-name="T20">*</text:span><text:span text:style-name="T101"> </text:span><text:span text:style-name="T106">or </text:span><text:span text:style-name="T21">-&gt;</text:span> operators <text:span text:style-name="T47">footnote</text:span><text:span text:style-name="T48">1</text:span><text:span text:style-name="T47">)</text:span>. <text:s/><text:span text:style-name="T107">A value may be </text:span><text:span text:style-name="T108">accessed by use of the subscript operator if its </text:span><text:span text:style-name="T118">pointer</text:span><text:span text:style-name="T108">-</text:span><text:span text:style-name="T118">typed </text:span><text:span text:style-name="T108">operand is an address constant designating a </text:span><text:span text:style-name="T22">constexpr</text:span><text:span text:style-name="T108"> array with static storage duration </text:span><text:span text:style-name="T48">footnote2)</text:span><text:span text:style-name="T108">.</text:span></text:p>
      <text:p text:style-name="P25"><text:span text:style-name="Strong_20_Emphasis"><text:span text:style-name="T41">footnote</text:span></text:span><text:span text:style-name="Strong_20_Emphasis"><text:span text:style-name="T42">1</text:span></text:span><text:span text:style-name="Strong_20_Emphasis"><text:span text:style-name="T41">) therefore a </text:span></text:span><text:span text:style-name="Strong_20_Emphasis"><text:span text:style-name="T11">constexpr</text:span></text:span><text:span text:style-name="Strong_20_Emphasis"><text:span text:style-name="T41"> function may receive a</text:span></text:span><text:span text:style-name="Strong_20_Emphasis"><text:span text:style-name="T47">n address constant</text:span></text:span><text:span text:style-name="Strong_20_Emphasis"><text:span text:style-name="T41"> as an argument, but may not dereference it using </text:span></text:span><text:span text:style-name="Strong_20_Emphasis"><text:span text:style-name="T11">*</text:span></text:span><text:span text:style-name="Strong_20_Emphasis"><text:span text:style-name="T41">.</text:span></text:span></text:p>
      <text:p text:style-name="P25"><text:span text:style-name="Strong_20_Emphasis"><text:span text:style-name="T42">footnote2) to designate a </text:span></text:span><text:span text:style-name="Strong_20_Emphasis"><text:span text:style-name="T12">constexpr</text:span></text:span><text:span text:style-name="Strong_20_Emphasis"><text:span text:style-name="T42"> array, the array must have already been defined and initialized before the subscript operator expression is evaluated, because a </text:span></text:span><text:span text:style-name="Strong_20_Emphasis"><text:span text:style-name="T12">constexpr</text:span></text:span><text:span text:style-name="Strong_20_Emphasis"><text:span text:style-name="T42"> object declaration is a definition; </text:span></text:span><text:span text:style-name="Strong_20_Emphasis"><text:span text:style-name="T43">or be a parameter of a constexpr function declared with complete array type.</text:span></text:span></text:p>
      <text:p text:style-name="P26"><text:span text:style-name="Strong_20_Emphasis"><text:span text:style-name="T138">Add </text:span></text:span><text:span text:style-name="Strong_20_Emphasis"><text:span text:style-name="T144">a</text:span></text:span><text:span text:style-name="Strong_20_Emphasis"><text:span text:style-name="T138"> new paragraph after paragraph </text:span></text:span><text:span text:style-name="Strong_20_Emphasis"><text:span text:style-name="T144">12</text:span></text:span><text:span text:style-name="Strong_20_Emphasis"><text:span text:style-name="T138">:</text:span></text:span></text:p>
      <text:p text:style-name="P25"><text:span text:style-name="Strong_20_Emphasis">An address constant may be retur</text:span><text:span text:style-name="Strong_20_Emphasis"><text:span text:style-name="T101">ned from a </text:span></text:span><text:span text:style-name="Source_20_Text"><text:span text:style-name="T101">constexpr</text:span></text:span><text:span text:style-name="Strong_20_Emphasis"><text:span text:style-name="T101"> function and </text:span></text:span><text:span text:style-name="Strong_20_Emphasis"><text:span text:style-name="T109">if so </text:span></text:span><text:span text:style-name="Strong_20_Emphasis"><text:span text:style-name="T101">remain</text:span></text:span><text:span text:style-name="Strong_20_Emphasis"><text:span text:style-name="T109">s</text:span></text:span><text:span text:style-name="Strong_20_Emphasis"><text:span text:style-name="T101"> an address constant </text:span></text:span><text:span text:style-name="Strong_20_Emphasis"><text:span text:style-name="T109">in the calling context</text:span></text:span><text:span text:style-name="Strong_20_Emphasis"><text:span text:style-name="T101">.</text:span></text:span></text:p>
      <text:p text:style-name="P26"><text:span text:style-name="Strong_20_Emphasis"><text:span text:style-name="T137">Add </text:span></text:span><text:span text:style-name="Strong_20_Emphasis"><text:span text:style-name="T139">a forward reference:</text:span></text:span></text:p>
      <text:p text:style-name="P25"><text:soft-page-break/><text:span text:style-name="Strong_20_Emphasis"><text:span text:style-name="T137">array declarators (6.7.6.2), </text:span></text:span><text:span text:style-name="Strong_20_Emphasis">function specifiers (6.7.4),</text:span><text:span text:style-name="Strong_20_Emphasis"><text:span text:style-name="T137"> initialization (6.7.9).</text:span></text:span></text:p>
      <text:p text:style-name="P26">Modify 6.7.1 "Storage-class specifiers":</text:p>
      <text:p text:style-name="P26">Add <text:span text:style-name="T156">one</text:span> new paragraph after paragraph 5:</text:p>
      <text:p text:style-name="P25"><text:span text:style-name="Strong_20_Emphasis">The </text:span><text:span text:style-name="Source_20_Text">constexpr</text:span><text:span text:style-name="Strong_20_Emphasis"> specifier is treated as a function specifier when applied to a function declaration.</text:span></text:p>
      <text:p text:style-name="P26">Add a forward reference:</text:p>
      <text:p text:style-name="P25">type definitions (6.7.8)<text:span text:style-name="Strong_20_Emphasis">, function specifiers (6.7.4)</text:span>.</text:p>
      <text:p text:style-name="P26">Modify 6.7.4 "Function specifiers":</text:p>
      <text:p text:style-name="P26">Paragraph 1, add the <text:span text:style-name="Source_20_Text">constexpr</text:span> specifier:</text:p>
      <text:p text:style-name="P25"><text:span text:style-name="Emphasis">function-specifier</text:span>:<text:line-break/><text:span text:style-name="Source_20_Text">inline</text:span><text:line-break/><text:span text:style-name="Source_20_Text">_Noreturn</text:span><text:line-break/><text:span text:style-name="Source_20_Text"><text:span text:style-name="T101">constexpr</text:span></text:span></text:p>
      <text:p text:style-name="P26">Add <text:span text:style-name="T147">four</text:span> new paragraphs after paragraph 3:</text:p>
      <text:p text:style-name="P25"><text:span text:style-name="Strong_20_Emphasis">A function declared with the </text:span><text:span text:style-name="Source_20_Text">constexpr</text:span><text:span text:style-name="Strong_20_Emphasis"> function specifier shall </text:span><text:span text:style-name="Strong_20_Emphasis"><text:span text:style-name="T110">not have </text:span></text:span><text:span text:style-name="Strong_20_Emphasis"><text:span text:style-name="T23">void</text:span></text:span><text:span text:style-name="Strong_20_Emphasis"><text:span text:style-name="T110"> return type</text:span></text:span><text:span text:style-name="Strong_20_Emphasis">.</text:span></text:p>
      <text:p text:style-name="P25"><text:span text:style-name="Strong_20_Emphasis">A function </text:span><text:span text:style-name="Strong_20_Emphasis"><text:span text:style-name="T111">defined</text:span></text:span><text:span text:style-name="Strong_20_Emphasis"> with the </text:span><text:span text:style-name="Source_20_Text">constexpr</text:span><text:span text:style-name="Strong_20_Emphasis"> function specifier shall </text:span><text:span text:style-name="Strong_20_Emphasis"><text:span text:style-name="T148">return a value, and shall </text:span></text:span><text:span text:style-name="Strong_20_Emphasis">contain only:</text:span></text:p>
      <text:list text:style-name="L3">
        <text:list-item>
          <text:p text:style-name="P79"><text:span text:style-name="Strong_20_Emphasis">null statements</text:span> </text:p>
        </text:list-item>
        <text:list-item>
          <text:p text:style-name="P79"><text:span text:style-name="Strong_20_Emphasis">static assertions</text:span> </text:p>
        </text:list-item>
        <text:list-item>
          <text:p text:style-name="P79"><text:span text:style-name="Strong_20_Emphasis">typedef </text:span><text:span text:style-name="Strong_20_Emphasis"><text:span text:style-name="T199">and tag</text:span></text:span><text:span text:style-name="Strong_20_Emphasis"> declaratio</text:span><text:span text:style-name="Strong_20_Emphasis"><text:span text:style-name="T101">ns</text:span></text:span><text:span text:style-name="T101"> </text:span></text:p>
        </text:list-item>
        <text:list-item>
          <text:p text:style-name="P83">definitions of objects with the <text:span text:style-name="T7">constexpr</text:span> storage class</text:p>
        </text:list-item>
        <text:list-item>
          <text:p text:style-name="P80"><text:span text:style-name="Strong_20_Emphasis"><text:span text:style-name="T101">a single return statement, w</text:span></text:span><text:span text:style-name="Strong_20_Emphasis">hich evaluates a constant-expression </text:span><text:span text:style-name="Strong_20_Emphasis"><text:span text:style-name="T134">according to the rules of 6.6, </text:span></text:span><text:span text:style-name="Strong_20_Emphasis"><text:span text:style-name="T105">treating</text:span></text:span><text:span text:style-name="Strong_20_Emphasis"> the parameters of the function as </text:span><text:span text:style-name="Strong_20_Emphasis"><text:span text:style-name="T72">named </text:span></text:span><text:span text:style-name="Strong_20_Emphasis"><text:span text:style-name="T63">constant</text:span></text:span><text:span text:style-name="Strong_20_Emphasis"> expressions </text:span><text:span text:style-name="Strong_20_Emphasis"><text:span text:style-name="T105">within</text:span></text:span><text:span text:style-name="Strong_20_Emphasis"> th</text:span><text:span text:style-name="Strong_20_Emphasis"><text:span text:style-name="T101">e </text:span></text:span><text:span text:style-name="Source_20_Text"><text:span text:style-name="T101">return</text:span></text:span><text:span text:style-name="Source_20_Text"><text:span text:style-name="T59"> </text:span></text:span><text:span text:style-name="Source_20_Text"><text:span text:style-name="T193">footnote)</text:span></text:span><text:span text:style-name="Strong_20_Emphasis"><text:span text:style-name="T101">.</text:span></text:span></text:p>
          <text:p text:style-name="P81"><text:span text:style-name="Strong_20_Emphasis"><text:span text:style-name="T39">footnote) the parameters are not treated as </text:span></text:span><text:span text:style-name="Strong_20_Emphasis"><text:span text:style-name="T50">named </text:span></text:span><text:span text:style-name="Strong_20_Emphasis"><text:span text:style-name="T51">constant</text:span></text:span><text:span text:style-name="Strong_20_Emphasis"><text:span text:style-name="T50">s</text:span></text:span><text:span text:style-name="Strong_20_Emphasis"><text:span text:style-name="T52"> </text:span></text:span><text:span text:style-name="Strong_20_Emphasis"><text:span text:style-name="T39">within any static assertions </text:span></text:span><text:span text:style-name="Strong_20_Emphasis"><text:span text:style-name="T40">or declarations</text:span></text:span><text:span text:style-name="Strong_20_Emphasis"><text:span text:style-name="T39">, only within the </text:span></text:span><text:span text:style-name="Strong_20_Emphasis"><text:span text:style-name="T13">return</text:span></text:span><text:span text:style-name="Strong_20_Emphasis"><text:span text:style-name="T39"> statement.</text:span></text:span></text:p>
          <text:p text:style-name="P81"><text:span text:style-name="Strong_20_Emphasis">If any declaration of a function has a </text:span><text:span text:style-name="Strong_20_Emphasis"><text:span text:style-name="T7">constexpr</text:span></text:span><text:span text:style-name="Strong_20_Emphasis"> specifier, then all </text:span><text:span text:style-name="Strong_20_Emphasis"><text:span text:style-name="T150">of </text:span></text:span><text:span text:style-name="Strong_20_Emphasis">its declarations shall contain </text:span><text:span text:style-name="Strong_20_Emphasis"><text:span text:style-name="T150">a </text:span></text:span><text:span text:style-name="Strong_20_Emphasis"><text:span text:style-name="T24">constexpr</text:span></text:span><text:span text:style-name="Strong_20_Emphasis"> specifier.</text:span></text:p>
          <text:p text:style-name="P81"><text:span text:style-name="Strong_20_Emphasis"><text:span text:style-name="T147">Any array types specified within the prototype or body of a constexpr function shall not be variably-modified, except that the expression specifying the array size </text:span></text:span><text:span text:style-name="Strong_20_Emphasis"><text:span text:style-name="T200">of a parameter</text:span></text:span><text:span text:style-name="Strong_20_Emphasis"><text:span text:style-name="T147"> may </text:span></text:span><text:span text:style-name="Strong_20_Emphasis"><text:span text:style-name="T112">treat</text:span></text:span><text:span text:style-name="Strong_20_Emphasis"><text:span text:style-name="T147"> the function parameters as constant primary identifier expressions </text:span></text:span><text:span text:style-name="Strong_20_Emphasis"><text:span text:style-name="T194">footnote)</text:span></text:span><text:span text:style-name="Strong_20_Emphasis"><text:span text:style-name="T147">.</text:span></text:span></text:p>
          <text:p text:style-name="P82"><text:span text:style-name="Strong_20_Emphasis"><text:span text:style-name="T38">footnote) implying that for calls with constant arguments the declared size of the array parameter is statically known even if it depends on the value of other parameters.</text:span></text:span></text:p>
        </text:list-item>
      </text:list>
      <text:p text:style-name="P26">Add <text:span text:style-name="T151">five </text:span>new paragraphs after paragraph <text:span text:style-name="T201">8</text:span>:</text:p>
      <text:p text:style-name="P25"><text:soft-page-break/><text:span text:style-name="Strong_20_Emphasis">A function declared with a </text:span><text:span text:style-name="Source_20_Text">constexpr</text:span><text:span text:style-name="Strong_20_Emphasis"> function specifier is a constexpr function. A call to a constexpr function identifier with arguments that are all constant expressions is itself a constant expression </text:span><text:span text:style-name="Strong_20_Emphasis"><text:span text:style-name="T151">of the same </text:span></text:span><text:span text:style-name="Strong_20_Emphasis"><text:span text:style-name="T202">category</text:span></text:span><text:span text:style-name="Strong_20_Emphasis"><text:span text:style-name="T151"> as its return expression</text:span></text:span><text:span text:style-name="Strong_20_Emphasis">, and may be </text:span><text:span text:style-name="Strong_20_Emphasis"><text:span text:style-name="T113">called</text:span></text:span><text:span text:style-name="Strong_20_Emphasis"> in contexts such as static assertions or initialization of ob</text:span><text:span text:style-name="Strong_20_Emphasis"><text:span text:style-name="T149">j</text:span></text:span><text:span text:style-name="Strong_20_Emphasis">ects with static storage duration after it has been defined.</text:span></text:p>
      <text:p text:style-name="P25"><text:span text:style-name="Strong_20_Emphasis"><text:span text:style-name="T151">A constexpr function whose return expression is an integer constant expression and has an integer return type returns an integer constant expression, </text:span></text:span><text:span text:style-name="Strong_20_Emphasis"><text:span text:style-name="T203">and a</text:span></text:span><text:span text:style-name="Strong_20_Emphasis"><text:span text:style-name="T152"> constexpr function whose return expression is a null pointer constant and has the same return type returns a null pointer constant.</text:span></text:span></text:p>
      <text:p text:style-name="P25"><text:span text:style-name="Strong_20_Emphasis"><text:span text:style-name="T151">An implementation may allow constexpr functions to return </text:span></text:span><text:span text:style-name="Strong_20_Emphasis"><text:span text:style-name="T204">additional</text:span></text:span><text:span text:style-name="Strong_20_Emphasis"><text:span text:style-name="T151"> </text:span></text:span><text:span text:style-name="Strong_20_Emphasis"><text:span text:style-name="T204">categories</text:span></text:span><text:span text:style-name="Strong_20_Emphasis"><text:span text:style-name="T151"> of constant expression </text:span></text:span><text:span text:style-name="Strong_20_Emphasis"><text:span text:style-name="T204">that</text:span></text:span><text:span text:style-name="Strong_20_Emphasis"><text:span text:style-name="T151"> it </text:span></text:span><text:span text:style-name="Strong_20_Emphasis"><text:span text:style-name="T204">defines </text:span></text:span><text:span text:style-name="Strong_20_Emphasis"><text:span text:style-name="T153">(</text:span></text:span><text:span text:style-name="Strong_20_Emphasis"><text:span text:style-name="T151">6.6</text:span></text:span><text:span text:style-name="Strong_20_Emphasis"><text:span text:style-name="T153">)</text:span></text:span><text:span text:style-name="Strong_20_Emphasis"><text:span text:style-name="T151">.</text:span></text:span></text:p>
      <text:p text:style-name="P25"><text:span text:style-name="Strong_20_Emphasis">A constexpr function does not modify </text:span><text:span text:style-name="Strong_20_Emphasis"><text:span text:style-name="T149">any state, </text:span></text:span><text:span text:style-name="Strong_20_Emphasis">or observe any state outside of its own argument </text:span><text:span text:style-name="Strong_20_Emphasis"><text:span text:style-name="T149">values</text:span></text:span><text:span text:style-name="Strong_20_Emphasis">. </text:span><text:span text:style-name="Strong_20_Emphasis"><text:span text:style-name="T205">Any constexpr function may be declared with the </text:span></text:span><text:span text:style-name="Strong_20_Emphasis"><text:span text:style-name="T36">[[unsequenced]]</text:span></text:span><text:span text:style-name="Strong_20_Emphasis"><text:span text:style-name="T205"> attribute and fulfils its requirements.</text:span></text:span></text:p>
      <text:p text:style-name="P25"><text:span text:style-name="Strong_20_Emphasis">A constexpr function is implicitly also an inline function.</text:span></text:p>
      <text:p text:style-name="P26">Add a NOTE:</text:p>
      <text:p text:style-name="P25"><text:span text:style-name="Strong_20_Emphasis">NOTE: a constexpr function may also be called with non-constant values or have its address taken, in which case it behaves like any other function. </text:span><text:span text:style-name="Strong_20_Emphasis"><text:span text:style-name="T150">The type of the function is not affected by the </text:span></text:span><text:span text:style-name="Strong_20_Emphasis"><text:span text:style-name="T24">constexpr</text:span></text:span><text:span text:style-name="Strong_20_Emphasis"><text:span text:style-name="T150"> specifier.</text:span></text:span></text:p>
      <text:p text:style-name="P25"><text:span text:style-name="Strong_20_Emphasis"><text:span text:style-name="T154">NOTE: the </text:span></text:span><text:span text:style-name="Strong_20_Emphasis"><text:span text:style-name="T25">constexpr</text:span></text:span><text:span text:style-name="Strong_20_Emphasis"><text:span text:style-name="T154"> specifier may be applied to a forward definition, but a call to it is not a constant expression unless the definition is visible </text:span></text:span><text:span text:style-name="Strong_20_Emphasis"><text:span text:style-name="T114">when </text:span></text:span><text:span text:style-name="Strong_20_Emphasis"><text:span text:style-name="T134">the outermost constant-expression containing the (possibly-nested) call </text:span></text:span><text:span text:style-name="Strong_20_Emphasis"><text:span text:style-name="T155">is evaluated.</text:span></text:span></text:p>
      <text:p text:style-name="P26"><text:span text:style-name="Strong_20_Emphasis"><text:span text:style-name="T140">Add a Recommended Practice:</text:span></text:span></text:p>
      <text:p text:style-name="P25"><text:span text:style-name="Strong_20_Emphasis"><text:span text:style-name="T102">Recommended Practice</text:span></text:span></text:p>
      <text:p text:style-name="P54"><text:span text:style-name="Strong_20_Emphasis"><text:span text:style-name="T102">Implementations are encouraged to issue a diagnostic message when a constexpr function is called with constant arguments and the definition is not visible, </text:span></text:span><text:span text:style-name="Strong_20_Emphasis"><text:span text:style-name="T120">as this is n</text:span></text:span><text:span text:style-name="Strong_20_Emphasis"><text:span text:style-name="T121">ever</text:span></text:span><text:span text:style-name="Strong_20_Emphasis"><text:span text:style-name="T120"> a constant expression</text:span></text:span><text:span text:style-name="Strong_20_Emphasis"><text:span text:style-name="T102">.</text:span></text:span></text:p>
      <text:p text:style-name="P51"><text:span text:style-name="Strong_20_Emphasis"><text:span text:style-name="T146">Add an example:</text:span></text:span></text:p>
      <text:p text:style-name="P50"><text:span text:style-name="Strong_20_Emphasis"><text:span text:style-name="T122">EXAMPLE 2 <text:s/>A constexpr function can be called as part of a constant expression from a call site appearing syntactically before its definition, so long as the originating call appears after the definition:</text:span></text:span></text:p>
      <text:p text:style-name="Preformatted_20_Text"><text:span text:style-name="Strong_20_Emphasis"><text:tab/>constexpr int inner (int x);</text:span></text:p>
      <text:p text:style-name="Preformatted_20_Text"><text:span text:style-name="Strong_20_Emphasis"/></text:p>
      <text:p text:style-name="Preformatted_20_Text"><text:span text:style-name="Strong_20_Emphasis"><text:tab/></text:span><text:span text:style-name="Strong_20_Emphasis"><text:span text:style-name="T206">constexpr int outer (int x) {</text:span></text:span></text:p>
      <text:p text:style-name="Preformatted_20_Text"><text:span text:style-name="Strong_20_Emphasis"><text:tab/> <text:s/></text:span><text:span text:style-name="Strong_20_Emphasis"><text:span text:style-name="T206">return inner (x + 1); // </text:span></text:span></text:p>
      <text:p text:style-name="Preformatted_20_Text"><text:span text:style-name="Strong_20_Emphasis"><text:s text:c="6"/></text:span><text:span text:style-name="Strong_20_Emphasis"><text:span text:style-name="T206">}</text:span></text:span></text:p>
      <text:p text:style-name="Preformatted_20_Text"><text:span text:style-name="Strong_20_Emphasis"><text:tab/></text:span><text:span text:style-name="Strong_20_Emphasis"><text:span text:style-name="T206">static_assert (outer (3) == 6); // not a constant expression</text:span></text:span></text:p>
      <text:p text:style-name="Preformatted_20_Text"><text:span text:style-name="Strong_20_Emphasis"><text:tab/> <text:s text:c="31"/>// </text:span><text:span text:style-name="Strong_20_Emphasis"><text:span text:style-name="T206">because inner is not yet defined</text:span></text:span></text:p>
      <text:p text:style-name="Preformatted_20_Text"><text:span text:style-name="Strong_20_Emphasis"/></text:p>
      <text:p text:style-name="Preformatted_20_Text"><text:span text:style-name="Strong_20_Emphasis"><text:tab/></text:span><text:span text:style-name="Strong_20_Emphasis"><text:span text:style-name="T206">constexpr int inner (int x) {</text:span></text:span></text:p>
      <text:p text:style-name="P49"><text:span text:style-name="Strong_20_Emphasis"><text:tab/> </text:span><text:span text:style-name="Strong_20_Emphasis"><text:span text:style-name="T101"><text:s/></text:span></text:span><text:span text:style-name="Strong_20_Emphasis"><text:span text:style-name="T122">return x + 2;</text:span></text:span></text:p>
      <text:p text:style-name="P23"><text:tab/><text:span text:style-name="T206">}</text:span></text:p>
      <text:p text:style-name="P23"><text:soft-page-break/><text:tab/><text:span text:style-name="T206">static_assert (outer (3) == 6); // valid constant expression, </text:span><text:span text:style-name="T207">because</text:span></text:p>
      <text:p text:style-name="P23"><text:tab/> <text:s text:c="31"/>// <text:span text:style-name="T206">inner is defined before use </text:span><text:span text:style-name="T207">by outer</text:span></text:p>
      <text:p text:style-name="Preformatted_20_Text"><text:span text:style-name="Strong_20_Emphasis"/></text:p>
      <text:p text:style-name="P68"><text:span text:style-name="Strong_20_Emphasis"><text:span text:style-name="T145">Add a forward reference:</text:span></text:span></text:p>
      <text:p text:style-name="Quotations"><text:span text:style-name="Strong_20_Emphasis"><text:span text:style-name="T137">Forward references: function definitions (6.9.1</text:span></text:span><text:span text:style-name="Strong_20_Emphasis"><text:span text:style-name="T145">)</text:span></text:span><text:span text:style-name="Strong_20_Emphasis"><text:span text:style-name="T119">, Attributes (6.7.12)</text:span></text:span><text:span text:style-name="Strong_20_Emphasis"><text:span text:style-name="T145">.</text:span></text:span></text:p>
      <text:p text:style-name="P47"><text:span text:style-name="Strong_20_Emphasis"><text:span text:style-name="T143">No modifications are made to the Standard Library.</text:span></text:span></text:p>
      <text:h text:style-name="P74" text:outline-level="3"><text:span text:style-name="T123">5</text:span><text:span text:style-name="T53">. Tail-Call Elimination</text:span></text:h>
      <text:h text:style-name="P75" text:outline-level="3">Introduction</text:h>
      <text:p text:style-name="P41">C's function activation records implicitly form a stack, regardless of the underlying implementation of function calls or the depth of calls which the platform can support.</text:p>
      <text:p text:style-name="P41">Keeping all activation records suspended but alive until their callees have returned prevents programs from transferring control directly when a function's work is already done. This is not a huge obstacle for hand-written C code, but is a major barrier for languages that compile to C <text:span text:style-name="T170">(which cannot then generally represent their function calls as native C function calls),</text:span> or for interop with languages that do support this feature.</text:p>
      <text:p text:style-name="P41"><text:span text:style-name="T158">This Specification </text:span>add<text:span text:style-name="T158">s</text:span> the ability to explicitly, directly transfer control to another function without returning, as an alternative to nested function calls.</text:p>
      <text:p text:style-name="P31">This feature was previously discussed during the January 2022 meeting of WG14, and the meeting established some starting directions for the feature set:</text:p>
      <text:list text:style-name="L4">
        <text:list-item>
          <text:p text:style-name="P89">there was not consensus to add the feature to C23;</text:p>
        </text:list-item>
        <text:list-item>
          <text:p text:style-name="P89">there was direction to continue gathering implementation experience;</text:p>
        </text:list-item>
        <text:list-item>
          <text:p text:style-name="P89">there was direction to establish what impact (if any) the feature has on existing ABIs.</text:p>
        </text:list-item>
      </text:list>
      <text:p text:style-name="P69">Since the principal implementation obstacles are in ABI and calling convention, both of which are currently out of scope for the Standard and are not defined by C23, the preference of the Committee was that a tool should be able to reject a tail call for any implementation-defined reason. This also allows a tool to simply not support tail calls at all, so long as it emits a diagnostic and does <text:span text:style-name="T63">not</text:span><text:span text:style-name="T78"> silently compile the </text:span><text:span text:style-name="T15">return goto</text:span><text:span text:style-name="T78"> statement as though it was a simple </text:span><text:span text:style-name="T15">return</text:span><text:span text:style-name="T78"> statement</text:span>.</text:p>
      <text:p text:style-name="P14">The rationale and prior art for tail-call elimination on return statements is explained <text:span text:style-name="T159">and discussed</text:span> in WG14 document <text:a xlink:type="simple" xlink:href="http://www.open-std.org/jtc1/sc22/wg14/www/docs/n2920.pdf" text:style-name="Internet_20_link" text:visited-style-name="Visited_20_Internet_20_Link">n2920</text:a>.</text:p>
      <text:p text:style-name="P14">A deeper understanding of tail-call elimination in general can be obtained from <text:a xlink:type="simple" xlink:href="https://small.r7rs.org/attachment/r7rs.pdf" text:style-name="Internet_20_link" text:visited-style-name="Visited_20_Internet_20_Link">the specification of the Scheme programming language</text:a>, which mandates its support.</text:p>
      <text:h text:style-name="P76" text:outline-level="3">5.1 Overview of tail-call elimination in C</text:h>
      <text:p text:style-name="P42">For the purpose of this Specification, a <text:span text:style-name="T63">tail-call</text:span><text:span text:style-name="T78"> is a call to a function that consists of the entire (after stripping parentheses) operand to a </text:span><text:span text:style-name="T15">return goto</text:span><text:span text:style-name="T78"> statement.</text:span></text:p>
      <text:p text:style-name="P43"><text:span text:style-name="T78">Although most of the research on tail-calls in C functions has been into identifying implicit </text:span><text:span text:style-name="T63">tail-calls</text:span><text:span text:style-name="T78"> for the purposes of optimization, this Specification is only concerned with explicit </text:span><text:span text:style-name="T63">tail-calls</text:span><text:span text:style-name="T78"> requested by means of the </text:span><text:span text:style-name="T15">return goto</text:span><text:span text:style-name="T78"> statement. </text:span><text:span text:style-name="T63">Tail-calls</text:span><text:span text:style-name="T78"> eliminated explicitly in this way </text:span><text:soft-page-break/><text:span text:style-name="T78">are </text:span><text:span text:style-name="T93">not</text:span><text:span text:style-name="T78"> an optimization, and directly affect the program semantics </text:span><text:span text:style-name="T83">in potentially-observable ways</text:span><text:span text:style-name="T78">. </text:span><text:span text:style-name="T90">For this reason a new statement kind, the </text:span><text:span text:style-name="T17">return goto</text:span><text:span text:style-name="T90"> subtype of the </text:span><text:span text:style-name="T17">return</text:span><text:span text:style-name="T90"> statement, is needed, as an attribute cannot impose the required change in behaviour of a normal </text:span><text:span text:style-name="T17">return</text:span><text:span text:style-name="T90"> statement.</text:span></text:p>
      <text:p text:style-name="P15"><text:span text:style-name="T78">Entry to a </text:span><text:span text:style-name="T63">tail-call</text:span><text:span text:style-name="T78"> ends the lifetime of the calling function’s activation record, and must free any resources created by that function call. This moves the end of lifetime of automatic objects with block scope defined within the caller to immediately </text:span><text:span text:style-name="T63">before</text:span><text:span text:style-name="T78"> entry to the function being called in tail position. This does not introduce any new undefined behaviours directly, but does mean that pointers to objects in the calling activation record become invalid before the </text:span><text:span text:style-name="T63">tail-call</text:span><text:span text:style-name="T78"> itself.</text:span></text:p>
      <text:p text:style-name="P15"><text:span text:style-name="T78">The expression in tail position must not require any additional work to be done after the function returns within the body of the caller, </text:span><text:span text:style-name="T86">because the caller will not be re-entered</text:span><text:span text:style-name="T78">. This means that as well as being a syntactic function call, the operand to </text:span><text:span text:style-name="T15">return goto</text:span><text:span text:style-name="T78"> must have a type exactly matching the return type of the calling function, without needing to undergo </text:span><text:span text:style-name="T63">any</text:span><text:span text:style-name="T78"> implicit conversions. Any implicit conversion, even if it would be a no-op, renders the operand an invalid </text:span><text:span text:style-name="T63">tail-call</text:span><text:span text:style-name="T78">.</text:span></text:p>
      <text:p text:style-name="P45"><text:span text:style-name="T87">In order to fully enforce this, t</text:span><text:span text:style-name="T78">he function called in tail position must have identical type to the callee. This ensures both that the return value does not require any conversion, and also that argument passing space is available and calling convention (if relevant) is maintained.</text:span></text:p>
      <text:p text:style-name="P15"><text:span text:style-name="T78">The implication of the requirement that all resources allocated by the immediate caller are freed right before entry </text:span><text:span text:style-name="T90">to the callee</text:span><text:span text:style-name="T78"> is that any sequence of </text:span><text:span text:style-name="T63">tail-calls</text:span><text:span text:style-name="T78"> will never overflow the implementation’s stack or otherwise cause resource exhaustion because of the calls themselves. An infinite sequence of </text:span><text:span text:style-name="T63">tail-calls</text:span><text:span text:style-name="T78"> is analogous to an infinite loop – although it may do other work that uses resources, it does not use resources itself by iterating.</text:span></text:p>
      <text:h text:style-name="P77" text:outline-level="3">5.1.1 Calling conventions and ABI</text:h>
      <text:p text:style-name="P44">No new ABI is introduced by this feature. Although the a function called from tail-position replaces its syntactic caller, entry re-uses the same argument and return space that was set up for that caller. Therefore, <text:span text:style-name="T161">whether a function ends in a tail call is not </text:span><text:span text:style-name="T141">generally </text:span><text:span text:style-name="T142">observable</text:span><text:span text:style-name="T161"> from “outside”. Because the called function must match the caller’s setup exactly, it must by definition have the same ABI and is also callable from any non-tail position, </text:span><text:span text:style-name="T162">making its potential status as a tail-call completely private </text:span><text:span text:style-name="T163">to the call context </text:span><text:span text:style-name="T162">and not observable from its definition or declaration at all</text:span><text:span text:style-name="T161">. </text:span><text:span text:style-name="T164">The caller and the callee may require a different static size for their activation records, but </text:span><text:span text:style-name="T165">there does not appear to be</text:span><text:span text:style-name="T164"> a target (where the stack discipline is actually implemented in a re-entrant way) where this would be problematic </text:span><text:span text:style-name="T160">(on targets with re-entrant stack disciplines, the top of the frame is always necessarily set </text:span><text:span text:style-name="T67">within</text:span><text:span text:style-name="T84"> the function body because it is not exposed by the type anyway; on those with non-contiguous stacks a different object is used; etc.)</text:span><text:span text:style-name="T164">.</text:span></text:p>
      <text:p text:style-name="P48">Any function which can be invoked by a <text:span text:style-name="T63">tail-call</text:span> may also be invoked by a function call in non-tail position. Any function which terminates in a <text:span text:style-name="T63">tail-call</text:span> may also terminate in a conventional <text:span text:style-name="T7">return</text:span> statement along a different conditional branch.</text:p>
      <text:p text:style-name="P45">During the January 2022 WG14 meeting it was pointed out that some targets use different calling conventions for the same function depending on whether the call is a “near call” (within the same TU) or a “far call” (callee is in another TU). If a function ends with a <text:span text:style-name="T63">tail-call</text:span><text:span text:style-name="T78"> to a “far” target, all </text:span><text:soft-page-break/><text:span text:style-name="T78">calls to the calling function themselves must become “far calls” so that </text:span><text:span text:style-name="T85">it can be perfectly replaced in-place. This means that a TU making </text:span><text:span text:style-name="T68">tail-calls</text:span><text:span text:style-name="T85"> to other functions in other TUs would need to be recompiled to ensure it contains no “near calls” to callers; </text:span><text:span text:style-name="T94">however</text:span><text:span text:style-name="T96">, the TU would also need to be recompiled in order to make use of the explicit tail call syntax, as the </text:span><text:span text:style-name="T19">return goto</text:span><text:span text:style-name="T96"> statement is not present in C23. (From outside the TU, all entry to such a function would be by “far call” anyway and therefore the ABI presented to other TUs would not change.) </text:span><text:span text:style-name="T98">It was not clear that this presents a blocking issue in practice.</text:span></text:p>
      <text:p text:style-name="P48"><text:span text:style-name="T96">S</text:span><text:span text:style-name="T95">ince a “near call” implies information from the function definition is visible to the compiler, no annotation of functions ending in a </text:span><text:span text:style-name="T18">return goto</text:span><text:span text:style-name="T95"> statement is required for them to rebuild such TUs correctly. The lack of annotation or any type-based distinction for callers ending in a proper </text:span><text:span text:style-name="T73">tail-call</text:span><text:span text:style-name="T95"> is preserved and the detail remains semantically private.</text:span></text:p>
      <text:p text:style-name="P46"><text:span text:style-name="T95">The principal ABI impact is on functions that currently use workarounds such as trampolining in order to emulate proper </text:span><text:span text:style-name="T73">tail-calls</text:span><text:span text:style-name="T95">. These functions incorporate the emulation into their ABI at present (signature</text:span><text:span text:style-name="T97">s that</text:span><text:span text:style-name="T95"> allow “return to next”). It is assumed that users of such functions actively </text:span><text:span text:style-name="T73">want</text:span><text:span text:style-name="T95"> their ABI to change and become seamless, once that becomes possible.</text:span></text:p>
      <text:p text:style-name="P70">It is not generally possible to perform a tail-call between functions that have different calling conventions. Although this is outside the scope of the Standard, by placing constraints on the type of the callee function as a whole (rather than expressing separate constraints against its return type and arguments), calling conventions will <text:span text:style-name="T166">implicitly </text:span>be <text:span text:style-name="T166">constrained </text:span>as well, because an implementation already has to treat them as <text:span text:style-name="T166">having </text:span>distin<text:span text:style-name="T166">ct</text:span> types, in order to emit correct code <text:span text:style-name="T166">(i.e. pointers to two functions with different conventions cannot be stored in the same pointer variable, the compiler must make a type-based distinction)</text:span>. <text:span text:style-name="T167">Because of this, specifics of the calling convention (“caller cleanup” vs “callee cleanup”, and so on) are not considered; so long as the constraint that the complete type of the function called in tail position matches </text:span><text:span text:style-name="T115">exactly</text:span><text:span text:style-name="T167"> is respected, these are expected to be respected by the callee.</text:span></text:p>
      <text:p text:style-name="P69">In general the feedback from the Committee was that implementations should be allowed to reject a requested tail call for any implementation-defined reason, including that the implementation is not able to emit tail calls in general. So long as the implementation rejects the program rather than accepting it with conventional return semantics (which would result in different resource usage and likely overflow), this is a safe implementation-defined behaviour to add and covers all cases where the call would be difficult to translate.</text:p>
      <text:h text:style-name="P76" text:outline-level="3">5.2 <text:span text:style-name="T100">Detailed changes to ISO/IEC 9899:2023</text:span></text:h>
      <text:p text:style-name="P12">Changes are relative to Working Draft <text:a xlink:type="simple" xlink:href="http://www.open-std.org/jtc1/sc22/wg14/www/docs/n3096.pdf" text:style-name="Internet_20_link" text:visited-style-name="Visited_20_Internet_20_Link"><text:span text:style-name="T208">n3096</text:span></text:a>.</text:p>
      <text:p text:style-name="P12">The modifications are ordered according to the clauses of ISO/IEC 9899:2023 to which they refer. If a clause of ISO/IEC 9899:2023 is not mentioned, no changes to that clause are needed. New clauses are indicated with <text:span text:style-name="T101">(NEW CLAUSE)</text:span>, however resulting changes in the existing numbering are not indicated; the clause number <text:span text:style-name="T63">mm.nn</text:span><text:span text:style-name="T101">a</text:span> of new clause indicates that this clause follows immediately clause <text:span text:style-name="T63">mm.nn</text:span> at the same level.</text:p>
      <text:p text:style-name="P19">Modify 6.2.4 "Storage durations of objects", <text:span text:style-name="T209">paragraph 6,</text:span> to clarify that some function calls do terminate execution:</text:p>
      <text:p text:style-name="P18"><text:soft-page-break/>For such an object that does not have a variable length array type, its lifetime extends from entry into the block with which it is associated until execution of that block ends in any way. (Entering an enclosed block or calling a function suspends, but does not end, execution of the current block <text:span text:style-name="Strong_20_Emphasis"><text:span text:style-name="T191">footnote)</text:span></text:span>.)</text:p>
      <text:p text:style-name="P18"><text:span text:style-name="Strong_20_Emphasis"><text:span text:style-name="T37">footnote: unless </text:span></text:span><text:span text:style-name="Strong_20_Emphasis"><text:span text:style-name="T45">e</text:span></text:span><text:span text:style-name="Strong_20_Emphasis"><text:span text:style-name="T49">ntry to </text:span></text:span><text:span text:style-name="Strong_20_Emphasis"><text:span text:style-name="T46">the call explicitly terminates execution of the current block with </text:span></text:span><text:span text:style-name="Source_20_Text"><text:span text:style-name="T46">return goto</text:span></text:span><text:span text:style-name="Strong_20_Emphasis"><text:span text:style-name="T46">.</text:span></text:span></text:p>
      <text:p text:style-name="P19">Add a forward reference to (new section) 6.8.6.4.1 in 6.2.4:</text:p>
      <text:p text:style-name="P18">Forward references: array declarators (6.7.6.2), compound literals (6.5.2.5), declarators (6.7.6), function calls (6.5.2.2), <text:span text:style-name="Strong_20_Emphasis">tail calls (6.8.6.4.1),</text:span> initialization (6.7.9), statements (6.8), effective type (6.5).</text:p>
      <text:p text:style-name="P19">Add a new footnote to 6.5.2.2 "Function calls" paragraph <text:span text:style-name="T209">8</text:span>, immediately after 10<text:span text:style-name="T209">6</text:span>:</text:p>
      <text:p text:style-name="P18">with respect to the execution of the called function. <text:span text:style-name="T191">10</text:span><text:span text:style-name="T195">6</text:span><text:span text:style-name="T191">)</text:span> <text:span text:style-name="Strong_20_Emphasis"><text:span text:style-name="T191">footnote)</text:span></text:span></text:p>
      <text:p text:style-name="P18"><text:span text:style-name="Strong_20_Emphasis"><text:span text:style-name="T37">footnote: </text:span></text:span><text:span text:style-name="Strong_20_Emphasis"><text:span text:style-name="T46">if the called function is assuming direct control with the </text:span></text:span><text:span text:style-name="Source_20_Text"><text:span text:style-name="T46">return goto</text:span></text:span><text:span text:style-name="Strong_20_Emphasis"><text:span text:style-name="T46"> statement, then no further operations in the caller will be evaluated after it is entered.</text:span></text:span></text:p>
      <text:p text:style-name="P19">Modify 6.8.6 "Jump statements" paragraph 1:</text:p>
      <text:p text:style-name="P18"><text:span text:style-name="Emphasis">jump-statement</text:span>:<text:line-break/><text:tab/><text:span text:style-name="Source_20_Text">go</text:span><text:span text:style-name="Source_20_Text"><text:span text:style-name="T124">to</text:span></text:span><text:span text:style-name="T124"> identifier </text:span><text:span text:style-name="Source_20_Text"><text:span text:style-name="T124">;</text:span></text:span><text:span text:style-name="T124"><text:line-break/><text:tab/></text:span><text:span text:style-name="Source_20_Text"><text:span text:style-name="T124">continue</text:span></text:span><text:span text:style-name="T124"> </text:span><text:span text:style-name="Source_20_Text"><text:span text:style-name="T124">;</text:span></text:span><text:span text:style-name="T124"><text:line-break/><text:tab/></text:span><text:span text:style-name="Source_20_Text"><text:span text:style-name="T124">break</text:span></text:span><text:span text:style-name="T124"> </text:span><text:span text:style-name="Source_20_Text"><text:span text:style-name="T124">;</text:span></text:span><text:span text:style-name="T124"><text:line-break/><text:tab/></text:span><text:span text:style-name="Source_20_Text"><text:span text:style-name="T124">return</text:span></text:span><text:span text:style-name="T124"> </text:span><text:span text:style-name="Emphasis"><text:span text:style-name="T124">expression</text:span></text:span><text:span text:style-name="T124"> opt </text:span><text:span text:style-name="Source_20_Text"><text:span text:style-name="T124">;</text:span></text:span><text:span text:style-name="T124"><text:line-break/><text:tab/></text:span><text:span text:style-name="Source_20_Text"><text:span text:style-name="T129">re</text:span></text:span><text:span text:style-name="Source_20_Text"><text:span text:style-name="T101">turn</text:span></text:span><text:span text:style-name="T101"> </text:span><text:span text:style-name="Source_20_Text"><text:span text:style-name="T101">goto</text:span></text:span><text:span text:style-name="T101"> </text:span><text:span text:style-name="Emphasis"><text:span text:style-name="T101">postfix-expression</text:span></text:span><text:span text:style-name="T101"> </text:span><text:span text:style-name="Source_20_Text"><text:span text:style-name="T101">;</text:span></text:span></text:p>
      <text:p text:style-name="P19"><text:span text:style-name="T116">(NEW CLAUSE)</text:span><text:span text:style-name="T168"> </text:span>Add a new section, 6.8.6.4.1 "The <text:span text:style-name="Source_20_Text">return goto</text:span> statement":</text:p>
      <text:h text:style-name="P78" text:outline-level="3"><text:bookmark text:name="68641-the-return-goto-statement"/>6.8.6.4.1 The <text:span text:style-name="Source_20_Text">return goto</text:span> statement</text:h>
      <text:p text:style-name="P18"><text:span text:style-name="Strong_20_Emphasis">Constraints</text:span></text:p>
      <text:p text:style-name="P18">The expression shall be a function call, optionally enclosed in parentheses. No other form of expression is permitted.</text:p>
      <text:p text:style-name="P27">Within the function call expression, the <text:span text:style-name="T63">postfix-expression</text:span><text:span text:style-name="T78"> designating the function to call shall have a type compatible with the type of a pointer to the function </text:span><text:span text:style-name="T88">whose definition </text:span><text:span text:style-name="T78">contain</text:span><text:span text:style-name="T88">s</text:span><text:span text:style-name="T78"> the statement.</text:span></text:p>
      <text:p text:style-name="P28"><text:span text:style-name="T78">Neither the function to call nor the containing function shall have a </text:span><text:span text:style-name="T88">parameter</text:span><text:span text:style-name="T78"> list </text:span><text:span text:style-name="T88">that terminates with an ellipsis</text:span><text:span text:style-name="T78">.</text:span></text:p>
      <text:p text:style-name="P59"><text:span text:style-name="T78">A conforming implementation may reject a </text:span><text:span text:style-name="T15">return goto</text:span><text:span text:style-name="T78"> statement for </text:span><text:span text:style-name="T92">additional</text:span><text:span text:style-name="T78"> implementation-defined reasons </text:span><text:span text:style-name="T197">footnote)</text:span><text:span text:style-name="T78">. An implementation </text:span><text:span text:style-name="T91">that rejects</text:span><text:span text:style-name="T78"> a </text:span><text:span text:style-name="T15">return goto</text:span><text:span text:style-name="T78"> statement </text:span><text:span text:style-name="T91">shall not translate it </text:span><text:span text:style-name="T78">as though it had been written as a </text:span><text:span text:style-name="T15">return</text:span><text:span text:style-name="T78"> statement.</text:span></text:p>
      <text:p text:style-name="P18"><text:span text:style-name="Strong_20_Emphasis">Semantics</text:span></text:p>
      <text:p text:style-name="P18"><text:soft-page-break/>A <text:span text:style-name="Source_20_Text">return goto</text:span> statement is a special case of the <text:span text:style-name="Source_20_Text">return</text:span> statement which terminates execution of the current function and then passes direct control to the function specified in the function call that constitutes its operand expression.</text:p>
      <text:p text:style-name="P57">The value of that function call will be returned to the caller’<text:span text:style-name="T210">s context</text:span> as i<text:span text:style-name="T210">f by</text:span> a simple <text:span text:style-name="Source_20_Text">return</text:span> statement. The <text:span text:style-name="Source_20_Text">return goto</text:span> statement differs fro<text:span text:style-name="T169">m</text:span> the <text:span text:style-name="Source_20_Text">return</text:span> statement in that it terminates execution of the current function immediately after evaluating all operands to the function call expression<text:span text:style-name="T210"> </text:span><text:span text:style-name="T196">footnote)</text:span>, and before entering the called function itself. The called function will return directly to the current function's caller.</text:p>
      <text:p text:style-name="P55">footnote) and the implicit copy of any argument values to the associated parameter storage.</text:p>
      <text:p text:style-name="P18">Because the execution of the current function is terminated, the lifetime of all objects local to the function with automatic storage duration ends immediately before the called function is entered.</text:p>
      <text:p text:style-name="P58">A function that has been terminated by the <text:span text:style-name="T7">return goto</text:span> statement does not continue to use resources.</text:p>
      <text:p text:style-name="P56">footnote) such as an incompatible calling convention that is not represented in the standard type, or even because the implementation does not support such direct jumps at all.</text:p>
      <text:p text:style-name="P18"><text:span text:style-name="Strong_20_Emphasis">NOTE:</text:span> a <text:span text:style-name="Source_20_Text">return goto</text:span> statement may appear anywhere a <text:span text:style-name="Source_20_Text">return</text:span> statement with an expression may appear.</text:p>
      <text:p text:style-name="P18"><text:span text:style-name="Strong_20_Emphasis">NOTE:</text:span> if the address of a local object with automatic storage duration is passed to the called function, its lifetime will have ended before the called function begins executing and the pointer cannot be used.</text:p>
      <text:p text:style-name="P18"><text:span text:style-name="Strong_20_Emphasis">EXAMPLE 1</text:span> This example violates the constraint that the expression must be a direct call to a function returning the exact same type as the caller:</text:p>
      <text:p text:style-name="P16"><text:bookmark text:name="LC113"/><text:span text:style-name="Source_20_Text"><text:span text:style-name="T1">int foo (int, int);</text:span></text:span></text:p>
      <text:p text:style-name="P16"><text:bookmark text:name="LC27"/></text:p>
      <text:p text:style-name="P16"><text:bookmark text:name="LC35"/><text:span text:style-name="Source_20_Text"><text:span text:style-name="T1">int bar (int a, int b) {</text:span></text:span></text:p>
      <text:p text:style-name="P16"><text:bookmark text:name="LC44"/><text:span text:style-name="Source_20_Text"><text:s text:c="2"/></text:span><text:span text:style-name="Source_20_Text"><text:span text:style-name="T1">return goto foo (b, a) + 1; // WRONG: the +1 must be evaluated</text:span></text:span></text:p>
      <text:p text:style-name="P20"><text:bookmark text:name="LC53"/><text:span text:style-name="Source_20_Text"><text:span text:style-name="T1">} <text:s text:c="28"/>// after the result of foo()</text:span></text:span></text:p>
      <text:p text:style-name="P20"><text:span text:style-name="Source_20_Text"/></text:p>
      <text:p text:style-name="P16"><text:bookmark text:name="LC62"/><text:span text:style-name="Source_20_Text"><text:span text:style-name="T1">float baz (int a, int b) {</text:span></text:span></text:p>
      <text:p text:style-name="P16"><text:bookmark text:name="LC72"/><text:span text:style-name="Source_20_Text"><text:s text:c="2"/></text:span><text:span text:style-name="Source_20_Text"><text:span text:style-name="T1">return goto foo (b, a); // WRONG: the result of foo() is followed </text:span></text:span></text:p>
      <text:p text:style-name="P21"><text:bookmark text:name="LC82"/><text:span text:style-name="Source_20_Text"><text:span text:style-name="T1">} <text:s text:c="24"/>// by an implicit conversion</text:span></text:span></text:p>
      <text:p text:style-name="P18"><text:span text:style-name="Strong_20_Emphasis">EXAMPLE 2</text:span> In this example the address of a local object with automatic storage duration is passed to a called function:</text:p>
      <text:p text:style-name="P16"><text:bookmark text:name="LC114"/><text:span text:style-name="Source_20_Text"><text:span text:style-name="T1">int foo (int * p); // uses p</text:span></text:span></text:p>
      <text:p text:style-name="P16"><text:bookmark text:name="LC28"/></text:p>
      <text:p text:style-name="P16"><text:bookmark text:name="LC36"/><text:span text:style-name="Source_20_Text"><text:span text:style-name="T1">int bar (int a) {</text:span></text:span></text:p>
      <text:p text:style-name="P16"><text:bookmark text:name="LC45"/><text:span text:style-name="Source_20_Text"><text:s text:c="2"/></text:span><text:span text:style-name="Source_20_Text"><text:span text:style-name="T1">return foo (&amp;a); // OK, lifetime of a continues until foo() completes</text:span></text:span></text:p>
      <text:p text:style-name="P16"><text:bookmark text:name="LC54"/><text:span text:style-name="Source_20_Text"><text:span text:style-name="T1">}</text:span></text:span></text:p>
      <text:p text:style-name="P16"><text:span text:style-name="Source_20_Text"/></text:p>
      <text:p text:style-name="P16"><text:bookmark text:name="LC63"/><text:span text:style-name="Source_20_Text"><text:span text:style-name="T1">int baz (int b) {</text:span></text:span></text:p>
      <text:p text:style-name="P16"><text:bookmark text:name="LC73"/><text:span text:style-name="Source_20_Text"><text:s text:c="2"/></text:span><text:span text:style-name="Source_20_Text"><text:span text:style-name="T1">return goto (&amp;b); // WRONG: using the address of an object whose lifetime has ended</text:span></text:span></text:p>
      <text:p text:style-name="P16"><text:bookmark text:name="LC83"/><text:span text:style-name="Source_20_Text"><text:span text:style-name="T1">}</text:span></text:span></text:p>
      <text:p text:style-name="P16"><text:soft-page-break/><text:span text:style-name="Source_20_Text"/></text:p>
      <text:p text:style-name="P16"><text:bookmark text:name="LC91"/><text:span text:style-name="Source_20_Text"><text:span text:style-name="T1">int * boo (int c) {</text:span></text:span></text:p>
      <text:p text:style-name="P16"><text:bookmark text:name="LC101"/><text:span text:style-name="Source_20_Text"><text:s text:c="2"/></text:span><text:span text:style-name="Source_20_Text"><text:span text:style-name="T1">return &amp;c; // roughly analogous to the above</text:span></text:span></text:p>
      <text:p text:style-name="P17"><text:bookmark text:name="LC115"/><text:span text:style-name="Source_20_Text"><text:span text:style-name="T1">}</text:span></text:span></text:p>
      <text:p text:style-name="P18"><text:span text:style-name="Strong_20_Emphasis">EXAMPLE 3</text:span> In this example, a function recurses endlessly but harmlessly because the recursive call consumes no additional resources:</text:p>
      <text:p text:style-name="P16"><text:bookmark text:name="LC116"/><text:span text:style-name="Source_20_Text"><text:span text:style-name="T1">int foo (int a, int b) { // need space for locals...</text:span></text:span></text:p>
      <text:p text:style-name="P16"><text:bookmark text:name="LC29"/><text:span text:style-name="Source_20_Text"><text:s text:c="2"/></text:span><text:span text:style-name="Source_20_Text"><text:span text:style-name="T1">return goto foo (b, a); <text:s/>// ...but that ends here</text:span></text:span></text:p>
      <text:p text:style-name="P17"><text:bookmark text:name="LC37"/><text:span text:style-name="Source_20_Text"><text:span text:style-name="T1">}</text:span></text:span></text:p>
      <text:p text:style-name="P18">This class of function <text:span text:style-name="T169">can</text:span>not overflow the program stack <text:span text:style-name="T169">by itself</text:span>.</text:p>
      <text:p text:style-name="P18"><text:span text:style-name="Strong_20_Emphasis">EXAMPLE 4</text:span> In this example only one of the two calls to <text:span text:style-name="Source_20_Text">foo()</text:span> is in the tail position:</text:p>
      <text:p text:style-name="P16"><text:bookmark text:name="LC117"/><text:span text:style-name="Source_20_Text"><text:span text:style-name="T1">int foo (int a, int b);</text:span></text:span></text:p>
      <text:p text:style-name="P16"><text:bookmark text:name="LC210"/></text:p>
      <text:p text:style-name="P16"><text:bookmark text:name="LC38"/><text:span text:style-name="Source_20_Text"><text:span text:style-name="T1">int bar (int a, int b) {</text:span></text:span></text:p>
      <text:p text:style-name="P16"><text:bookmark text:name="LC46"/><text:span text:style-name="Source_20_Text"><text:s text:c="2"/></text:span><text:span text:style-name="Source_20_Text"><text:span text:style-name="T1">return goto foo ( // will be evaluated after this caller's lifetime ends</text:span></text:span></text:p>
      <text:p text:style-name="P16"><text:bookmark text:name="LC55"/><text:span text:style-name="Source_20_Text"><text:s text:c="6"/></text:span><text:span text:style-name="Source_20_Text"><text:span text:style-name="T1">foo (a, b), <text:s text:c="2"/>// will be evaluated within this caller's lifetime</text:span></text:span></text:p>
      <text:p text:style-name="P16"><text:bookmark text:name="LC64"/><text:span text:style-name="Source_20_Text"><text:s text:c="6"/></text:span><text:span text:style-name="Source_20_Text"><text:span text:style-name="T1">a + b</text:span></text:span></text:p>
      <text:p text:style-name="P16"><text:bookmark text:name="LC74"/><text:span text:style-name="Source_20_Text"><text:s text:c="2"/></text:span><text:span text:style-name="Source_20_Text"><text:span text:style-name="T1">);</text:span></text:span></text:p>
      <text:p text:style-name="P17"><text:bookmark text:name="LC84"/><text:span text:style-name="Source_20_Text"><text:span text:style-name="T1">}</text:span></text:span></text:p>
      <text:p text:style-name="P18"><text:span text:style-name="Source_20_Text"><text:span text:style-name="T56">The first nested call takes place before termination of the calling function and therefore must consider that its resources have not yet been released, </text:span></text:span><text:span text:style-name="Source_20_Text"><text:span text:style-name="T57">exactly as for any other </text:span></text:span><text:span text:style-name="Source_20_Text"><text:span text:style-name="T58">f</text:span></text:span><text:span text:style-name="Source_20_Text"><text:span text:style-name="T57">unction call that is not in tail position</text:span></text:span><text:span text:style-name="Source_20_Text"><text:span text:style-name="T56">.</text:span></text:span></text:p>
      <text:p text:style-name="P13">No modifications <text:span text:style-name="T168">are made</text:span> to the Standard Libra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officeooo:rsid="0015ff56" style:font-size-asian="12.25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0T15:27:14.340638195</meta:creation-date>
    <dc:date>2024-05-20T12:52:57.872058158</dc:date>
    <meta:editing-duration>PT7H21M4S</meta:editing-duration>
    <meta:editing-cycles>81</meta:editing-cycles>
    <meta:generator>LibreOffice/7.4.7.2$Linux_X86_64 LibreOffice_project/40$Build-2</meta:generator>
    <meta:document-statistic meta:table-count="0" meta:image-count="0" meta:object-count="0" meta:page-count="15" meta:paragraph-count="239" meta:word-count="5913" meta:character-count="37448" meta:non-whitespace-character-count="31566"/>
  </office:meta>
</office:document-meta>
</file>
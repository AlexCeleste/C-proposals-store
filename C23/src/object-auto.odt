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Liberation Mono', Courier, monospace, 'Droid Sans Mono', monospace, monospace, 'Droid Sans Fallback'"/>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467890"/>
    </style:style>
    <style:style style:name="P3" style:family="paragraph" style:parent-style-name="Heading_20_2">
      <style:text-properties officeooo:rsid="001c4dd2" officeooo:paragraph-rsid="001c4dd2"/>
    </style:style>
    <style:style style:name="P4" style:family="paragraph" style:parent-style-name="Heading_20_3">
      <style:text-properties officeooo:rsid="00043041" officeooo:paragraph-rsid="00043041"/>
    </style:style>
    <style:style style:name="P5" style:family="paragraph" style:parent-style-name="Preformatted_20_Text">
      <style:text-properties officeooo:paragraph-rsid="00043041"/>
    </style:style>
    <style:style style:name="P6" style:family="paragraph" style:parent-style-name="Heading_20_1">
      <style:paragraph-properties fo:break-before="page"/>
    </style:style>
    <style:style style:name="P7" style:family="paragraph" style:parent-style-name="Heading_20_3">
      <style:text-properties officeooo:rsid="00502fb8" officeooo:paragraph-rsid="00502fb8"/>
    </style:style>
    <style:style style:name="P8" style:family="paragraph" style:parent-style-name="Heading_20_3">
      <style:text-properties officeooo:paragraph-rsid="0055feda"/>
    </style:style>
    <style:style style:name="P9" style:family="paragraph" style:parent-style-name="Heading_20_3">
      <style:text-properties officeooo:rsid="0059f598" officeooo:paragraph-rsid="0059f598"/>
    </style:style>
    <style:style style:name="P10" style:family="paragraph" style:parent-style-name="Heading_20_3">
      <style:text-properties officeooo:rsid="005e17cc" officeooo:paragraph-rsid="005e17cc"/>
    </style:style>
    <style:style style:name="P11" style:family="paragraph" style:parent-style-name="Preformatted_20_Text">
      <style:text-properties officeooo:paragraph-rsid="0047f592"/>
    </style:style>
    <style:style style:name="P12" style:family="paragraph" style:parent-style-name="Preformatted_20_Text">
      <style:text-properties officeooo:paragraph-rsid="0048fbbd"/>
    </style:style>
    <style:style style:name="P13" style:family="paragraph" style:parent-style-name="Preformatted_20_Text">
      <style:paragraph-properties fo:margin-left="1.251cm" fo:margin-right="0cm" fo:text-indent="0cm" style:auto-text-indent="false"/>
    </style:style>
    <style:style style:name="P14" style:family="paragraph" style:parent-style-name="Preformatted_20_Text">
      <style:paragraph-properties fo:margin-left="1.251cm" fo:margin-right="0cm" fo:text-indent="0cm" style:auto-text-indent="false"/>
      <style:text-properties officeooo:rsid="0053ccc8" officeooo:paragraph-rsid="0053ccc8"/>
    </style:style>
    <style:style style:name="P15" style:family="paragraph" style:parent-style-name="Preformatted_20_Text">
      <style:paragraph-properties fo:margin-left="1.251cm" fo:margin-right="0cm" fo:text-indent="0cm" style:auto-text-indent="false"/>
      <style:text-properties officeooo:paragraph-rsid="005c058b"/>
    </style:style>
    <style:style style:name="P16" style:family="paragraph" style:parent-style-name="Preformatted_20_Text">
      <style:paragraph-properties fo:margin-left="1.251cm" fo:margin-right="0cm" fo:text-indent="0cm" style:auto-text-indent="false"/>
      <style:text-properties officeooo:paragraph-rsid="005ce7b0"/>
    </style:style>
    <style:style style:name="P17" style:family="paragraph" style:parent-style-name="Quotations">
      <style:text-properties fo:font-style="italic" style:font-style-asian="italic" style:font-style-complex="italic"/>
    </style:style>
    <style:style style:name="P18" style:family="paragraph" style:parent-style-name="Quotations">
      <style:text-properties fo:font-weight="bold" officeooo:rsid="005a9199" officeooo:paragraph-rsid="005a9199" style:font-weight-asian="bold" style:font-weight-complex="bold"/>
    </style:style>
    <style:style style:name="P19" style:family="paragraph" style:parent-style-name="Quotations">
      <style:text-properties fo:font-weight="bold" officeooo:rsid="005a9199" officeooo:paragraph-rsid="005b7cb1" style:font-weight-asian="bold" style:font-weight-complex="bold"/>
    </style:style>
    <style:style style:name="P20" style:family="paragraph" style:parent-style-name="Quotations">
      <style:text-properties fo:font-weight="bold" officeooo:rsid="005b7cb1" officeooo:paragraph-rsid="005b7cb1" style:font-weight-asian="bold" style:font-weight-complex="bold"/>
    </style:style>
    <style:style style:name="P21" style:family="paragraph" style:parent-style-name="Quotations">
      <style:text-properties fo:font-weight="bold" officeooo:rsid="005c058b" officeooo:paragraph-rsid="005c058b" style:font-weight-asian="bold" style:font-weight-complex="bold"/>
    </style:style>
    <style:style style:name="P22" style:family="paragraph" style:parent-style-name="Quotations">
      <style:text-properties fo:font-weight="bold" officeooo:rsid="005ce7b0" officeooo:paragraph-rsid="005ce7b0" style:font-weight-asian="bold" style:font-weight-complex="bold"/>
    </style:style>
    <style:style style:name="P23" style:family="paragraph" style:parent-style-name="Quotations">
      <style:text-properties fo:font-weight="bold" officeooo:rsid="005e17cc" officeooo:paragraph-rsid="005e17cc" style:font-weight-asian="bold" style:font-weight-complex="bold"/>
    </style:style>
    <style:style style:name="P24" style:family="paragraph" style:parent-style-name="Quotations">
      <style:text-properties fo:font-weight="bold" officeooo:rsid="005f471d" officeooo:paragraph-rsid="005f471d" style:font-weight-asian="bold" style:font-weight-complex="bold"/>
    </style:style>
    <style:style style:name="P25" style:family="paragraph" style:parent-style-name="Quotations">
      <style:text-properties style:font-name="Liberation Mono"/>
    </style:style>
    <style:style style:name="P26" style:family="paragraph" style:parent-style-name="Quotations">
      <style:text-properties style:font-name="Liberation Mono" fo:font-style="normal" fo:font-weight="normal" officeooo:rsid="005a9199" officeooo:paragraph-rsid="005a9199" style:font-style-asian="normal" style:font-weight-asian="normal" style:font-style-complex="normal" style:font-weight-complex="normal"/>
    </style:style>
    <style:style style:name="P27" style:family="paragraph" style:parent-style-name="Quotations">
      <style:text-properties officeooo:rsid="005989bc" officeooo:paragraph-rsid="00591601"/>
    </style:style>
    <style:style style:name="P28" style:family="paragraph" style:parent-style-name="Quotations">
      <style:text-properties officeooo:paragraph-rsid="005b7cb1"/>
    </style:style>
    <style:style style:name="P29" style:family="paragraph" style:parent-style-name="Quotations">
      <style:text-properties fo:font-weight="normal" officeooo:rsid="005a9199" officeooo:paragraph-rsid="005a9199" style:font-weight-asian="normal" style:font-weight-complex="normal"/>
    </style:style>
    <style:style style:name="P30" style:family="paragraph" style:parent-style-name="Quotations">
      <style:text-properties fo:font-weight="normal" officeooo:rsid="005b7cb1" officeooo:paragraph-rsid="005b7cb1" style:font-weight-asian="normal" style:font-weight-complex="normal"/>
    </style:style>
    <style:style style:name="P31" style:family="paragraph" style:parent-style-name="Quotations">
      <style:text-properties fo:font-weight="normal" officeooo:rsid="0061b4d3" officeooo:paragraph-rsid="0061b4d3" style:font-weight-asian="normal" style:font-weight-complex="normal"/>
    </style:style>
    <style:style style:name="P32" style:family="paragraph" style:parent-style-name="Quotations">
      <style:paragraph-properties fo:margin-top="0cm" fo:margin-bottom="0cm" style:contextual-spacing="false"/>
    </style:style>
    <style:style style:name="P33" style:family="paragraph" style:parent-style-name="Quotations">
      <style:paragraph-properties fo:margin-top="0cm" fo:margin-bottom="0cm" style:contextual-spacing="false"/>
      <style:text-properties officeooo:paragraph-rsid="0059f598"/>
    </style:style>
    <style:style style:name="P34" style:family="paragraph" style:parent-style-name="Quotations">
      <style:paragraph-properties fo:margin-top="0cm" fo:margin-bottom="0cm" style:contextual-spacing="false"/>
      <style:text-properties fo:font-style="italic" style:font-style-asian="italic" style:font-style-complex="italic"/>
    </style:style>
    <style:style style:name="P35" style:family="paragraph" style:parent-style-name="Quotations">
      <style:paragraph-properties fo:margin-top="0cm" fo:margin-bottom="0cm" style:contextual-spacing="false"/>
      <style:text-properties fo:font-style="italic" fo:font-weight="bold" officeooo:rsid="0059f598" officeooo:paragraph-rsid="0059f598" style:font-style-asian="italic" style:font-weight-asian="bold" style:font-style-complex="italic" style:font-weight-complex="bold"/>
    </style:style>
    <style:style style:name="P36" style:family="paragraph" style:parent-style-name="Quotations">
      <style:paragraph-properties fo:margin-top="0cm" fo:margin-bottom="0cm" style:contextual-spacing="false"/>
      <style:text-properties fo:font-style="italic" fo:font-weight="normal" officeooo:rsid="005a9199" officeooo:paragraph-rsid="005a9199" style:font-style-asian="italic" style:font-weight-asian="normal" style:font-style-complex="italic" style:font-weight-complex="normal"/>
    </style:style>
    <style:style style:name="P37" style:family="paragraph" style:parent-style-name="Quotations">
      <style:paragraph-properties fo:margin-top="0cm" fo:margin-bottom="0cm" style:contextual-spacing="false"/>
      <style:text-properties style:font-name="Liberation Mono"/>
    </style:style>
    <style:style style:name="P38" style:family="paragraph" style:parent-style-name="Standard">
      <style:text-properties officeooo:rsid="0048fbbd" officeooo:paragraph-rsid="0048fbbd"/>
    </style:style>
    <style:style style:name="P39" style:family="paragraph" style:parent-style-name="Text_20_body" style:list-style-name="L1">
      <style:text-properties officeooo:rsid="00043041" officeooo:paragraph-rsid="00137b77"/>
    </style:style>
    <style:style style:name="P40" style:family="paragraph" style:parent-style-name="Text_20_body" style:list-style-name="L2"/>
    <style:style style:name="P41" style:family="paragraph" style:parent-style-name="Text_20_body">
      <style:text-properties officeooo:rsid="0047f592" officeooo:paragraph-rsid="0047f592"/>
    </style:style>
    <style:style style:name="P42" style:family="paragraph" style:parent-style-name="Text_20_body" style:list-style-name="L9">
      <style:text-properties officeooo:paragraph-rsid="0048fbbd"/>
    </style:style>
    <style:style style:name="P43" style:family="paragraph" style:parent-style-name="Text_20_body" style:list-style-name="L10">
      <style:text-properties officeooo:paragraph-rsid="0048fbbd"/>
    </style:style>
    <style:style style:name="P44" style:family="paragraph" style:parent-style-name="Text_20_body" style:list-style-name="L11">
      <style:text-properties officeooo:paragraph-rsid="0048fbbd"/>
    </style:style>
    <style:style style:name="P45" style:family="paragraph" style:parent-style-name="Text_20_body" style:list-style-name="L12">
      <style:text-properties officeooo:paragraph-rsid="0048fbbd"/>
    </style:style>
    <style:style style:name="P46" style:family="paragraph" style:parent-style-name="Text_20_body">
      <style:text-properties officeooo:rsid="004dba7d" officeooo:paragraph-rsid="004dba7d"/>
    </style:style>
    <style:style style:name="P47" style:family="paragraph" style:parent-style-name="Text_20_body">
      <style:text-properties officeooo:rsid="00502fb8" officeooo:paragraph-rsid="00502fb8"/>
    </style:style>
    <style:style style:name="P48" style:family="paragraph" style:parent-style-name="Text_20_body" style:list-style-name="L14">
      <style:text-properties officeooo:rsid="00502fb8" officeooo:paragraph-rsid="00502fb8"/>
    </style:style>
    <style:style style:name="P49" style:family="paragraph" style:parent-style-name="Text_20_body">
      <style:text-properties officeooo:rsid="001c6774" officeooo:paragraph-rsid="001c4dd2"/>
    </style:style>
    <style:style style:name="P50" style:family="paragraph" style:parent-style-name="Text_20_body">
      <style:text-properties officeooo:rsid="00514a1b" officeooo:paragraph-rsid="00514a1b"/>
    </style:style>
    <style:style style:name="P51" style:family="paragraph" style:parent-style-name="Text_20_body">
      <style:text-properties officeooo:rsid="0053ccc8" officeooo:paragraph-rsid="0053ccc8"/>
    </style:style>
    <style:style style:name="P52" style:family="paragraph" style:parent-style-name="Text_20_body">
      <style:text-properties officeooo:rsid="005477d2" officeooo:paragraph-rsid="005477d2"/>
    </style:style>
    <style:style style:name="P53" style:family="paragraph" style:parent-style-name="Text_20_body">
      <style:text-properties officeooo:rsid="0055feda" officeooo:paragraph-rsid="0055feda"/>
    </style:style>
    <style:style style:name="P54" style:family="paragraph" style:parent-style-name="Text_20_body">
      <style:text-properties officeooo:paragraph-rsid="000e664d"/>
    </style:style>
    <style:style style:name="P55" style:family="paragraph" style:parent-style-name="Text_20_body">
      <style:text-properties officeooo:rsid="0056533c" officeooo:paragraph-rsid="0056533c"/>
    </style:style>
    <style:style style:name="P56" style:family="paragraph" style:parent-style-name="Text_20_body">
      <style:text-properties officeooo:paragraph-rsid="0056533c"/>
    </style:style>
    <style:style style:name="P57" style:family="paragraph" style:parent-style-name="Text_20_body">
      <style:text-properties officeooo:rsid="00582a19" officeooo:paragraph-rsid="005989bc"/>
    </style:style>
    <style:style style:name="P58" style:family="paragraph" style:parent-style-name="Text_20_body">
      <style:text-properties officeooo:rsid="0059f598" officeooo:paragraph-rsid="0059f598"/>
    </style:style>
    <style:style style:name="P59" style:family="paragraph" style:parent-style-name="Text_20_body">
      <style:text-properties officeooo:rsid="005a9199" officeooo:paragraph-rsid="005a9199"/>
    </style:style>
    <style:style style:name="P60" style:family="paragraph" style:parent-style-name="Text_20_body">
      <style:text-properties fo:font-weight="normal" officeooo:paragraph-rsid="005e17cc" style:font-weight-asian="normal" style:font-weight-complex="normal"/>
    </style:style>
    <style:style style:name="P61" style:family="paragraph" style:parent-style-name="Text_20_body">
      <style:text-properties officeooo:rsid="005e17cc" officeooo:paragraph-rsid="005e17cc"/>
    </style:style>
    <style:style style:name="P62" style:family="paragraph" style:parent-style-name="Text_20_body">
      <style:text-properties officeooo:rsid="005f471d" officeooo:paragraph-rsid="005f471d"/>
    </style:style>
    <style:style style:name="P63" style:family="paragraph" style:parent-style-name="Text_20_body" style:list-style-name="L8">
      <style:paragraph-properties fo:margin-top="0cm" fo:margin-bottom="0cm" style:contextual-spacing="false"/>
    </style:style>
    <style:style style:name="P64" style:family="paragraph" style:parent-style-name="Text_20_body" style:list-style-name="L8">
      <style:paragraph-properties fo:margin-top="0cm" fo:margin-bottom="0cm" style:contextual-spacing="false"/>
      <style:text-properties officeooo:paragraph-rsid="004ebe6a"/>
    </style:style>
    <style:style style:name="T1" style:family="text">
      <style:text-properties fo:language="en" fo:country="GB"/>
    </style:style>
    <style:style style:name="T2" style:family="text">
      <style:text-properties fo:language="en" fo:country="GB" officeooo:rsid="0047f592"/>
    </style:style>
    <style:style style:name="T3" style:family="text">
      <style:text-properties fo:language="en" fo:country="GB" officeooo:rsid="0048fbbd"/>
    </style:style>
    <style:style style:name="T4" style:family="text">
      <style:text-properties fo:language="en" fo:country="GB" officeooo:rsid="004aa768"/>
    </style:style>
    <style:style style:name="T5" style:family="text">
      <style:text-properties style:font-name="Liberation Mono" fo:font-size="10pt" fo:language="en" fo:country="GB" officeooo:rsid="0045c5a5" style:font-name-asian="Liberation Mono" style:font-size-asian="10pt" style:font-name-complex="Liberation Mono" style:font-size-complex="10pt"/>
    </style:style>
    <style:style style:name="T6" style:family="text">
      <style:text-properties style:font-name="Liberation Mono" fo:font-size="10pt" fo:language="en" fo:country="GB" officeooo:rsid="000ddac1" style:font-name-asian="Liberation Mono" style:font-size-asian="10pt" style:font-name-complex="Liberation Mono" style:font-size-complex="10pt"/>
    </style:style>
    <style:style style:name="T7" style:family="text">
      <style:text-properties style:font-name="Liberation Mono" fo:font-size="10pt" fo:language="en" fo:country="GB" officeooo:rsid="0047f592" style:font-name-asian="Liberation Mono" style:font-size-asian="10pt" style:font-name-complex="Liberation Mono" style:font-size-complex="10pt"/>
    </style:style>
    <style:style style:name="T8" style:family="text">
      <style:text-properties style:font-name="Liberation Mono" fo:font-size="10pt" fo:language="en" fo:country="GB" officeooo:rsid="0048fbbd" style:font-name-asian="Liberation Mono" style:font-size-asian="10pt" style:font-name-complex="Liberation Mono" style:font-size-complex="10pt"/>
    </style:style>
    <style:style style:name="T9" style:family="text">
      <style:text-properties style:font-name="Liberation Mono" fo:font-size="10pt" fo:language="en" fo:country="GB" officeooo:rsid="004aa768" style:font-name-asian="Liberation Mono" style:font-size-asian="10pt" style:font-name-complex="Liberation Mono" style:font-size-complex="10pt"/>
    </style:style>
    <style:style style:name="T10" style:family="text">
      <style:text-properties style:font-name="Liberation Mono" fo:font-size="10pt" officeooo:rsid="005c058b" style:font-name-asian="Liberation Mono" style:font-size-asian="10pt" style:font-name-complex="Liberation Mono" style:font-size-complex="10pt"/>
    </style:style>
    <style:style style:name="T11" style:family="text">
      <style:text-properties style:font-name="Liberation Mono" fo:font-size="10pt" officeooo:rsid="005f471d" style:font-name-asian="Liberation Mono" style:font-size-asian="10pt" style:font-name-complex="Liberation Mono" style:font-size-complex="10pt"/>
    </style:style>
    <style:style style:name="T12" style:family="text">
      <style:text-properties officeooo:rsid="0007d57f"/>
    </style:style>
    <style:style style:name="T13" style:family="text">
      <style:text-properties fo:font-style="italic" style:font-style-asian="italic" style:font-style-complex="italic"/>
    </style:style>
    <style:style style:name="T14" style:family="text">
      <style:text-properties fo:font-style="italic" officeooo:rsid="005989bc" style:font-style-asian="italic" style:font-style-complex="italic"/>
    </style:style>
    <style:style style:name="T15" style:family="text">
      <style:text-properties fo:font-style="italic" officeooo:rsid="0059f598" style:font-style-asian="italic" style:font-style-complex="italic"/>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29533a" style:font-weight-asian="bold" style:font-weight-complex="bold"/>
    </style:style>
    <style:style style:name="T19" style:family="text">
      <style:text-properties fo:font-weight="bold" officeooo:rsid="005b7cb1" style:font-weight-asian="bold" style:font-weight-complex="bold"/>
    </style:style>
    <style:style style:name="T20" style:family="text">
      <style:text-properties fo:font-weight="bold" officeooo:rsid="005e17cc" style:font-weight-asian="bold" style:font-weight-complex="bold"/>
    </style:style>
    <style:style style:name="T21" style:family="text">
      <style:text-properties fo:font-weight="bold" officeooo:rsid="005f471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9533a" style:font-weight-asian="normal" style:font-weight-complex="normal"/>
    </style:style>
    <style:style style:name="T24" style:family="text">
      <style:text-properties fo:font-weight="normal" officeooo:rsid="005b7cb1" style:font-weight-asian="normal" style:font-weight-complex="normal"/>
    </style:style>
    <style:style style:name="T25" style:family="text">
      <style:text-properties fo:font-weight="normal" officeooo:rsid="005c058b" style:font-weight-asian="normal" style:font-weight-complex="normal"/>
    </style:style>
    <style:style style:name="T26" style:family="text">
      <style:text-properties fo:font-weight="normal" officeooo:rsid="005e17cc" style:font-weight-asian="normal" style:font-weight-complex="normal"/>
    </style:style>
    <style:style style:name="T27" style:family="text">
      <style:text-properties fo:font-weight="normal" officeooo:rsid="006428fa" style:font-weight-asian="normal" style:font-weight-complex="normal"/>
    </style:style>
    <style:style style:name="T28" style:family="text">
      <style:text-properties style:font-name="Liberation Serif" fo:font-size="14pt" fo:font-weight="bold" officeooo:rsid="0045a31f" style:font-name-asian="DejaVu Sans" style:font-size-asian="14pt" style:font-weight-asian="bold" style:font-name-complex="DejaVu Sans" style:font-size-complex="14pt" style:font-weight-complex="bold"/>
    </style:style>
    <style:style style:name="T29" style:family="text">
      <style:text-properties style:font-name="Liberation Serif" fo:font-size="14pt" fo:font-weight="bold" officeooo:rsid="0048fbbd" style:font-name-asian="DejaVu Sans" style:font-size-asian="14pt" style:font-weight-asian="bold" style:font-name-complex="DejaVu Sans" style:font-size-complex="14pt" style:font-weight-complex="bold"/>
    </style:style>
    <style:style style:name="T30" style:family="text">
      <style:text-properties fo:font-size="10pt" fo:font-weight="bold" officeooo:rsid="005e17cc" style:font-size-asian="10pt" style:font-weight-asian="bold" style:font-size-complex="10pt" style:font-weight-complex="bold"/>
    </style:style>
    <style:style style:name="T31" style:family="text">
      <style:text-properties officeooo:rsid="0047f592"/>
    </style:style>
    <style:style style:name="T32" style:family="text">
      <style:text-properties style:font-name="Liberation Mono"/>
    </style:style>
    <style:style style:name="T33" style:family="text">
      <style:text-properties style:font-name="Liberation Mono" officeooo:rsid="00514a1b"/>
    </style:style>
    <style:style style:name="T34" style:family="text">
      <style:text-properties style:font-name="Liberation Mono" officeooo:rsid="00522d5d"/>
    </style:style>
    <style:style style:name="T35" style:family="text">
      <style:text-properties style:font-name="Liberation Mono" officeooo:rsid="0053ccc8"/>
    </style:style>
    <style:style style:name="T36" style:family="text">
      <style:text-properties style:font-name="Liberation Mono" fo:font-style="normal" style:font-style-asian="normal" style:font-style-complex="normal"/>
    </style:style>
    <style:style style:name="T37" style:family="text">
      <style:text-properties style:font-name="Liberation Mono" officeooo:rsid="005477d2"/>
    </style:style>
    <style:style style:name="T38" style:family="text">
      <style:text-properties style:font-name="Liberation Mono" officeooo:rsid="0056533c"/>
    </style:style>
    <style:style style:name="T39" style:family="text">
      <style:text-properties style:font-name="Liberation Mono" fo:font-style="italic" style:font-style-asian="italic" style:font-style-complex="italic"/>
    </style:style>
    <style:style style:name="T40" style:family="text">
      <style:text-properties style:font-name="Liberation Mono" fo:font-weight="bold" officeooo:rsid="005e17cc" style:font-weight-asian="bold" style:font-weight-complex="bold"/>
    </style:style>
    <style:style style:name="T41" style:family="text">
      <style:text-properties style:font-name="Liberation Mono" fo:font-weight="bold" officeooo:rsid="005f471d" style:font-weight-asian="bold" style:font-weight-complex="bold"/>
    </style:style>
    <style:style style:name="T42" style:family="text">
      <style:text-properties style:font-name="Liberation Mono" fo:font-weight="normal" style:font-weight-asian="normal" style:font-weight-complex="normal"/>
    </style:style>
    <style:style style:name="T43" style:family="text">
      <style:text-properties style:font-name="Liberation Mono" fo:font-weight="normal" officeooo:rsid="005b7cb1" style:font-weight-asian="normal" style:font-weight-complex="normal"/>
    </style:style>
    <style:style style:name="T44" style:family="text">
      <style:text-properties style:font-name="Liberation Mono" fo:font-weight="normal" officeooo:rsid="005e17cc" style:font-weight-asian="normal" style:font-weight-complex="normal"/>
    </style:style>
    <style:style style:name="T45" style:family="text">
      <style:text-properties style:font-name="Liberation Mono" fo:font-weight="normal" officeooo:rsid="006428fa" style:font-weight-asian="normal" style:font-weight-complex="normal"/>
    </style:style>
    <style:style style:name="T46" style:family="text">
      <style:text-properties officeooo:rsid="0048fbbd"/>
    </style:style>
    <style:style style:name="T47" style:family="text">
      <style:text-properties officeooo:rsid="00043041"/>
    </style:style>
    <style:style style:name="T48" style:family="text">
      <style:text-properties officeooo:rsid="004aa768"/>
    </style:style>
    <style:style style:name="T49" style:family="text">
      <style:text-properties officeooo:rsid="004b8924"/>
    </style:style>
    <style:style style:name="T50" style:family="text">
      <style:text-properties officeooo:rsid="00502fb8"/>
    </style:style>
    <style:style style:name="T51" style:family="text">
      <style:text-properties officeooo:rsid="00514a1b"/>
    </style:style>
    <style:style style:name="T52" style:family="text">
      <style:text-properties style:font-name="Liberation Serif" officeooo:rsid="00514a1b"/>
    </style:style>
    <style:style style:name="T53" style:family="text">
      <style:text-properties officeooo:rsid="00522d5d"/>
    </style:style>
    <style:style style:name="T54" style:family="text">
      <style:text-properties officeooo:rsid="0053ccc8"/>
    </style:style>
    <style:style style:name="T55" style:family="text">
      <style:text-properties officeooo:rsid="005477d2"/>
    </style:style>
    <style:style style:name="T56" style:family="text">
      <style:text-properties officeooo:rsid="0056533c"/>
    </style:style>
    <style:style style:name="T57" style:family="text">
      <style:text-properties officeooo:rsid="005989bc"/>
    </style:style>
    <style:style style:name="T58" style:family="text">
      <style:text-properties officeooo:rsid="005b7cb1"/>
    </style:style>
    <style:style style:name="T59" style:family="text">
      <style:text-properties officeooo:rsid="005c058b"/>
    </style:style>
    <style:style style:name="T60" style:family="text">
      <style:text-properties officeooo:rsid="005ce7b0"/>
    </style:style>
    <style:style style:name="T61" style:family="text">
      <style:text-properties officeooo:rsid="005f471d"/>
    </style:style>
    <style:style style:name="T62" style:family="text">
      <style:text-properties officeooo:rsid="0061ff7b"/>
    </style:style>
    <style:style style:name="T63" style:family="text">
      <style:text-properties officeooo:rsid="00635b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C1"/><text:span text:style-name="Source_20_Text"><text:span text:style-name="T1">Proposal for C23 <text:s/></text:span></text:span></text:p>
      <text:p text:style-name="Preformatted_20_Text"><text:bookmark text:name="LC2"/><text:span text:style-name="Source_20_Text"><text:span text:style-name="T1">WG14 </text:span></text:span><text:span text:style-name="Source_20_Text"><text:span text:style-name="T7">xxxx</text:span></text:span></text:p>
      <text:p text:style-name="Preformatted_20_Text"><text:bookmark text:name="LC3"/></text:p>
      <text:p text:style-name="Preformatted_20_Text"><text:bookmark text:name="LC4"/><text:span text:style-name="Source_20_Text"><text:span text:style-name="T1">Title: <text:s text:c="14"/></text:span></text:span><text:span text:style-name="Source_20_Text"><text:span text:style-name="T7">Type inference for object definitions</text:span></text:span></text:p>
      <text:p text:style-name="P11"><text:bookmark text:name="LC5"/><text:span text:style-name="Source_20_Text"><text:span text:style-name="T1">Author, affiliation: </text:span></text:span><text:span text:style-name="Source_20_Text"><text:span text:style-name="T2">Jens Gustedt, INRIA/ICube, Universite de Strasbourg</text:span></text:span></text:p>
      <text:p text:style-name="P11"><text:span text:style-name="Source_20_Text"><text:span text:style-name="T1"><text:s text:c="21"/>Alex Gilding, Perforce <text:s/></text:span></text:span></text:p>
      <text:p text:style-name="Preformatted_20_Text"><text:bookmark text:name="LC6"/><text:span text:style-name="Source_20_Text"><text:span text:style-name="T1">Date: <text:s text:c="15"/>202</text:span></text:span><text:span text:style-name="Source_20_Text"><text:span text:style-name="T5">2</text:span></text:span><text:span text:style-name="Source_20_Text"><text:span text:style-name="T1">-</text:span></text:span><text:span text:style-name="Source_20_Text"><text:span text:style-name="T7">02</text:span></text:span><text:span text:style-name="Source_20_Text"><text:span text:style-name="T1">-</text:span></text:span><text:span text:style-name="Source_20_Text"><text:span text:style-name="T2">0</text:span></text:span><text:span text:style-name="Source_20_Text"><text:span text:style-name="T5">5</text:span></text:span><text:span text:style-name="Source_20_Text"><text:span text:style-name="T1"> <text:s/></text:span></text:span></text:p>
      <text:p text:style-name="Preformatted_20_Text"><text:bookmark text:name="LC7"/><text:span text:style-name="Source_20_Text"><text:span text:style-name="T1">Proposal category: <text:s text:c="2"/>New features <text:s/></text:span></text:span></text:p>
      <text:p text:style-name="P1"><text:bookmark text:name="LC8"/><text:span text:style-name="Source_20_Text"><text:span text:style-name="T1">Target audience: <text:s text:c="4"/>Compiler/tooling developers, application developers <text:s/></text:span></text:span></text:p>
      <text:h text:style-name="Heading_20_2" text:outline-level="2"><text:bookmark text:name="abstract"/>Abstract</text:h>
      <text:p text:style-name="Text_20_body">We propose the inclusion of the so-called <text:span text:style-name="T32">auto</text:span> feature for variable definitions into C.</text:p>
      <text:p text:style-name="Text_20_body">This feature allows <text:span text:style-name="T31">declarations</text:span> to infer types from <text:span text:style-name="T31">the </text:span>expressions that are used <text:span text:style-name="T31">as their</text:span> initializers. This is part of a series of papers for the improvement of type-generic programming in C that has been introduced in <text:a xlink:type="simple" xlink:href="http://www.open-std.org/jtc1/sc22/wg14/www/docs/n2890.pdf" text:style-name="Internet_20_link" text:visited-style-name="Visited_20_Internet_20_Link">N2890</text:a>.</text:p>
      <text:p text:style-name="P41">This takes advantage of the successful integration of the <text:span text:style-name="T32">typeof</text:span> feature into C23 and provides basic starting compatibility with the corresponding C++ feature, limited to matching existing practice in shipped C compilers.</text:p>
      <text:h text:style-name="P6" text:outline-level="1">Type inference for object definitions</text:h>
      <text:p text:style-name="P12"><text:bookmark text:name="LC11"/><text:span text:style-name="Source_20_Text"><text:span text:style-name="T1">Reply-to: <text:s text:c="11"/></text:span></text:span><text:span text:style-name="Source_20_Text"><text:span text:style-name="T3">Jens Gustedt (jens.gustedt@inria.fr)</text:span></text:span></text:p>
      <text:p text:style-name="P12"><text:span text:style-name="Source_20_Text"><text:span text:style-name="T1"><text:s text:c="21"/>Alex Gilding (agilding@perforce.com) <text:s/></text:span></text:span></text:p>
      <text:p text:style-name="Preformatted_20_Text"><text:bookmark text:name="LC21"/><text:span text:style-name="Source_20_Text"><text:span text:style-name="T1">Document No: <text:s text:c="8"/>N</text:span></text:span><text:span text:style-name="Source_20_Text"><text:span text:style-name="T3">x</text:span></text:span><text:span text:style-name="Source_20_Text"><text:span text:style-name="T8">xxx</text:span></text:span><text:span text:style-name="Source_20_Text"><text:span text:style-name="T1"> <text:s/></text:span></text:span></text:p>
      <text:p text:style-name="P5"><text:bookmark text:name="LC31"/><text:span text:style-name="Source_20_Text"><text:span text:style-name="T1">Revises Document No: N2</text:span></text:span><text:span text:style-name="Source_20_Text"><text:span text:style-name="T9">923</text:span></text:span></text:p>
      <text:p text:style-name="P2"><text:bookmark text:name="LC41"/><text:span text:style-name="Source_20_Text"><text:span text:style-name="T1">Date: <text:s text:c="15"/>202</text:span></text:span><text:span text:style-name="Source_20_Text"><text:span text:style-name="T6">2</text:span></text:span><text:span text:style-name="Source_20_Text"><text:span text:style-name="T1">-</text:span></text:span><text:span text:style-name="Source_20_Text"><text:span text:style-name="T6">0</text:span></text:span><text:span text:style-name="Source_20_Text"><text:span text:style-name="T9">2</text:span></text:span><text:span text:style-name="Source_20_Text"><text:span text:style-name="T1">-</text:span></text:span><text:span text:style-name="Source_20_Text"><text:span text:style-name="T4">0</text:span></text:span><text:span text:style-name="Source_20_Text"><text:span text:style-name="T6">5</text:span></text:span><text:span text:style-name="Source_20_Text"><text:span text:style-name="T1"> <text:s/></text:span></text:span></text:p>
      <text:h text:style-name="Heading_20_2" text:outline-level="2"><text:bookmark text:name="summary-of-changes"/>Summary of Changes</text:h>
      <text:h text:style-name="P7" text:outline-level="3">Nxxxx (v7/R6)</text:h>
      <text:list xml:id="list3931408464" text:style-name="L14">
        <text:list-item>
          <text:p text:style-name="P48">remove type inference for function return types and function parameters</text:p>
        </text:list-item>
        <text:list-item>
          <text:p text:style-name="P48">refocus type inference for objects to exactly match existing C practice and reword in terms of accepted <text:span text:style-name="T32">typeof</text:span></text:p>
        </text:list-item>
      </text:list>
      <text:h text:style-name="P4" text:outline-level="3">N<text:span text:style-name="T28">29</text:span><text:span text:style-name="T29">23 (v6/R5)</text:span></text:h>
      <text:list xml:id="list1914448973" text:style-name="L1">
        <text:list-item>
          <text:p text:style-name="P39">move handling of auto parameters to <text:a xlink:type="simple" xlink:href="http://www.open-std.org/jtc1/sc22/wg14/www/docs/n2924.pdf" text:style-name="Internet_20_link" text:visited-style-name="Visited_20_Internet_20_Link">N2924</text:a></text:p>
        </text:list-item>
        <text:list-item>
          <text:p text:style-name="P39">make type declarations in underspecified declarations undefined behaviour</text:p>
        </text:list-item>
        <text:list-item>
          <text:p text:style-name="P39">add Joseph Myers’s wording for the <text:span text:style-name="T32">typeof</text:span> specifier, but make it its own sub-phrase</text:p>
        </text:list-item>
        <text:list-item>
          <text:p text:style-name="P39">address an ambiguity concerning the scope of <text:span text:style-name="T32">auto</text:span> variables</text:p>
        </text:list-item>
        <text:list-item>
          <text:p text:style-name="P39">make clear that shadowing by <text:span text:style-name="T32">auto</text:span> only concerns ordinary identifiers</text:p>
        </text:list-item>
        <text:list-item>
          <text:p text:style-name="P39">minor text adaptions</text:p>
        </text:list-item>
      </text:list>
      <text:h text:style-name="Heading_20_3" text:outline-level="3"><text:span text:style-name="T46">N2891 (</text:span>v5/R4<text:span text:style-name="T46">)</text:span></text:h>
      <text:list xml:id="list1898871680" text:style-name="L9">
        <text:list-item>
          <text:p text:style-name="P42"><text:span text:style-name="T47">straighten the proposed text and move discussion of all special cases (bit-fields, compatible types, VM) into non-normative text such as notes and examples</text:span></text:p>
        </text:list-item>
      </text:list>
      <text:h text:style-name="Heading_20_3" text:outline-level="3"><text:span text:style-name="T46">N2735 (</text:span>v4/R3<text:span text:style-name="T46">)</text:span></text:h>
      <text:list xml:id="list1168540743" text:style-name="L10">
        <text:list-item>
          <text:p text:style-name="P43"><text:span text:style-name="T47">some word smithing</text:span></text:p>
        </text:list-item>
      </text:list>
      <text:h text:style-name="Heading_20_3" text:outline-level="3"><text:span text:style-name="T48">N2697 (</text:span>v3/R2<text:span text:style-name="T48">)</text:span></text:h>
      <text:list xml:id="list1996683777" text:style-name="L11">
        <text:list-item>
          <text:p text:style-name="P44"><text:span text:style-name="T47">remove a requirement on qualifiers and atomic derivation that was too restrictive</text:span></text:p>
        </text:list-item>
      </text:list>
      <text:h text:style-name="Heading_20_3" text:outline-level="3"><text:span text:style-name="T48">N2674 (</text:span>v2/R1<text:span text:style-name="T48">)</text:span></text:h>
      <text:list xml:id="list2961101750" text:style-name="L12">
        <text:list-item>
          <text:p text:style-name="P45"><text:span text:style-name="T47">changes the rules for type inference to use a typeof specifier. This simplifies the rules and brings the defined semantics in line with C++.</text:span></text:p>
        </text:list-item>
      </text:list>
      <text:h text:style-name="Heading_20_3" text:outline-level="3"><text:bookmark text:name="n2851"/>N2<text:span text:style-name="T48">632</text:span></text:h>
      <text:list xml:id="list4195508917" text:style-name="L2">
        <text:list-item>
          <text:p text:style-name="P40">original proposal </text:p>
        </text:list-item>
      </text:list>
      <text:h text:style-name="Heading_20_2" text:outline-level="2"><text:bookmark text:name="introduction"/><text:soft-page-break/>Introduction</text:h>
      <text:p text:style-name="P46">Defining a variable in C requires the user to name a type. However when the definition includes an initializer, it makes sense to derive this type directly from the type of the expression used to initialize the variable.</text:p>
      <text:p text:style-name="P46">This feature has existed in C++ since <text:a xlink:type="simple" xlink:href="http://www.open-std.org/jtc1/sc22/wg21/docs/papers/2012/n3337.pdf" text:style-name="Internet_20_link" text:visited-style-name="Visited_20_Internet_20_Link">C++11</text:a>, and is implemented in GCC, Clang, and other GNU C compatible compilers using the <text:span text:style-name="T32">__auto_type</text:span> extension keyword.</text:p>
      <text:p text:style-name="P46"><text:span text:style-name="T32">__auto_type</text:span> is a much more limited feature than C++ <text:span text:style-name="T32">auto</text:span>, the latter of which is built on top of template type deduction rules. We propose to standardize the existing C extension practice directly. Any valid C construct using this syntax will also be valid and hold the same meaning within the broader semantics of the C++ feature.</text:p>
      <text:h text:style-name="Heading_20_2" text:outline-level="2"><text:bookmark text:name="rationale"/>Rationale</text:h>
      <text:p text:style-name="Text_20_body">In N2890 it is argued that the features presented in this paper are useful in a more general context, namely for the combination with lambdas. We will not repeat this argumentation here, but try to motivate the introduction of the <text:span text:style-name="T32">auto</text:span> feature as a stand-alone addition to C.</text:p>
      <text:p text:style-name="Text_20_body">In accordance with C’s syntax for declarations and in extension of its semantics, C++ has a feature that allows to infer the type of a variable from its initializer expression.</text:p>
      <text:p text:style-name="P13">auto y = cos ( x ) ;</text:p>
      <text:p text:style-name="P13"/>
      <text:p text:style-name="Text_20_body">This eases the use of type-generic functions because now the return value and type can be captured in an auxiliary variable, without necessarily having the type of the argument, here <text:span text:style-name="T32">x</text:span>, at hand. That feature is not only interesting because of the obvious convenience for programmers who are perhaps too lazy to lookup the type of <text:span text:style-name="T32">x</text:span>. It can help to avoid code maintenance problems: if <text:span text:style-name="T32">x</text:span> is a function parameter for which potentially the type may be adjusted during the lifecycle of the program (say from <text:span text:style-name="T32">float</text:span> to <text:span text:style-name="T32">double</text:span>), all dependent auxiliary variables within the function are automatically updated to the new type.</text:p>
      <text:p text:style-name="Text_20_body">This can even be used if the return type of a type-generic function is just an aggregation of several values for which the type itself is just an uninteresting artefact:</text:p>
      <text:p text:style-name="P13">#define div (X , Y ) <text:s text:c="10"/>\</text:p>
      <text:p text:style-name="P13"><text:s text:c="2"/>_Generix (( X ) +( Y ) , <text:s text:c="4"/>\</text:p>
      <text:p text:style-name="P13"><text:s text:c="10"/>int : div , <text:s text:c="9"/>\</text:p>
      <text:p text:style-name="P13"><text:s text:c="10"/>long : ldiv , <text:s text:c="7"/>\</text:p>
      <text:p text:style-name="P13"><text:s text:c="10"/>long long : lldiv ) <text:s/>\</text:p>
      <text:p text:style-name="P13"><text:s text:c="10"/>(( X ) , ( Y ) )</text:p>
      <text:p text:style-name="P13"><text:s text:c="10"/></text:p>
      <text:p text:style-name="P13">// int , long or long long ?</text:p>
      <text:p text:style-name="P13">auto res = div (38484848448 , 448484844) ;</text:p>
      <text:p text:style-name="P13">auto a = b * res . quot + res . Rem ;</text:p>
      <text:p text:style-name="P13"/>
      <text:p text:style-name="Text_20_body">An important restriction for the coding of type-generic macros in current C is the impossibility to declare local variables of a type that is dependent on the type(s) of the macro argument(s). Therefore, such macros often need arguments that provide the types for which the macro was evaluated. This not only inconvenient for the user of such macros but also an important source of errors. If the user chooses the wrong type, implicit conversions can impede on the correctness of the macro call.</text:p>
      <text:p text:style-name="Text_20_body"><text:soft-page-break/>For type-generic macros that declare local variables, <text:span text:style-name="T32">auto</text:span> can easily remove the need for the specification of the base types of the macro arguments:</text:p>
      <text:p text:style-name="P13">#define dataCondStoreTG (P , E , D ) <text:s text:c="14"/>\</text:p>
      <text:p text:style-name="P13"><text:s text:c="2"/>do { <text:s text:c="44"/>\</text:p>
      <text:p text:style-name="P13"><text:s text:c="4"/>auto * _pr_p = ( P ) ; <text:s text:c="24"/>\</text:p>
      <text:p text:style-name="P13"><text:s text:c="4"/>auto _pr_expected = ( E ) ; <text:s text:c="19"/>\</text:p>
      <text:p text:style-name="P13"><text:s text:c="4"/>auto _pr_desired = ( D ) ; <text:s text:c="20"/>\</text:p>
      <text:p text:style-name="P13"><text:s text:c="4"/>bool _pr_c ; <text:s text:c="34"/>\</text:p>
      <text:p text:style-name="P13"><text:s text:c="4"/>do { <text:s text:c="42"/>\</text:p>
      <text:p text:style-name="P13"><text:s text:c="6"/>mtx_lock (&amp; _pr_p - &gt; mtx ) ; <text:s text:c="15"/>\</text:p>
      <text:p text:style-name="P13"><text:s text:c="6"/>_pr_c = ( _pr_p - &gt; data == _pr_expected ) ; \</text:p>
      <text:p text:style-name="P13"><text:s text:c="6"/>if ( _pr_c ) _pr_p - &gt; data = _pr_desired ; <text:s/>\</text:p>
      <text:p text:style-name="P13"><text:s text:c="6"/>mtx_unlock (&amp; _pr_p - &gt; mtx ) ; <text:s text:c="13"/>\</text:p>
      <text:p text:style-name="P13"><text:s text:c="4"/>} while (! _pr_c ) ; <text:s text:c="26"/>\</text:p>
      <text:p text:style-name="P13"><text:s text:c="2"/>} while ( false )</text:p>
      <text:p text:style-name="Preformatted_20_Text"/>
      <text:p text:style-name="Text_20_body">C’s declaration syntax currently already allows to omit the type in a variable definition, as long as the variable is initialized and a storage initializer (such as <text:span text:style-name="T32">auto</text:span> or <text:span text:style-name="T32">static</text:span>) disambiguates the construct from an assignment. In previous versions of C the interpretation of such a definition had been <text:span text:style-name="T32">int</text:span>; since C11 this is a constraint violation. We will propose to <text:span text:style-name="T50">partially </text:span>align C with C++, here, and to change this such <text:span text:style-name="T49">that </text:span>the type of the variable is inferred from the <text:span text:style-name="T49">type of the </text:span>initializer expression.</text:p>
      <text:p text:style-name="P47">We <text:span text:style-name="T51">achieve this by standardizing the existing practice in the GNU C dialect provided by the </text:span><text:span text:style-name="T33">__auto_type</text:span><text:span text:style-name="T51"> specifier exactly. This is a strict subset of allowed C++11 behaviour. We expect and hope that implementers will treat incompatibilities with extended C++ declaration syntax (such as </text:span><text:span text:style-name="T33">auto const *</text:span><text:span text:style-name="T52">)</text:span><text:span text:style-name="T51"> as QoI bugs and implement these as extensions, establishing practice and experience for the C-side interpretation of such declarations. Standardizing the base value-only feature is a necessary basis to allow implementations to build beyond it with extended declarations.</text:span></text:p>
      <text:h text:style-name="Heading_20_2" text:outline-level="2"><text:bookmark text:name="proposal"/>Proposal</text:h>
      <text:p text:style-name="Text_20_body">We propose <text:span text:style-name="T54">standardizing the GNU C feature exactly, except for changing the name of the extended specifier </text:span><text:span text:style-name="T35">__auto_type</text:span><text:span text:style-name="T54"> to the existing specifier </text:span><text:span text:style-name="T35">auto</text:span><text:span text:style-name="T54">.</text:span></text:p>
      <text:p text:style-name="P51">The GNU C feature has clear semantics which can be expressed entirely in terms of the adopted <text:span text:style-name="T32">typeof</text:span> feature: the inferred type for a given initializer <text:span text:style-name="T32">(init)</text:span> is, exactly, <text:span text:style-name="T32">remove_quals (typeof (init))</text:span>. For example:</text:p>
      <text:p text:style-name="P13">void foo (int x, int const y) {</text:p>
      <text:p text:style-name="P13"><text:s text:c="2"/>__auto_type a = x;</text:p>
      <text:p text:style-name="P13"><text:s text:c="2"/>__auto_type b = y;</text:p>
      <text:p text:style-name="P13"/>
      <text:p text:style-name="P13"><text:s text:c="2"/>int * c = &amp;a;</text:p>
      <text:p text:style-name="P13"><text:s text:c="2"/>int * d = &amp;b; // OK</text:p>
      <text:p text:style-name="P13">}</text:p>
      <text:p text:style-name="P13"/>
      <text:p text:style-name="P13">void bar (int x, int const y) {</text:p>
      <text:p text:style-name="P13"><text:s text:c="2"/>typeof (x) a = x;</text:p>
      <text:p text:style-name="P13"><text:s text:c="2"/>typeof (y) b = y;</text:p>
      <text:p text:style-name="P13"/>
      <text:p text:style-name="P13"><text:s text:c="2"/>int * c = &amp;a;</text:p>
      <text:p text:style-name="P13"><text:s text:c="2"/>int * d = &amp;b; // not OK, qualifier discarded, GCC warns/errors</text:p>
      <text:p text:style-name="P13">}</text:p>
      <text:p text:style-name="P13"/>
      <text:p text:style-name="P51"><text:soft-page-break/>The feature is more limited than generic C declarations and than the corresponding C++ feature. A declaration using __auto_type must be initialized, must only consist of a single <text:span text:style-name="T55">declarator, and may not have any part of its type specified at all – it must infer the entire object type from the initializer value, and cannot therefore be used in combination with </text:span><text:span text:style-name="T37">*</text:span><text:span text:style-name="T55"> or </text:span><text:span text:style-name="T37">[]</text:span><text:span text:style-name="T55"> the way auto can in C++ - there must be no type specifiers in the sequence apart from the </text:span><text:span text:style-name="T37">auto</text:span><text:span text:style-name="T55">.</text:span></text:p>
      <text:p text:style-name="P52">The <text:span text:style-name="T32">auto</text:span> used as a complete type specifier may still be used in conjunction with qualifiers and with other storage class specifiers:</text:p>
      <text:p text:style-name="P13">void baz (int x, int const y) {</text:p>
      <text:p text:style-name="P13"><text:s text:c="2"/>__auto_type const a = x;</text:p>
      <text:p text:style-name="P13"><text:s text:c="2"/>__auto_type b = y;</text:p>
      <text:p text:style-name="P13"><text:s text:c="2"/>static __auto_type c = 1ul; // OK</text:p>
      <text:p text:style-name="P13"/>
      <text:p text:style-name="P13"><text:s text:c="2"/>int * pa = &amp;a; // not OK</text:p>
      <text:p text:style-name="P13"><text:s text:c="2"/>int const * pb = &amp;b; // OK</text:p>
      <text:p text:style-name="P13"/>
      <text:p text:style-name="P13"><text:s text:c="2"/>int * pc = &amp;c; // not OK, incompatible with <text:span text:style-name="T55">unsigned </text:span>long *</text:p>
      <text:p text:style-name="P13">}</text:p>
      <text:p text:style-name="Preformatted_20_Text"/>
      <text:p text:style-name="P53">In order to avoid either specifying the wording for “same type”, which caused difficulty in accepting revision 5 of this proposal, or allowing different variables with the same syntactic specifier to infer different object types, we propose adding a new syntax <text:span text:style-name="T57">constraint </text:span>to exactly match the current GNU C behaviour that allows only one declarator per whole declaration using <text:span text:style-name="T32">__auto_type</text:span>.</text:p>
      <text:p text:style-name="P53">We expect implementations to gradually establish practice for how this rule should be relaxed as users explore the design space. As with the restriction against partially-specified types, we hope that implementations will support a more complete, C++-like extended feature that builds on current practice as users start to demand it, but do not standardize invention.</text:p>
      <text:h text:style-name="Heading_20_2" text:outline-level="2"><text:bookmark text:name="alternatives"/>Alternatives</text:h>
      <text:p text:style-name="P51"><text:span text:style-name="T16">C has accepted final wording for </text:span><text:span text:style-name="T36">typeof</text:span><text:span text:style-name="T16"> and it is therefore now possible to declare an object in terms of the type of its initializer by writing:</text:span></text:p>
      <text:p text:style-name="P14">remove_quals (typeof (<text:span text:style-name="T58">(0, </text:span>init)<text:span text:style-name="T58">)</text:span>) var = init;</text:p>
      <text:p text:style-name="P14"/>
      <text:p text:style-name="P51">The main problem with this is the repetition. There is a maintenance burden to any use outside of macro expansion; the side effect repetition is potentially unclear; and readability is harmed for non-trivial expressions (which may be quite long).</text:p>
      <text:p text:style-name="P51">Practice shows that implementations do not need this repetition. They already know what the type of an initializing expression is, and are able to insert it into the specifiers implicitly. Therefore, the language should not force the use of a repeating construct when one is not necessary.</text:p>
      <text:h text:style-name="Heading_20_2" text:outline-level="2"><text:bookmark text:name="impact"/>Impact</text:h>
      <text:p text:style-name="P53">Implementation burden for this feature is low. Conforming C implementations are already able to delay fixing the type of a variable being declared until after seeing the initializer, as this is required for unspecified-array-size, where the element type of the array is known but the number of elements (and thus the complete type of the array object) is only known after the entire initializer <text:span text:style-name="T56">right-hand-</text:span><text:soft-page-break/><text:span text:style-name="T56">side</text:span> has been seen. This feature therefore requires only a relatively minor change to existing machinery required for a conforming implementation.</text:p>
      <text:p text:style-name="P53">There is no ABI or runtime impact. The feature is purely syntactic.</text:p>
      <text:h text:style-name="P8" text:outline-level="3">Bit-fields</text:h>
      <text:p text:style-name="Text_20_body">The definition of bit-fields in C is underspecified, in that their types are only known if an lvalue expression of a bit-field additionally undergoes integer promotion. If no such promotion is performed, for example in a <text:span text:style-name="T32">_Generic</text:span> or comma expression, implementations diverge in their interpretation of the standard. Some always produce one of the types <text:span text:style-name="T32">bool</text:span>, <text:span text:style-name="T32">signed int</text:span> or <text:span text:style-name="T32">unsigned int</text:span>, others produce some implementation defined types of that reflect the width of the bit-field. The latter are not integer types in the sense of the standard because they only have to convert under promotion and need not to have any other property of integers, and, usually don’t have documented declaration syntax.</text:p>
      <text:p text:style-name="P54">It is not the place of this proposal here to sort out this inconsistency between different interpretations of the standard. <text:span text:style-name="T56">This proposal specifies the feature in terms of the type specifier produced by a </text:span><text:span text:style-name="T38">typeof</text:span><text:span text:style-name="T56"> operator, and therefore does not need to separately call out this divergent behaviour or propose a solution separately from that feature.</text:span></text:p>
      <text:h text:style-name="Heading_20_3" text:outline-level="3">Combined definitions and compatible types</text:h>
      <text:p text:style-name="P56">The semantics of underspecified declarations become complicated if they contain definitions for several objects where the inferred type has to be consistent.</text:p>
      <text:p text:style-name="P56"><text:span text:style-name="T56">In revision 5 </text:span>the choice <text:span text:style-name="T56">was</text:span> that inferred types have to be the same, only having compatible types is not sufficient. This is particularly important for integer types, where mixing different enumeration types would have an ambiguity which type is chosen.</text:p>
      <text:p text:style-name="P55">This partially caused revision 5 to be rejected at the January 2022 WG14 meeting and therefore the proposal resolves this difficulty by eliminating the syntax that would allow for any ambiguity here. Declarations using inferred types must now form separate declaration statements in line with existing GNU C practice.</text:p>
      <text:h text:style-name="Heading_20_3" text:outline-level="3">Combined definitions and variably modified types</text:h>
      <text:p text:style-name="P55">Revision 5 included a consistency problem in that different types within the same definition could not be checked for consistent VM elements.</text:p>
      <text:p text:style-name="P55">This inconsistency is removed by not supporting multiple declarations within a single statement, so there is no longer any constraint to satisfy.</text:p>
      <text:h text:style-name="P9" text:outline-level="3">Specifiers</text:h>
      <text:p text:style-name="P58">The constraint against specifying <text:span text:style-name="T32">auto</text:span> in combination with static, register, etc. is relaxed. <text:span text:style-name="T32">auto</text:span> now has no effect if it is not used to infer a type.</text:p>
      <text:p text:style-name="P58">We expect implementations to continue to warn as a matter of QoI. This does not break any existing conforming code.</text:p>
      <text:h text:style-name="P10" text:outline-level="3"><text:soft-page-break/>Scope</text:h>
      <text:p text:style-name="P61">Existing practice in GNU C is that the identifier being declared has scope beginning after the end of the full-declaration, as opposed to all other identifiers which enter scope at the end of their declarator.</text:p>
      <text:p text:style-name="P61">Unlike in revision 5, the same identifier in an enclosing scope is not shadowed and the identifier can appear to refer to itself; however it refers to the identifier in the enclosing scope. <text:span text:style-name="T62">We tighten this with an additional constraint; we would expect GNU C implementations to warn on this construct (therefore conforming) as a matter of QoI in any case.</text:span></text:p>
      <text:h text:style-name="P3" text:outline-level="2">Implementation Experience</text:h>
      <text:p text:style-name="P49"><text:span text:style-name="T32">__</text:span><text:span text:style-name="T33">auto_type</text:span><text:span text:style-name="T51"> is implemented by most (all?) compilers implementing the GNU C dialect or aiming for GCC compatibility. A non-exhaustive list includes: GCC, Clang, Intel CC, Helix QAC, Klocwork, armCC. It is generally used to implement type-generic macros in library headers. It does not appear to be widely used by developers in application code but is heavily tested by virtue of its appearance in Standard header implementations.</text:span></text:p>
      <text:p text:style-name="P50">Many compilers exist which borrow components from GCC or Clang, and therefore inherit this feature intentionally or unintentionally.</text:p>
      <text:p text:style-name="P50">A more comprehensive feature exists in C++ since C++11, which is based on template type deduction rules and can therefore use <text:span text:style-name="T32">auto</text:span> to infer parts of a partially-specified type, such as specifying that a declaration creates a pointer or reference but not what it is a pointer or reference to. This is in near-universal use by millions of C++ developers every day.</text:p>
      <text:p text:style-name="P50">Specifying a feature closer to the C++ specifier would require substantial original wording in the Standard since C does not include templates, <text:span text:style-name="T53">which the C++ feature is defined in terms of. We hope that C++ will set user expectation to be able to write </text:span><text:span text:style-name="T34">auto * foo = ...</text:span><text:span text:style-name="T53"> such that implementers are encouraged to establish practice for this form as well.</text:span></text:p>
      <text:h text:style-name="Heading_20_2" text:outline-level="2"><text:bookmark text:name="proposed-wording"/>Proposed wording</text:h>
      <text:p text:style-name="Text_20_body">Changes are proposed against the wording in C2<text:span text:style-name="T12">3</text:span> draft n2<text:span text:style-name="T12">731</text:span>. Bolded text is new text.</text:p>
      <text:p text:style-name="P61">Modify 6.2.1 “Scopes of identifiers”, paragraph 7:</text:p>
      <text:p text:style-name="Quotations">Structure, union, and enumeration tags have scope that begins just after the appearance of the tag in a type specifier that declares the tag. Each enumeration constant has scope that begins just after the appearance of its defining enumerator in an enumerator list. <text:span text:style-name="T20">An ordinary identifier whose type is specified by a non-ignored </text:span><text:span text:style-name="T40">auto</text:span><text:span text:style-name="T20"> specifier has scope that begins just after the completion of its declaration </text:span><text:span text:style-name="T30">footnote)</text:span><text:span text:style-name="T20">.</text:span> Any other identifier has scope that begins just after the completion of its declarator.</text:p>
      <text:p text:style-name="P23">footnote) therefore such an identifier is in scope following the terminating semicolon of the declaration.</text:p>
      <text:p text:style-name="P62">Add a forward reference:</text:p>
      <text:p text:style-name="Quotations"><text:soft-page-break/>Forward references: declarations (6.7)<text:span text:style-name="T22">, </text:span><text:span text:style-name="T41">auto</text:span><text:span text:style-name="T21"> specifier (6.7.3),</text:span><text:span text:style-name="T61"> </text:span>function calls (6.5.2.2), function definitions (6.9.1), identifiers (6.4.2), macro replacement (6.10.3), name spaces of identifiers (6.2.3), source file inclusion (6.10.2), statements and blocks (6.8).</text:p>
      <text:p text:style-name="P57">Add a new rule, <text:span text:style-name="T14">auto</text:span><text:span text:style-name="T13">-</text:span><text:span text:style-name="T14">specifier</text:span><text:span text:style-name="T16">, to the declaration syntax in 6.7 “Declarations”:</text:span></text:p>
      <text:p text:style-name="P33"><text:span text:style-name="T15">declaration-specifiers:</text:span></text:p>
      <text:p text:style-name="P34">storage-class-specifier declaration-specifiers opt</text:p>
      <text:p text:style-name="P34">type-specifier declaration-specifiers opt</text:p>
      <text:p text:style-name="P35">auto-specifier declaration-specifiers opt</text:p>
      <text:p text:style-name="P34">type-qualifier declaration-specifiers opt</text:p>
      <text:p text:style-name="P34">function-specifier declaration-specifiers opt</text:p>
      <text:p text:style-name="P17">alignment-specifier declaration-specifiers opt</text:p>
      <text:p text:style-name="P57"><text:span text:style-name="T57">Add a new paragraph after</text:span> 6.7 paragraph 4:</text:p>
      <text:p text:style-name="P27">If a declaration infers a type from an initializer, it shall declare only one declarator.</text:p>
      <text:p text:style-name="P58">Remove <text:span text:style-name="T32">auto</text:span> from 6.7.1 “Storage-class specifiers”:</text:p>
      <text:p text:style-name="P34">storage-class-specifier:</text:p>
      <text:p text:style-name="P32">t<text:span text:style-name="T32">ypedef</text:span></text:p>
      <text:p text:style-name="P37">extern</text:p>
      <text:p text:style-name="P37">static</text:p>
      <text:p text:style-name="P37">_Thread_local</text:p>
      <text:p text:style-name="P25">register</text:p>
      <text:p text:style-name="P59">Add a new section after 6.7.2:</text:p>
      <text:p text:style-name="P18">6.7.3 <text:s/>Auto specifier</text:p>
      <text:p text:style-name="P18">Syntax</text:p>
      <text:p text:style-name="P36">auto-specifier:</text:p>
      <text:p text:style-name="P26">auto</text:p>
      <text:p text:style-name="P18">Constraints</text:p>
      <text:p text:style-name="P29">When an <text:span text:style-name="T32">auto</text:span> specifier is used to infer the type of a declarator, the declaration shall include an <text:span text:style-name="T63">expression </text:span>initializer.</text:p>
      <text:p text:style-name="P30">A declaration shall contain at most one <text:span text:style-name="T32">auto</text:span> specifier.</text:p>
      <text:p text:style-name="P31">The initializer expression for a declaration whose type is specified by the <text:span text:style-name="T32">auto</text:span> specifier shall not include the same identifier as as subexpression.</text:p>
      <text:p text:style-name="P18">Semantics</text:p>
      <text:p text:style-name="P29">The <text:span text:style-name="T32">auto</text:span> specifier is a type specifier that specifies the value-converted type of the initializer expression provided for the declaration.</text:p>
      <text:p text:style-name="P29">The type specified is the type that would be specified by <text:span text:style-name="T32">typeof ((0, </text:span><text:span text:style-name="T39">expr</text:span><text:span text:style-name="T32">))</text:span>, where <text:span text:style-name="T39">expr</text:span> is the initializer expression.</text:p>
      <text:p text:style-name="P30"><text:soft-page-break/>If an explicit type specifier is provided as per 6.7.2, the <text:span text:style-name="T32">auto</text:span> specifier is ignored.</text:p>
      <text:p text:style-name="P29"><text:span text:style-name="T17">NOTE: </text:span>the auto specifier cannot infer an array <text:span text:style-name="T58">or function </text:span>type because value conversion never results in an array <text:span text:style-name="T58">or function </text:span>type. An array object cannot be used as an initializer expression without being converted to a pointer to its first element.</text:p>
      <text:p text:style-name="P20">EXAMPLE 1<text:span text:style-name="T22"> </text:span><text:span text:style-name="T25">the inferred type is the type of the initializer expression after value-conversion. Therefore it does not include qualifiers if the name of an object is specified:</text:span></text:p>
      <text:p text:style-name="P13">void foo (int x, int const y) {</text:p>
      <text:p text:style-name="P13"><text:s text:c="2"/>auto a = x;</text:p>
      <text:p text:style-name="P13"><text:s text:c="2"/>auto b = y;</text:p>
      <text:p text:style-name="P13"/>
      <text:p text:style-name="P13"><text:s text:c="2"/>int * pa = &amp;a;</text:p>
      <text:p text:style-name="P13"><text:s text:c="2"/>int * pb = &amp;b; // OK, <text:span text:style-name="T59">b has type int, not int const</text:span></text:p>
      <text:p text:style-name="P13">}</text:p>
      <text:p text:style-name="P13"/>
      <text:p text:style-name="P13">void bar (int x, int const y) {</text:p>
      <text:p text:style-name="P13"><text:s text:c="2"/>typeof (x) a = x;</text:p>
      <text:p text:style-name="P13"><text:s text:c="2"/>typeof (y) b = y;</text:p>
      <text:p text:style-name="P13"><text:s text:c="2"/>typeof ((0, y)) c = y; // remove_quals not </text:p>
      <text:p text:style-name="P13"/>
      <text:p text:style-name="P13"><text:s text:c="2"/>int * pa = &amp;a;</text:p>
      <text:p text:style-name="P13"><text:s text:c="2"/>int * pb = &amp;b; // not OK, qualifier discarded</text:p>
      <text:p text:style-name="P13"><text:s text:c="2"/>int * pc = &amp;c; // OK because <text:span text:style-name="T10">c was </text:span>value-converted</text:p>
      <text:p text:style-name="P13">}</text:p>
      <text:p text:style-name="P13"/>
      <text:p text:style-name="P21">EXAMPLE 2<text:span text:style-name="T22"> the </text:span><text:span text:style-name="T42">auto</text:span><text:span text:style-name="T22"> specifier may be combined with storage class specifiers, but not used in declarations of more than one declarator:</text:span></text:p>
      <text:p text:style-name="P13">void baz (int x, int const y) {</text:p>
      <text:p text:style-name="P15"><text:s text:c="2"/>static auto <text:span text:style-name="T59">a</text:span> = 1ul; // OK, <text:span text:style-name="T59">inferred type is unsigned long</text:span></text:p>
      <text:p text:style-name="P13"/>
      <text:p text:style-name="P13"><text:s text:c="2"/><text:span text:style-name="T59">auto</text:span> <text:span text:style-name="T10">b</text:span> = 0, <text:span text:style-name="T10">c</text:span> = 1.0; // <text:span text:style-name="T59">constraint violation</text:span></text:p>
      <text:p text:style-name="P13"/>
      <text:p text:style-name="P13"><text:s text:c="2"/>int * p<text:span text:style-name="T10">a</text:span> = &amp;<text:span text:style-name="T10">a</text:span>; // not OK, incompatible with <text:span text:style-name="T59">unsigned </text:span>long *</text:p>
      <text:p text:style-name="P13">}</text:p>
      <text:p text:style-name="Preformatted_20_Text"/>
      <text:p text:style-name="P22">EXAMPLE 3<text:span text:style-name="T22"> an array type cannot be inferred because an expression does not have array type after value-conversion:</text:span></text:p>
      <text:p text:style-name="P13">void boo (void) {</text:p>
      <text:p text:style-name="P13"><text:s text:c="2"/>int arr[10];</text:p>
      <text:p text:style-name="P13"/>
      <text:p text:style-name="P16"><text:s text:c="2"/>auto a = arr;</text:p>
      <text:p text:style-name="P13"><text:s text:c="2"/>_Static_assert (sizeof (a) == sizeof (int *)</text:p>
      <text:p text:style-name="P13"><text:s text:c="6"/>, "inferred type is value-converted");</text:p>
      <text:p text:style-name="P13"/>
      <text:p text:style-name="P13"><text:s text:c="2"/>typeof (arr) b = arr; // <text:span text:style-name="T60">error, </text:span>invalid initializer</text:p>
      <text:p text:style-name="P13"><text:s text:c="2"/>typeof ((0, arr)) c = arr; // pointer</text:p>
      <text:p text:style-name="P13"/>
      <text:p text:style-name="P13"><text:s text:c="2"/>_Static_assert (sizeof a == sizeof c</text:p>
      <text:p text:style-name="P13"><text:s text:c="6"/>, "inferred type is value-converted")</text:p>
      <text:p text:style-name="P13">}</text:p>
      <text:p text:style-name="Preformatted_20_Text"/>
      <text:p text:style-name="P24">EXAMPLE 4<text:span text:style-name="T22"> an identifier declared with an inferred type has scope that begins after the end of the complete declaration, rather than after the end of the declarator:</text:span></text:p>
      <text:p text:style-name="P13">void qux (int x, int y) {</text:p>
      <text:p text:style-name="P13"><text:soft-page-break/><text:s text:c="2"/>int c = (c, 1); // non-inferred; in scope for the =</text:p>
      <text:p text:style-name="P13"/>
      <text:p text:style-name="P13"><text:s text:c="2"/>auto a = 2 + x; // OK, doesn't refer to a</text:p>
      <text:p text:style-name="P13"><text:s text:c="2"/>auto b = (b, x); // error, b is not in scope</text:p>
      <text:p text:style-name="P13"/>
      <text:p text:style-name="P13"><text:s text:c="2"/>{</text:p>
      <text:p text:style-name="P13"><text:s text:c="4"/>auto y = y; // <text:span text:style-name="T11">constraint violation</text:span>, <text:span text:style-name="T61">would </text:span>refer to outer y</text:p>
      <text:p text:style-name="P13"><text:s text:c="2"/>}</text:p>
      <text:p text:style-name="P13">}</text:p>
      <text:p text:style-name="Preformatted_20_Text"/>
      <text:p text:style-name="P28"><text:span text:style-name="Strong_20_Emphasis"><text:span text:style-name="T18">Recommended Practice</text:span></text:span></text:p>
      <text:p text:style-name="P19"><text:span text:style-name="Strong_20_Emphasis"><text:span text:style-name="T23">Implementations are encouraged to issue a diagnostic message when a </text:span></text:span><text:span text:style-name="Strong_20_Emphasis"><text:span text:style-name="T24">declaration includes an </text:span></text:span><text:span text:style-name="Strong_20_Emphasis"><text:span text:style-name="T43">auto</text:span></text:span><text:span text:style-name="Strong_20_Emphasis"><text:span text:style-name="T24"> specifier and an explicit type specifier </text:span></text:span><text:span text:style-name="Strong_20_Emphasis"><text:span text:style-name="T27">that would cause the </text:span></text:span><text:span text:style-name="Strong_20_Emphasis"><text:span text:style-name="T45">auto</text:span></text:span><text:span text:style-name="Strong_20_Emphasis"><text:span text:style-name="T27"> specifier to be ignored</text:span></text:span><text:span text:style-name="Strong_20_Emphasis"><text:span text:style-name="T24">.</text:span></text:span></text:p>
      <text:p text:style-name="P28"><text:span text:style-name="T19">Forward references: </text:span><text:span text:style-name="T43">typeof</text:span><text:span text:style-name="T24"> (?.?.?)</text:span></text:p>
      <text:p text:style-name="P60"><text:span text:style-name="Strong_20_Emphasis"><text:span text:style-name="T26">No additional text is needed to specify the combination of </text:span></text:span><text:span text:style-name="Strong_20_Emphasis"><text:span text:style-name="T44">auto</text:span></text:span><text:span text:style-name="Strong_20_Emphasis"><text:span text:style-name="T26"> with </text:span></text:span><text:span text:style-name="Strong_20_Emphasis"><text:span text:style-name="T44">extern</text:span></text:span><text:span text:style-name="Strong_20_Emphasis"><text:span text:style-name="T26">. An auto-specifier is already a kind of type specifier and the existing wording about the types having to match is therefore sufficient.</text:span></text:span></text:p>
      <text:h text:style-name="Heading_20_2" text:outline-level="2"><text:bookmark text:name="references"/>References</text:h>
      <text:list xml:id="list1727582300" text:style-name="L8">
        <text:list-item>
          <text:p text:style-name="P63"><text:a xlink:type="simple" xlink:href="http://www.open-std.org/jtc1/sc22/wg14/www/docs/n2731.pdf" office:target-frame-name="_blank" xlink:show="new" text:style-name="Internet_20_link" text:visited-style-name="Visited_20_Internet_20_Link"><text:span text:style-name="T56">C23 n2731</text:span></text:a></text:p>
        </text:list-item>
        <text:list-item>
          <text:p text:style-name="P63"><text:a xlink:type="simple" xlink:href="http://www.open-std.org/jtc1/sc22/wg14/www/docs/n2890.pdf" office:target-frame-name="_blank" xlink:show="new" text:style-name="Internet_20_link" text:visited-style-name="Visited_20_Internet_20_Link"><text:span text:style-name="T46">n2890 "Improve type generic programming"</text:span></text:a></text:p>
        </text:list-item>
        <text:list-item>
          <text:p text:style-name="P63"><text:a xlink:type="simple" xlink:href="http://www.open-std.org/jtc1/sc22/wg14/www/docs/n2927.htm" text:style-name="Internet_20_link" text:visited-style-name="Visited_20_Internet_20_Link"><text:span text:style-name="T46">n2927 "Not-so-magic: typeof"</text:span></text:a></text:p>
        </text:list-item>
        <text:list-item>
          <text:p text:style-name="P64"><text:a xlink:type="simple" xlink:href="http://www.open-std.org/jtc1/sc22/wg21/docs/papers/2012/n3337.pdf" office:target-frame-name="_blank" xlink:show="new" text:style-name="Internet_20_link" text:visited-style-name="Visited_20_Internet_20_Link">C++11 n3337</text:a></text:p>
        </text:list-item>
        <text:list-item>
          <text:p text:style-name="P64"><text:a xlink:type="simple" xlink:href="https://gcc.gnu.org/onlinedocs/gcc/Typeof.html#Typeof" text:style-name="Internet_20_link" text:visited-style-name="Visited_20_Internet_20_Link"><text:span text:style-name="T51">GCC typeof and __auto_type</text:span></text:a></text:p>
          <text:p text:style-name="P63"/>
        </text:list-item>
      </text:list>
      <text:p text:style-name="P38">This document is pared down from an original by Jens Gustedt. It builds heavily on JeanHeyd Meneide’s accepted <text:span text:style-name="T32">typeof</text:span> fea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Liberation Mono', Courier, monospace, 'Droid Sans Mono', monospace, monospace, 'Droid Sans Fallback'"/>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6:24:15.161996095</meta:creation-date>
    <dc:date>2022-02-07T00:32:40.450217846</dc:date>
    <meta:editing-duration>PT5H51M29S</meta:editing-duration>
    <meta:editing-cycles>89</meta:editing-cycles>
    <meta:generator>LibreOffice/7.0.4.2$Linux_X86_64 LibreOffice_project/00$Build-2</meta:generator>
    <meta:document-statistic meta:table-count="0" meta:image-count="0" meta:object-count="0" meta:page-count="10" meta:paragraph-count="223" meta:word-count="3243" meta:character-count="19796" meta:non-whitespace-character-count="16183"/>
  </office:meta>
</office:document-meta>
</file>
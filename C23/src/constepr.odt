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Quotations">
      <style:paragraph-properties fo:margin-top="0cm" fo:margin-bottom="0.499cm" style:contextual-spacing="false" fo:line-height="100%"/>
      <style:text-properties fo:font-weight="bold" style:font-weight-asian="bold" style:font-weight-complex="bold"/>
    </style:style>
    <style:style style:name="P4" style:family="paragraph" style:parent-style-name="Heading_20_2">
      <style:text-properties officeooo:rsid="001c4dd2" officeooo:paragraph-rsid="001c4dd2"/>
    </style:style>
    <style:style style:name="P5" style:family="paragraph" style:parent-style-name="Heading_20_3">
      <style:text-properties officeooo:rsid="00043041" officeooo:paragraph-rsid="00043041"/>
    </style:style>
    <style:style style:name="P6" style:family="paragraph" style:parent-style-name="Heading_20_3">
      <style:text-properties officeooo:rsid="000e664d" officeooo:paragraph-rsid="000e664d"/>
    </style:style>
    <style:style style:name="P7" style:family="paragraph" style:parent-style-name="Preformatted_20_Text">
      <style:text-properties officeooo:paragraph-rsid="00043041"/>
    </style:style>
    <style:style style:name="P8" style:family="paragraph" style:parent-style-name="Quotations">
      <style:text-properties fo:font-weight="bold" officeooo:rsid="0031256a" officeooo:paragraph-rsid="0031256a" style:font-weight-asian="bold" style:font-weight-complex="bold"/>
    </style:style>
    <style:style style:name="P9" style:family="paragraph" style:parent-style-name="Quotations">
      <style:text-properties fo:font-weight="bold" officeooo:rsid="003d0e9b" officeooo:paragraph-rsid="003d0e9b" style:font-weight-asian="bold" style:font-weight-complex="bold"/>
    </style:style>
    <style:style style:name="P10" style:family="paragraph" style:parent-style-name="Quotations">
      <style:text-properties officeooo:paragraph-rsid="0014d7d0"/>
    </style:style>
    <style:style style:name="P11" style:family="paragraph" style:parent-style-name="Quotations">
      <style:text-properties officeooo:paragraph-rsid="00168b4c"/>
    </style:style>
    <style:style style:name="P12" style:family="paragraph" style:parent-style-name="Quotations">
      <style:text-properties officeooo:paragraph-rsid="001fd3cc"/>
    </style:style>
    <style:style style:name="P13" style:family="paragraph" style:parent-style-name="Quotations">
      <style:text-properties officeooo:paragraph-rsid="0022c5b4"/>
    </style:style>
    <style:style style:name="P14" style:family="paragraph" style:parent-style-name="Quotations">
      <style:text-properties officeooo:paragraph-rsid="0022cff0"/>
    </style:style>
    <style:style style:name="P15" style:family="paragraph" style:parent-style-name="Quotations">
      <style:text-properties officeooo:paragraph-rsid="0024de74"/>
    </style:style>
    <style:style style:name="P16" style:family="paragraph" style:parent-style-name="Quotations">
      <style:text-properties officeooo:paragraph-rsid="00259d35"/>
    </style:style>
    <style:style style:name="P17" style:family="paragraph" style:parent-style-name="Quotations">
      <style:text-properties officeooo:paragraph-rsid="0026c3f5"/>
    </style:style>
    <style:style style:name="P18" style:family="paragraph" style:parent-style-name="Quotations">
      <style:text-properties officeooo:paragraph-rsid="0029533a"/>
    </style:style>
    <style:style style:name="P19" style:family="paragraph" style:parent-style-name="Quotations">
      <style:text-properties fo:font-style="italic" style:font-style-asian="italic" style:font-style-complex="italic"/>
    </style:style>
    <style:style style:name="P20" style:family="paragraph" style:parent-style-name="Quotations">
      <style:text-properties fo:font-style="italic" fo:font-weight="bold" officeooo:rsid="0031256a" officeooo:paragraph-rsid="0031256a" style:font-style-asian="italic" style:font-weight-asian="bold" style:font-style-complex="italic" style:font-weight-complex="bold"/>
    </style:style>
    <style:style style:name="P21" style:family="paragraph" style:parent-style-name="Quotations">
      <style:text-properties officeooo:paragraph-rsid="0031d0a6"/>
    </style:style>
    <style:style style:name="P22" style:family="paragraph" style:parent-style-name="Quotations">
      <style:text-properties officeooo:paragraph-rsid="0034b2f1"/>
    </style:style>
    <style:style style:name="P23" style:family="paragraph" style:parent-style-name="Quotations">
      <style:text-properties officeooo:paragraph-rsid="003b806a"/>
    </style:style>
    <style:style style:name="P24" style:family="paragraph" style:parent-style-name="Quotations">
      <style:text-properties officeooo:paragraph-rsid="003d0e9b"/>
    </style:style>
    <style:style style:name="P25" style:family="paragraph" style:parent-style-name="Quotations">
      <style:text-properties officeooo:paragraph-rsid="003ede09"/>
    </style:style>
    <style:style style:name="P26" style:family="paragraph" style:parent-style-name="Quotations">
      <style:paragraph-properties fo:margin-top="0cm" fo:margin-bottom="0cm" style:contextual-spacing="false" fo:line-height="100%"/>
      <style:text-properties fo:font-weight="bold" style:font-weight-asian="bold" style:font-weight-complex="bold"/>
    </style:style>
    <style:style style:name="P27" style:family="paragraph" style:parent-style-name="Quotations">
      <style:paragraph-properties fo:margin-top="0cm" fo:margin-bottom="0cm" style:contextual-spacing="false"/>
      <style:text-properties fo:font-style="italic" style:font-style-asian="italic" style:font-style-complex="italic"/>
    </style:style>
    <style:style style:name="P28" style:family="paragraph" style:parent-style-name="Quotations">
      <style:paragraph-properties fo:margin-top="0cm" fo:margin-bottom="0cm" style:contextual-spacing="false"/>
      <style:text-properties fo:font-style="italic" fo:font-weight="bold" officeooo:rsid="0031256a" officeooo:paragraph-rsid="0031256a" style:font-style-asian="italic" style:font-weight-asian="bold" style:font-style-complex="italic" style:font-weight-complex="bold"/>
    </style:style>
    <style:style style:name="P29" style:family="paragraph" style:parent-style-name="Standard">
      <style:text-properties officeooo:rsid="002bebd7" officeooo:paragraph-rsid="002bebd7"/>
    </style:style>
    <style:style style:name="P30" style:family="paragraph" style:parent-style-name="Text_20_body">
      <style:text-properties officeooo:rsid="000a7f4f" officeooo:paragraph-rsid="000a7f4f"/>
    </style:style>
    <style:style style:name="P31" style:family="paragraph" style:parent-style-name="Text_20_body">
      <style:text-properties officeooo:rsid="000d8ad5" officeooo:paragraph-rsid="000d8ad5"/>
    </style:style>
    <style:style style:name="P32" style:family="paragraph" style:parent-style-name="Text_20_body">
      <style:text-properties officeooo:paragraph-rsid="000d8ad5"/>
    </style:style>
    <style:style style:name="P33" style:family="paragraph" style:parent-style-name="Text_20_body">
      <style:text-properties officeooo:rsid="000e664d" officeooo:paragraph-rsid="000e664d"/>
    </style:style>
    <style:style style:name="P34" style:family="paragraph" style:parent-style-name="Text_20_body">
      <style:text-properties officeooo:paragraph-rsid="000e664d"/>
    </style:style>
    <style:style style:name="P35" style:family="paragraph" style:parent-style-name="Text_20_body">
      <style:text-properties officeooo:rsid="000f80b2" officeooo:paragraph-rsid="000f80b2"/>
    </style:style>
    <style:style style:name="P36" style:family="paragraph" style:parent-style-name="Text_20_body">
      <style:text-properties officeooo:rsid="0011e788" officeooo:paragraph-rsid="0011e788"/>
    </style:style>
    <style:style style:name="P37" style:family="paragraph" style:parent-style-name="Text_20_body">
      <style:text-properties officeooo:rsid="001ae138" officeooo:paragraph-rsid="001ae138"/>
    </style:style>
    <style:style style:name="P38" style:family="paragraph" style:parent-style-name="Text_20_body">
      <style:text-properties officeooo:rsid="001c4dd2" officeooo:paragraph-rsid="001c4dd2"/>
    </style:style>
    <style:style style:name="P39" style:family="paragraph" style:parent-style-name="Text_20_body">
      <style:text-properties officeooo:rsid="001c4dd2" officeooo:paragraph-rsid="001c6774"/>
    </style:style>
    <style:style style:name="P40" style:family="paragraph" style:parent-style-name="Text_20_body">
      <style:text-properties officeooo:rsid="001c6774" officeooo:paragraph-rsid="001c6774"/>
    </style:style>
    <style:style style:name="P41" style:family="paragraph" style:parent-style-name="Text_20_body">
      <style:text-properties officeooo:rsid="0022cff0" officeooo:paragraph-rsid="0022cff0"/>
    </style:style>
    <style:style style:name="P42" style:family="paragraph" style:parent-style-name="Text_20_body">
      <style:text-properties officeooo:paragraph-rsid="00259d35"/>
    </style:style>
    <style:style style:name="P43" style:family="paragraph" style:parent-style-name="Text_20_body">
      <style:text-properties officeooo:paragraph-rsid="0029533a"/>
    </style:style>
    <style:style style:name="P44" style:family="paragraph" style:parent-style-name="Text_20_body">
      <style:text-properties officeooo:rsid="0031256a" officeooo:paragraph-rsid="0031256a"/>
    </style:style>
    <style:style style:name="P45" style:family="paragraph" style:parent-style-name="Text_20_body">
      <style:text-properties officeooo:paragraph-rsid="0036ffc1"/>
    </style:style>
    <style:style style:name="P46" style:family="paragraph" style:parent-style-name="Text_20_body">
      <style:text-properties officeooo:rsid="003d0e9b" officeooo:paragraph-rsid="003d0e9b"/>
    </style:style>
    <style:style style:name="P47" style:family="paragraph" style:parent-style-name="Preformatted_20_Text">
      <style:paragraph-properties fo:margin-top="0cm" fo:margin-bottom="0.499cm" style:contextual-spacing="false"/>
      <style:text-properties officeooo:paragraph-rsid="00467890"/>
    </style:style>
    <style:style style:name="P48" style:family="paragraph" style:parent-style-name="Quotations" style:list-style-name="L6"/>
    <style:style style:name="P49" style:family="paragraph" style:parent-style-name="Quotations" style:list-style-name="L7"/>
    <style:style style:name="P50" style:family="paragraph" style:parent-style-name="Quotations" style:list-style-name="L6">
      <style:paragraph-properties fo:margin-left="0cm" fo:margin-right="1cm" fo:text-indent="0cm" style:auto-text-indent="false"/>
      <style:text-properties officeooo:paragraph-rsid="00308070"/>
    </style:style>
    <style:style style:name="P51" style:family="paragraph" style:parent-style-name="Quotations" style:list-style-name="L7">
      <style:paragraph-properties fo:margin-left="0cm" fo:margin-right="1cm" fo:text-indent="0cm" style:auto-text-indent="false"/>
      <style:text-properties officeooo:paragraph-rsid="0019ddfd"/>
    </style:style>
    <style:style style:name="P52" style:family="paragraph" style:parent-style-name="Quotations" style:list-style-name="L7">
      <style:paragraph-properties fo:margin-left="0cm" fo:margin-right="1cm" fo:text-indent="0cm" style:auto-text-indent="false"/>
      <style:text-properties officeooo:paragraph-rsid="0040c6ae"/>
    </style:style>
    <style:style style:name="P53" style:family="paragraph" style:parent-style-name="Quotations" style:list-style-name="L7">
      <style:paragraph-properties fo:margin-top="0cm" fo:margin-bottom="0cm" style:contextual-spacing="false"/>
    </style:style>
    <style:style style:name="P54" style:family="paragraph" style:parent-style-name="Text_20_body" style:list-style-name="L1">
      <style:text-properties officeooo:rsid="00043041" officeooo:paragraph-rsid="00137b77"/>
    </style:style>
    <style:style style:name="P55" style:family="paragraph" style:parent-style-name="Text_20_body" style:list-style-name="L1">
      <style:text-properties officeooo:rsid="00043041" officeooo:paragraph-rsid="00043041"/>
    </style:style>
    <style:style style:name="P56" style:family="paragraph" style:parent-style-name="Text_20_body" style:list-style-name="L1">
      <style:text-properties officeooo:rsid="002e8667" officeooo:paragraph-rsid="002e8667"/>
    </style:style>
    <style:style style:name="P57" style:family="paragraph" style:parent-style-name="Text_20_body" style:list-style-name="L1">
      <style:text-properties officeooo:rsid="002f1e30" officeooo:paragraph-rsid="002f1e30"/>
    </style:style>
    <style:style style:name="P58" style:family="paragraph" style:parent-style-name="Text_20_body" style:list-style-name="L1">
      <style:text-properties officeooo:rsid="0031a93f" officeooo:paragraph-rsid="0031a93f"/>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text-properties fo:font-style="normal" style:text-underline-style="none" officeooo:rsid="000d8ad5" officeooo:paragraph-rsid="000d8ad5" style:font-style-asian="normal" style:font-style-complex="normal"/>
    </style:style>
    <style:style style:name="P64" style:family="paragraph" style:parent-style-name="Text_20_body">
      <style:text-properties officeooo:rsid="0036ffc1" officeooo:paragraph-rsid="0036ffc1"/>
    </style:style>
    <style:style style:name="P65" style:family="paragraph" style:parent-style-name="Text_20_body" style:list-style-name="L8">
      <style:text-properties officeooo:paragraph-rsid="00140534"/>
    </style:style>
    <style:style style:name="P66" style:family="paragraph" style:parent-style-name="Text_20_body" style:list-style-name="L3">
      <style:paragraph-properties fo:margin-top="0cm" fo:margin-bottom="0cm" style:contextual-spacing="false"/>
    </style:style>
    <style:style style:name="P67" style:family="paragraph" style:parent-style-name="Text_20_body" style:list-style-name="L4">
      <style:paragraph-properties fo:margin-top="0cm" fo:margin-bottom="0cm" style:contextual-spacing="false"/>
    </style:style>
    <style:style style:name="P68" style:family="paragraph" style:parent-style-name="Text_20_body" style:list-style-name="L8">
      <style:paragraph-properties fo:margin-top="0cm" fo:margin-bottom="0cm" style:contextual-spacing="false"/>
    </style:style>
    <style:style style:name="P69" style:family="paragraph" style:parent-style-name="Text_20_body" style:list-style-name="L8">
      <style:paragraph-properties fo:margin-top="0cm" fo:margin-bottom="0cm" style:contextual-spacing="false"/>
      <style:text-properties officeooo:rsid="00088fb2" officeooo:paragraph-rsid="00088fb2"/>
    </style:style>
    <style:style style:name="P70" style:family="paragraph" style:parent-style-name="Text_20_body" style:list-style-name="L8">
      <style:paragraph-properties fo:margin-top="0cm" fo:margin-bottom="0cm" style:contextual-spacing="false"/>
      <style:text-properties officeooo:rsid="000d8ad5" officeooo:paragraph-rsid="000d8ad5"/>
    </style:style>
    <style:style style:name="P71" style:family="paragraph" style:parent-style-name="Text_20_body" style:list-style-name="L8">
      <style:paragraph-properties fo:margin-top="0cm" fo:margin-bottom="0cm" style:contextual-spacing="false"/>
      <style:text-properties officeooo:rsid="00140534" officeooo:paragraph-rsid="00140534"/>
    </style:style>
    <style:style style:name="T1" style:family="text">
      <style:text-properties fo:language="en" fo:country="GB"/>
    </style:style>
    <style:style style:name="T2" style:family="text">
      <style:text-properties fo:language="en" fo:country="GB" officeooo:rsid="0045c5a5"/>
    </style:style>
    <style:style style:name="T3" style:family="text">
      <style:text-properties officeooo:rsid="00024e30"/>
    </style:style>
    <style:style style:name="T4" style:family="text">
      <style:text-properties style:font-name="Liberation Mono"/>
    </style:style>
    <style:style style:name="T5" style:family="text">
      <style:text-properties style:font-name="Liberation Mono" fo:font-size="10pt" fo:language="en" fo:country="GB" officeooo:rsid="0045a31f" style:font-name-asian="Liberation Mono" style:font-size-asian="10pt" style:font-name-complex="Liberation Mono" style:font-size-complex="10pt"/>
    </style:style>
    <style:style style:name="T6" style:family="text">
      <style:text-properties style:font-name="Liberation Mono" fo:font-size="10pt" fo:language="en" fo:country="GB" officeooo:rsid="0045c5a5" style:font-name-asian="Liberation Mono" style:font-size-asian="10pt" style:font-name-complex="Liberation Mono" style:font-size-complex="10pt"/>
    </style:style>
    <style:style style:name="T7" style:family="text">
      <style:text-properties style:font-name="Liberation Mono" fo:font-size="10pt" fo:language="en" fo:country="GB" officeooo:rsid="000ddac1" style:font-name-asian="Liberation Mono" style:font-size-asian="10pt" style:font-name-complex="Liberation Mono" style:font-size-complex="10pt"/>
    </style:style>
    <style:style style:name="T8" style:family="text">
      <style:text-properties style:font-name="Liberation Mono" fo:font-size="12pt" officeooo:rsid="000a7f4f" style:font-size-asian="12pt" style:font-size-complex="12pt"/>
    </style:style>
    <style:style style:name="T9" style:family="text">
      <style:text-properties style:font-name="Liberation Mono" fo:font-style="normal" style:text-underline-style="none" style:font-style-asian="normal" style:font-style-complex="normal"/>
    </style:style>
    <style:style style:name="T10" style:family="text">
      <style:text-properties style:font-name="Liberation Mono" fo:font-style="normal" style:font-style-asian="normal" style:font-style-complex="normal"/>
    </style:style>
    <style:style style:name="T11" style:family="text">
      <style:text-properties style:font-name="Liberation Mono" officeooo:rsid="000e664d"/>
    </style:style>
    <style:style style:name="T12" style:family="text">
      <style:text-properties style:font-name="Liberation Mono" officeooo:rsid="001e749e"/>
    </style:style>
    <style:style style:name="T13" style:family="text">
      <style:text-properties style:font-name="Liberation Mono" officeooo:rsid="00217b35"/>
    </style:style>
    <style:style style:name="T14" style:family="text">
      <style:text-properties style:font-name="Liberation Mono" officeooo:rsid="0022c5b4"/>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022cff0" style:font-weight-asian="bold" style:font-weight-complex="bold"/>
    </style:style>
    <style:style style:name="T17" style:family="text">
      <style:text-properties style:font-name="Liberation Mono" fo:font-weight="bold" officeooo:rsid="00259d35" style:font-weight-asian="bold" style:font-weight-complex="bold"/>
    </style:style>
    <style:style style:name="T18" style:family="text">
      <style:text-properties style:font-name="Liberation Mono" fo:font-weight="bold" officeooo:rsid="0026c3f5" style:font-weight-asian="bold" style:font-weight-complex="bold"/>
    </style:style>
    <style:style style:name="T19" style:family="text">
      <style:text-properties style:font-name="Liberation Mono" fo:font-weight="bold" officeooo:rsid="002c9e2e" style:font-weight-asian="bold" style:font-weight-complex="bold"/>
    </style:style>
    <style:style style:name="T20" style:family="text">
      <style:text-properties style:font-name="Liberation Mono" fo:font-weight="bold" officeooo:rsid="0031256a" style:font-weight-asian="bold" style:font-weight-complex="bold"/>
    </style:style>
    <style:style style:name="T21" style:family="text">
      <style:text-properties style:font-name="Liberation Mono" officeooo:rsid="0024de74"/>
    </style:style>
    <style:style style:name="T22" style:family="text">
      <style:text-properties style:font-name="Liberation Mono" officeooo:rsid="0026c3f5"/>
    </style:style>
    <style:style style:name="T23" style:family="text">
      <style:text-properties style:font-name="Liberation Mono" officeooo:rsid="003d0e9b"/>
    </style:style>
    <style:style style:name="T24" style:family="text">
      <style:text-properties style:font-name="Liberation Mono" officeooo:rsid="003ede09"/>
    </style:style>
    <style:style style:name="T25" style:family="text">
      <style:text-properties officeooo:rsid="0007d57f"/>
    </style:style>
    <style:style style:name="T26" style:family="text">
      <style:text-properties fo:font-size="12pt" officeooo:rsid="000a7f4f" style:font-size-asian="12pt" style:font-size-complex="12pt"/>
    </style:style>
    <style:style style:name="T27" style:family="text">
      <style:text-properties fo:font-size="12pt" officeooo:rsid="000b275e" style:font-size-asian="12pt" style:font-size-complex="12pt"/>
    </style:style>
    <style:style style:name="T28" style:family="text">
      <style:text-properties fo:font-size="12pt" fo:font-style="italic" officeooo:rsid="000b275e" style:font-size-asian="12pt" style:font-style-asian="italic" style:font-size-complex="12pt" style:font-style-complex="italic"/>
    </style:style>
    <style:style style:name="T29" style:family="text">
      <style:text-properties fo:font-style="italic" style:font-style-asian="italic" style:font-style-complex="italic"/>
    </style:style>
    <style:style style:name="T30" style:family="text">
      <style:text-properties fo:font-style="italic" officeooo:rsid="000e664d" style:font-style-asian="italic" style:font-style-complex="italic"/>
    </style:style>
    <style:style style:name="T31" style:family="text">
      <style:text-properties fo:font-style="italic" officeooo:rsid="00187873"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font-style="italic" fo:font-weight="bold" officeooo:rsid="0031d0a6" style:font-style-asian="italic" style:font-weight-asian="bold" style:font-style-complex="italic" style:font-weight-complex="bold"/>
    </style:style>
    <style:style style:name="T34" style:family="text">
      <style:text-properties officeooo:rsid="000bd242"/>
    </style:style>
    <style:style style:name="T35" style:family="text">
      <style:text-properties officeooo:rsid="000d8ad5"/>
    </style:style>
    <style:style style:name="T36" style:family="text">
      <style:text-properties fo:font-style="normal" style:font-style-asian="normal" style:font-style-complex="normal"/>
    </style:style>
    <style:style style:name="T37" style:family="text">
      <style:text-properties fo:font-style="normal" officeooo:rsid="00187873" style:font-style-asian="normal" style:font-style-complex="normal"/>
    </style:style>
    <style:style style:name="T38" style:family="text">
      <style:text-properties fo:font-style="normal" officeooo:rsid="0014d7d0" style:font-style-asian="normal" style:font-style-complex="normal"/>
    </style:style>
    <style:style style:name="T39" style:family="text">
      <style:text-properties fo:font-style="normal" style:text-underline-style="none" style:font-style-asian="normal" style:font-style-complex="normal"/>
    </style:style>
    <style:style style:name="T40" style:family="text">
      <style:text-properties fo:font-style="normal" style:text-underline-style="none" officeooo:rsid="000d8ad5" style:font-style-asian="normal" style:font-style-complex="normal"/>
    </style:style>
    <style:style style:name="T41" style:family="text">
      <style:text-properties fo:font-style="normal" style:text-underline-style="none" officeooo:rsid="000e664d" style:font-style-asian="normal" style:font-style-complex="normal"/>
    </style:style>
    <style:style style:name="T42" style:family="text">
      <style:text-properties fo:font-style="normal" fo:font-weight="bold" officeooo:rsid="0031d0a6" style:font-style-asian="normal" style:font-weight-asian="bold" style:font-style-complex="normal" style:font-weight-complex="bold"/>
    </style:style>
    <style:style style:name="T43" style:family="text">
      <style:text-properties fo:font-style="normal" fo:font-weight="bold" officeooo:rsid="0032e02a" style:font-style-asian="normal" style:font-weight-asian="bold" style:font-style-complex="normal" style:font-weight-complex="bold"/>
    </style:style>
    <style:style style:name="T44" style:family="text">
      <style:text-properties officeooo:rsid="000e664d"/>
    </style:style>
    <style:style style:name="T45" style:family="text">
      <style:text-properties officeooo:rsid="0011e788"/>
    </style:style>
    <style:style style:name="T46" style:family="text">
      <style:text-properties officeooo:rsid="00137b77"/>
    </style:style>
    <style:style style:name="T47" style:family="text">
      <style:text-properties officeooo:rsid="0014d7d0"/>
    </style:style>
    <style:style style:name="T48" style:family="text">
      <style:text-properties fo:font-weight="bold" style:font-weight-asian="bold" style:font-weight-complex="bold"/>
    </style:style>
    <style:style style:name="T49" style:family="text">
      <style:text-properties fo:font-weight="bold" officeooo:rsid="0014d7d0" style:font-weight-asian="bold" style:font-weight-complex="bold"/>
    </style:style>
    <style:style style:name="T50" style:family="text">
      <style:text-properties fo:font-weight="bold" officeooo:rsid="00157d70" style:font-weight-asian="bold" style:font-weight-complex="bold"/>
    </style:style>
    <style:style style:name="T51" style:family="text">
      <style:text-properties fo:font-weight="bold" officeooo:rsid="001ae138" style:font-weight-asian="bold" style:font-weight-complex="bold"/>
    </style:style>
    <style:style style:name="T52" style:family="text">
      <style:text-properties fo:font-weight="bold" officeooo:rsid="001fd3cc" style:font-weight-asian="bold" style:font-weight-complex="bold"/>
    </style:style>
    <style:style style:name="T53" style:family="text">
      <style:text-properties fo:font-weight="bold" officeooo:rsid="0022cff0" style:font-weight-asian="bold" style:font-weight-complex="bold"/>
    </style:style>
    <style:style style:name="T54" style:family="text">
      <style:text-properties fo:font-weight="bold" officeooo:rsid="0024de74" style:font-weight-asian="bold" style:font-weight-complex="bold"/>
    </style:style>
    <style:style style:name="T55" style:family="text">
      <style:text-properties fo:font-weight="bold" officeooo:rsid="00259d35" style:font-weight-asian="bold" style:font-weight-complex="bold"/>
    </style:style>
    <style:style style:name="T56" style:family="text">
      <style:text-properties fo:font-weight="bold" officeooo:rsid="0023139f" style:font-weight-asian="bold" style:font-weight-complex="bold"/>
    </style:style>
    <style:style style:name="T57" style:family="text">
      <style:text-properties fo:font-weight="bold" officeooo:rsid="0025f0ec" style:font-weight-asian="bold" style:font-weight-complex="bold"/>
    </style:style>
    <style:style style:name="T58" style:family="text">
      <style:text-properties fo:font-weight="bold" officeooo:rsid="0026c3f5" style:font-weight-asian="bold" style:font-weight-complex="bold"/>
    </style:style>
    <style:style style:name="T59" style:family="text">
      <style:text-properties fo:font-weight="bold" officeooo:rsid="0029533a" style:font-weight-asian="bold" style:font-weight-complex="bold"/>
    </style:style>
    <style:style style:name="T60" style:family="text">
      <style:text-properties fo:font-weight="bold" officeooo:rsid="002b2fcb" style:font-weight-asian="bold" style:font-weight-complex="bold"/>
    </style:style>
    <style:style style:name="T61" style:family="text">
      <style:text-properties fo:font-weight="bold" officeooo:rsid="002c9e2e" style:font-weight-asian="bold" style:font-weight-complex="bold"/>
    </style:style>
    <style:style style:name="T62" style:family="text">
      <style:text-properties fo:font-weight="bold" officeooo:rsid="002e8091" style:font-weight-asian="bold" style:font-weight-complex="bold"/>
    </style:style>
    <style:style style:name="T63" style:family="text">
      <style:text-properties fo:font-weight="bold" officeooo:rsid="00308070" style:font-weight-asian="bold" style:font-weight-complex="bold"/>
    </style:style>
    <style:style style:name="T64" style:family="text">
      <style:text-properties fo:font-weight="bold" officeooo:rsid="0031256a" style:font-weight-asian="bold" style:font-weight-complex="bold"/>
    </style:style>
    <style:style style:name="T65" style:family="text">
      <style:text-properties fo:font-weight="bold" officeooo:rsid="0031d0a6" style:font-weight-asian="bold" style:font-weight-complex="bold"/>
    </style:style>
    <style:style style:name="T66" style:family="text">
      <style:text-properties fo:font-weight="bold" officeooo:rsid="0034b2f1" style:font-weight-asian="bold" style:font-weight-complex="bold"/>
    </style:style>
    <style:style style:name="T67" style:family="text">
      <style:text-properties fo:font-weight="bold" officeooo:rsid="0036ffc1" style:font-weight-asian="bold" style:font-weight-complex="bold"/>
    </style:style>
    <style:style style:name="T68" style:family="text">
      <style:text-properties fo:font-weight="bold" officeooo:rsid="0041df9f" style:font-weight-asian="bold" style:font-weight-complex="bold"/>
    </style:style>
    <style:style style:name="T69" style:family="text">
      <style:text-properties fo:font-weight="normal" style:font-weight-asian="normal" style:font-weight-complex="normal"/>
    </style:style>
    <style:style style:name="T70" style:family="text">
      <style:text-properties fo:font-weight="normal" officeooo:rsid="00168b4c" style:font-weight-asian="normal" style:font-weight-complex="normal"/>
    </style:style>
    <style:style style:name="T71" style:family="text">
      <style:text-properties fo:font-weight="normal" officeooo:rsid="00259d35" style:font-weight-asian="normal" style:font-weight-complex="normal"/>
    </style:style>
    <style:style style:name="T72" style:family="text">
      <style:text-properties fo:font-weight="normal" officeooo:rsid="0029533a" style:font-weight-asian="normal" style:font-weight-complex="normal"/>
    </style:style>
    <style:style style:name="T73" style:family="text">
      <style:text-properties fo:font-weight="normal" officeooo:rsid="0031d0a6" style:font-weight-asian="normal" style:font-weight-complex="normal"/>
    </style:style>
    <style:style style:name="T74" style:family="text">
      <style:text-properties officeooo:rsid="00187873"/>
    </style:style>
    <style:style style:name="T75" style:family="text">
      <style:text-properties officeooo:rsid="00157d70"/>
    </style:style>
    <style:style style:name="T76" style:family="text">
      <style:text-properties officeooo:rsid="0019ddfd"/>
    </style:style>
    <style:style style:name="T77" style:family="text">
      <style:text-properties style:font-name="Liberation Serif"/>
    </style:style>
    <style:style style:name="T78" style:family="text">
      <style:text-properties style:font-name="Liberation Serif" fo:font-size="10pt" officeooo:rsid="0019ddfd" style:font-size-asian="10pt" style:font-size-complex="10pt"/>
    </style:style>
    <style:style style:name="T79" style:family="text">
      <style:text-properties style:font-name="Liberation Serif" fo:font-style="normal" style:font-style-asian="normal" style:font-style-complex="normal"/>
    </style:style>
    <style:style style:name="T80" style:family="text">
      <style:text-properties style:font-name="Liberation Serif" fo:font-size="14pt" fo:font-weight="bold" officeooo:rsid="0045a31f" style:font-name-asian="DejaVu Sans" style:font-size-asian="14pt" style:font-weight-asian="bold" style:font-name-complex="DejaVu Sans" style:font-size-complex="14pt" style:font-weight-complex="bold"/>
    </style:style>
    <style:style style:name="T81" style:family="text">
      <style:text-properties fo:font-size="10pt" officeooo:rsid="00308070" style:font-size-asian="10pt" style:font-size-complex="10pt"/>
    </style:style>
    <style:style style:name="T82" style:family="text">
      <style:text-properties fo:font-size="10pt" officeooo:rsid="003b806a" style:font-size-asian="10pt" style:font-size-complex="10pt"/>
    </style:style>
    <style:style style:name="T83" style:family="text">
      <style:text-properties fo:font-size="10pt" officeooo:rsid="003d0e9b" style:font-size-asian="10pt" style:font-size-complex="10pt"/>
    </style:style>
    <style:style style:name="T84" style:family="text">
      <style:text-properties fo:font-size="10pt" fo:font-weight="bold" officeooo:rsid="0024de74" style:font-size-asian="10pt" style:font-weight-asian="bold" style:font-size-complex="10pt" style:font-weight-complex="bold"/>
    </style:style>
    <style:style style:name="T85" style:family="text">
      <style:text-properties fo:font-size="10pt" fo:font-weight="bold" officeooo:rsid="0026c3f5" style:font-size-asian="10pt" style:font-weight-asian="bold" style:font-size-complex="10pt" style:font-weight-complex="bold"/>
    </style:style>
    <style:style style:name="T86" style:family="text">
      <style:text-properties officeooo:rsid="001bbc32"/>
    </style:style>
    <style:style style:name="T87" style:family="text">
      <style:text-properties officeooo:rsid="001d3d70"/>
    </style:style>
    <style:style style:name="T88" style:family="text">
      <style:text-properties officeooo:rsid="001e749e"/>
    </style:style>
    <style:style style:name="T89" style:family="text">
      <style:text-properties officeooo:rsid="001fd3cc"/>
    </style:style>
    <style:style style:name="T90" style:family="text">
      <style:text-properties officeooo:rsid="00217b35"/>
    </style:style>
    <style:style style:name="T91" style:family="text">
      <style:text-properties officeooo:rsid="0022c5b4"/>
    </style:style>
    <style:style style:name="T92" style:family="text">
      <style:text-properties officeooo:rsid="0022cff0"/>
    </style:style>
    <style:style style:name="T93" style:family="text">
      <style:text-properties officeooo:rsid="0022e185"/>
    </style:style>
    <style:style style:name="T94" style:family="text">
      <style:text-properties officeooo:rsid="0024de74"/>
    </style:style>
    <style:style style:name="T95" style:family="text">
      <style:text-properties officeooo:rsid="00259d35"/>
    </style:style>
    <style:style style:name="T96" style:family="text">
      <style:text-properties officeooo:rsid="0025f0ec"/>
    </style:style>
    <style:style style:name="T97" style:family="text">
      <style:text-properties officeooo:rsid="0026c3f5"/>
    </style:style>
    <style:style style:name="T98" style:family="text">
      <style:text-properties officeooo:rsid="0027b091"/>
    </style:style>
    <style:style style:name="T99" style:family="text">
      <style:text-properties officeooo:rsid="002e8091"/>
    </style:style>
    <style:style style:name="T100" style:family="text">
      <style:text-properties officeooo:rsid="00308070"/>
    </style:style>
    <style:style style:name="T101" style:family="text">
      <style:text-properties officeooo:rsid="0034b2f1"/>
    </style:style>
    <style:style style:name="T102" style:family="text">
      <style:text-properties officeooo:rsid="0034ec76"/>
    </style:style>
    <style:style style:name="T103" style:family="text">
      <style:text-properties officeooo:rsid="0036426c"/>
    </style:style>
    <style:style style:name="T104" style:family="text">
      <style:text-properties officeooo:rsid="0036ffc1"/>
    </style:style>
    <style:style style:name="T105" style:family="text">
      <style:text-properties officeooo:rsid="00383082"/>
    </style:style>
    <style:style style:name="T106" style:family="text">
      <style:text-properties officeooo:rsid="0039b2f9"/>
    </style:style>
    <style:style style:name="T107" style:family="text">
      <style:text-properties officeooo:rsid="003b806a"/>
    </style:style>
    <style:style style:name="T108" style:family="text">
      <style:text-properties officeooo:rsid="003d0e9b"/>
    </style:style>
    <style:style style:name="T109" style:family="text">
      <style:text-properties officeooo:rsid="003ede09"/>
    </style:style>
    <style:style style:name="T110" style:family="text">
      <style:text-properties officeooo:rsid="0040c6ae"/>
    </style:style>
    <style:style style:name="T111" style:family="text">
      <style:text-properties officeooo:rsid="0043d95f"/>
    </style:style>
    <style:style style:name="T112" style:family="text">
      <style:text-properties officeooo:rsid="00454e1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bookmark text:name="LC1"/><text:span text:style-name="Source_20_Text"><text:span text:style-name="T1">Proposal for C23 <text:s/></text:span></text:span></text:p>
      <text:p text:style-name="Preformatted_20_Text"><text:bookmark text:name="LC2"/><text:span text:style-name="Source_20_Text"><text:span text:style-name="T1">WG14 </text:span></text:span><text:span text:style-name="Source_20_Text"><text:span text:style-name="T5">2917</text:span></text:span></text:p>
      <text:p text:style-name="Preformatted_20_Text"><text:bookmark text:name="LC3"/></text:p>
      <text:p text:style-name="Preformatted_20_Text"><text:bookmark text:name="LC4"/><text:span text:style-name="Source_20_Text"><text:span text:style-name="T1">Title: <text:s text:c="14"/>The `constexpr` specifier <text:s/></text:span></text:span></text:p>
      <text:p text:style-name="Preformatted_20_Text"><text:bookmark text:name="LC5"/><text:span text:style-name="Source_20_Text"><text:span text:style-name="T1">Author, affiliation: Alex Gilding, Perforce <text:s/></text:span></text:span></text:p>
      <text:p text:style-name="Preformatted_20_Text"><text:bookmark text:name="LC6"/><text:span text:style-name="Source_20_Text"><text:span text:style-name="T1">Date: <text:s text:c="15"/>202</text:span></text:span><text:span text:style-name="Source_20_Text"><text:span text:style-name="T6">2</text:span></text:span><text:span text:style-name="Source_20_Text"><text:span text:style-name="T1">-</text:span></text:span><text:span text:style-name="Source_20_Text"><text:span text:style-name="T6">01</text:span></text:span><text:span text:style-name="Source_20_Text"><text:span text:style-name="T1">-</text:span></text:span><text:span text:style-name="Source_20_Text"><text:span text:style-name="T6">25</text:span></text:span><text:span text:style-name="Source_20_Text"><text:span text:style-name="T1"> <text:s/></text:span></text:span></text:p>
      <text:p text:style-name="Preformatted_20_Text"><text:bookmark text:name="LC7"/><text:span text:style-name="Source_20_Text"><text:span text:style-name="T1">Proposal category: <text:s text:c="2"/>New features <text:s/></text:span></text:span></text:p>
      <text:p text:style-name="P2"><text:bookmark text:name="LC8"/><text:span text:style-name="Source_20_Text"><text:span text:style-name="T1">Target audience: <text:s text:c="4"/>Compiler/tooling developers, library developers, application developers <text:s/></text:span></text:span></text:p>
      <text:h text:style-name="Heading_20_2" text:outline-level="2"><text:bookmark text:name="abstract"/>Abstract</text:h>
      <text:p text:style-name="Text_20_body">C++ has supported compile-time evaluation of first-class functions for over ten years, while C is still limited to using second-class language features in compile-time contexts. This puts C at a significant disadvantage in terms of being able to share the same features between runtime and compile-time, and in being able to assert truths about the program at compile time rather than waiting to assert in a runtime debug build.</text:p>
      <text:p text:style-name="Text_20_body"><text:span text:style-name="Source_20_Text">constexpr</text:span> provides the ability for a C program to call a restricted set of functions at compile time while leaving them first-class language citizens.</text:p>
      <text:h text:style-name="P1" text:outline-level="1"><text:bookmark text:name="the-constexpr-specifier"/>The <text:span text:style-name="Source_20_Text">constexpr</text:span> specifier</text:h>
      <text:p text:style-name="Preformatted_20_Text"><text:bookmark text:name="LC11"/><text:span text:style-name="Source_20_Text"><text:span text:style-name="T1">Reply-to: <text:s text:c="11"/>Alex Gilding (agilding@perforce.com) <text:s/></text:span></text:span></text:p>
      <text:p text:style-name="Preformatted_20_Text"><text:bookmark text:name="LC21"/><text:span text:style-name="Source_20_Text"><text:span text:style-name="T1">Document No: <text:s text:c="8"/>N</text:span></text:span><text:span text:style-name="Source_20_Text"><text:span text:style-name="T5">2917</text:span></text:span><text:span text:style-name="Source_20_Text"><text:span text:style-name="T1"> <text:s/></text:span></text:span></text:p>
      <text:p text:style-name="P7"><text:bookmark text:name="LC31"/><text:span text:style-name="Source_20_Text"><text:span text:style-name="T1">Revises Document No: N2851</text:span></text:span></text:p>
      <text:p text:style-name="P47"><text:bookmark text:name="LC41"/><text:span text:style-name="Source_20_Text"><text:span text:style-name="T1">Date: <text:s text:c="15"/>202</text:span></text:span><text:span text:style-name="Source_20_Text"><text:span text:style-name="T7">2</text:span></text:span><text:span text:style-name="Source_20_Text"><text:span text:style-name="T1">-</text:span></text:span><text:span text:style-name="Source_20_Text"><text:span text:style-name="T7">01</text:span></text:span><text:span text:style-name="Source_20_Text"><text:span text:style-name="T1">-</text:span></text:span><text:span text:style-name="Source_20_Text"><text:span text:style-name="T7">25</text:span></text:span><text:span text:style-name="Source_20_Text"><text:span text:style-name="T1"> <text:s/></text:span></text:span></text:p>
      <text:h text:style-name="Heading_20_2" text:outline-level="2"><text:bookmark text:name="summary-of-changes"/>Summary of Changes</text:h>
      <text:h text:style-name="P5" text:outline-level="3">N<text:span text:style-name="T80">2917</text:span></text:h>
      <text:list xml:id="list1132062687" text:style-name="L1">
        <text:list-item>
          <text:p text:style-name="P54">recursion limits; <text:span text:style-name="T45">no UB in C++</text:span>; <text:span text:style-name="T46">no new</text:span> ODR; <text:span text:style-name="T87">no </text:span>call before definition; <text:span text:style-name="T93">linkage; </text:span><text:span text:style-name="T98">initializer order</text:span></text:p>
        </text:list-item>
        <text:list-item>
          <text:p text:style-name="P56">wording for function definitions, <text:span text:style-name="T112">avoid </text:span><text:span text:style-name="T111">VLA side effects</text:span></text:p>
        </text:list-item>
        <text:list-item>
          <text:p text:style-name="P57">wording for compound literals</text:p>
        </text:list-item>
        <text:list-item>
          <text:p text:style-name="P58">split wording for different kinds of constant expression and propagate kind; <text:span text:style-name="T103">add wording to null pointer constant</text:span></text:p>
        </text:list-item>
        <text:list-item>
          <text:p text:style-name="P55">community comments, implementability</text:p>
        </text:list-item>
      </text:list>
      <text:h text:style-name="Heading_20_3" text:outline-level="3"><text:bookmark text:name="n2851"/>N2851</text:h>
      <text:list xml:id="list140898876" text:style-name="L2">
        <text:list-item>
          <text:p text:style-name="P59">original proposal </text:p>
        </text:list-item>
      </text:list>
      <text:h text:style-name="Heading_20_2" text:outline-level="2"><text:bookmark text:name="introduction"/>Introduction</text:h>
      <text:p text:style-name="Text_20_body">C requires that objects with static storage duration are only initialized with constant expressions. The rules for which kinds of expression may appear as constant expressions are quite restrictive and mostly limit users to using macro names for abstraction of values or operations. Users are also limited to testing their assertions about value behaviour at runtime because <text:span text:style-name="Source_20_Text">static_assert</text:span> is similarly limited in the kinds of expressions it can evaluate at compile-time.</text:p>
      <text:p text:style-name="Text_20_body">We propose to add a new (old) specifier to C, <text:span text:style-name="Source_20_Text">constexpr</text:span>, as introduced to C++ in C++11. We propose to add this specifier separately to objects and functions, and to intentionally keep the functionality minimal to avoid undue burden on lightweight implementations.</text:p>
      <text:h text:style-name="Heading_20_2" text:outline-level="2"><text:bookmark text:name="rationale"/>Rationale</text:h>
      <text:p text:style-name="Text_20_body">Because C limits initialization of objects with static storage duration to constant expressions, it can be difficult to create clean abstractions for complicated value generation. Users are forced to use macros, which do not allow for the creation of temporary values and require a different coding style. Such macros - especially if they would use temporaries, but have to use repetition instead because of the constraints of constant expressions - may also be unsuitable for use at runtime because they cannot guarantee clear evaluation of side effects. Macros for use in initializers cannot have their address taken or be used by linkage and are truly second-class language citizens. A user is obliged to repeat themselves and provide both a macro and a function (probably just deferring <text:soft-page-break/>operation to the macro internally, but still unclear and verbose) if they wish for the same callable entity to be used in both a static context and a runtime context.</text:p>
      <text:p text:style-name="Text_20_body">The same restriction applies to <text:span text:style-name="Source_20_Text">static_assert</text:span>: a user cannot prove properties about any expression involving a function call at compile-time, instead having to defer to runtime assertions. If a constant function could be called at compile-time, a release-mode build would be able to bake more testing of values and value-generation directly into the build step rather than relying on a separate debug configuration and test runs of the full program.</text:p>
      <text:p text:style-name="Text_20_body">C does provide enumerations which are marginally more useful than macros for defining constant values, but their uses are limited and they do not abstract very much; in practice they are only superior in the sense that they have a concrete type and survive preprocessing. Enumerations are not really intended to be used in this way.</text:p>
      <text:p text:style-name="Text_20_body">In C++, both objects and functions may be declared as <text:span text:style-name="Source_20_Text">constexpr</text:span>, allowing them to be used in all constant-expression contexts. This makes function calls available for static initialization and for static assertion-based testing.</text:p>
      <text:p text:style-name="Text_20_body">In the case when a <text:span text:style-name="Source_20_Text">constexpr</text:span> function is not visible, it may also provide useful information to an optimizer by communicating that its return is not affected by the rest of the program state, which allows multiple calls with identical arguments to be folded into single calls even without a visible definition. (In practice this is less interesting as the definition will be visible most of the time.)</text:p>
      <text:p text:style-name="Text_20_body">The subset of headers which are able to be common between C and C++ is also increased by adding this feature and strictly subsetting it from the C++ feature. Large objects can be initialized and their values and generators asserted against at compile time by both languages rather than forcing a user to switch to C++ solely in order to get compile-time assertions.</text:p>
      <text:h text:style-name="Heading_20_2" text:outline-level="2"><text:bookmark text:name="proposal"/>Proposal</text:h>
      <text:p text:style-name="Text_20_body">We propose adding the new keyword <text:span text:style-name="Source_20_Text">constexpr</text:span> to the language and making it available:</text:p>
      <text:list xml:id="list3239818055" text:style-name="L3">
        <text:list-item>
          <text:p text:style-name="P66">as a storage-class specifier for objects </text:p>
        </text:list-item>
        <text:list-item>
          <text:p text:style-name="P60">as a function specifier. </text:p>
        </text:list-item>
      </text:list>
      <text:p text:style-name="Text_20_body">We also propose relaxing the constant-expression rules to allow access to aggregate members when the object being accessed is declared as a <text:span text:style-name="Source_20_Text">constexpr</text:span> object and (in the case of arrays) the element index is an <text:span text:style-name="Emphasis">integer constant expression</text:span>.</text:p>
      <text:p text:style-name="Text_20_body">A scalar object declared with the <text:span text:style-name="Source_20_Text">constexpr</text:span> storage class specifier is a constant. It must be fully and explicitly initialized according to the static initialization rules. It still has linkage appropriate to its declaration and it exist at runtime to have its address taken; it simply cannot be modified at runtime in any way, i.e. the compiler can use its knowledge of the object's fixed value in any other constant expression.</text:p>
      <text:p text:style-name="Text_20_body">There are no restrictions on the type of an object that can be declared with <text:span text:style-name="Source_20_Text">constexpr</text:span> storage duration (because all C object types are completely trivial, in C++ terms). It does not make sense to use any of the currently provided Standard qualifiers on a <text:span text:style-name="Source_20_Text">constexpr</text:span> object but it is not necessary to impose this as a constraint either (since it cannot be modified: <text:span text:style-name="Source_20_Text">const</text:span> is implicit, <text:span text:style-name="Source_20_Text">_Atomic</text:span> is unnecessary, and <text:span text:style-name="Source_20_Text">volatile</text:span> does not hurt because the object still exists to reload at <text:soft-page-break/>runtime, but won't do anything either). Other qualifiers may be introduced at a later time that might hold more meaning for these objects.</text:p>
      <text:p text:style-name="Text_20_body">A function declared with the <text:span text:style-name="Source_20_Text">constexpr</text:span> function specifier is subject to stricter restrictions, taken from the quite restrictive set of (relevant) rules used by C++11. The function body may only contain:</text:p>
      <text:list xml:id="list4110346768" text:style-name="L4">
        <text:list-item>
          <text:p text:style-name="P67">null statements (plain semicolons) </text:p>
        </text:list-item>
        <text:list-item>
          <text:p text:style-name="P67"><text:span text:style-name="Source_20_Text">static_assert</text:span> declarations </text:p>
        </text:list-item>
        <text:list-item>
          <text:p text:style-name="P61"><text:span text:style-name="Source_20_Text">typedef</text:span> declarations </text:p>
        </text:list-item>
      </text:list>
      <text:p text:style-name="Text_20_body">...in addition to exactly one return statement which evaluates a constant-expression according to these modified rules. The function must return a value (or it is useless).</text:p>
      <text:p text:style-name="Text_20_body">A <text:span text:style-name="Source_20_Text">constexpr</text:span> function is implicitly also an <text:span text:style-name="Source_20_Text">inline</text:span> function, allowing it to be defined in a header.</text:p>
      <text:p text:style-name="Text_20_body">A <text:span text:style-name="Source_20_Text">constexpr</text:span> function, called with arguments that are all themselves constant expressions, is a constant expression. A <text:span text:style-name="Source_20_Text">constexpr</text:span> function may also be called with non-constant arguments and in that case behaves like any other function call. The address of a <text:span text:style-name="Source_20_Text">constexpr</text:span> function may be taken and used as any other function pointer; this does not preserve the <text:span text:style-name="Source_20_Text">constexpr</text:span> specifier.</text:p>
      <text:p text:style-name="Text_20_body">We currently propose to <text:span text:style-name="T34">stay entirely within</text:span> <text:span text:style-name="T34">(the relevant C subset of) </text:span>the C++11 restrictions, for implementation-focused reasons. <text:span text:style-name="T34">This imposes a much lighter burden on implementations, which must already provide expression evaluators, than extending the ruleset to match C++14 and later, which start to require statement evaluation and mutable local variables, generally demanding the beginnings of a true interpreter built into the compiler.</text:span></text:p>
      <text:p text:style-name="Text_20_body">We do not propose changing the meaning of the <text:span text:style-name="Source_20_Text">const</text:span> keyword in any way (this differs between C and C++) - an object declared at file scope with <text:span text:style-name="Source_20_Text">const</text:span> and without <text:span text:style-name="Source_20_Text">static</text:span> continues to have external linkage; an object declared with static storage duration and <text:span text:style-name="Source_20_Text">const</text:span> but not <text:span text:style-name="Source_20_Text">constexpr</text:span> is not considered any kind of constant-expression, barring any implementations that are already taking advantage of the permission given in 6.6 paragraph 10 to add more kinds of supported constant expressions.</text:p>
      <text:p text:style-name="Text_20_body">The difference between the behaviour of <text:span text:style-name="Source_20_Text">const</text:span> in C and in C++ is unfortunate but is now cemented in existing practice and well-understood. We would oppose changing that now.</text:p>
      <text:p text:style-name="Text_20_body">We do not propose changing the meaning of the implied <text:span text:style-name="Source_20_Text">inline</text:span> specifier on a <text:span text:style-name="Source_20_Text">constexpr</text:span> function to match C++'s <text:span text:style-name="Source_20_Text">inline</text:span>. A C <text:span text:style-name="Source_20_Text">constexpr</text:span> function that wants to provide an externally linkable definition should use <text:span text:style-name="Source_20_Text">extern inline</text:span> the same as current C <text:span text:style-name="Source_20_Text">inline</text:span> functions do.</text:p>
      <text:p text:style-name="Text_20_body">No modifications are currently proposed for Section 7 as the Standard Library was not developed with the <text:span text:style-name="Source_20_Text">constexpr</text:span> concept in mind. The specifier can be added on an individual basis to functions once the feature is available language-wide.</text:p>
      <text:h text:style-name="Heading_20_2" text:outline-level="2"><text:bookmark text:name="alternatives"/>Alternatives</text:h>
      <text:p text:style-name="Text_20_body">C currently has only one class of in-language entity that can be defined with a value and then used in a constant context, which is an enumeration. This is limited to providing a C-level name for a <text:soft-page-break/>single integer value, but is extremely limited and is a second-class feature closer to macro constants than to C objects. These cannot be addressed and also cannot be used to help much in the abstraction of function-like expressions.</text:p>
      <text:p text:style-name="Text_20_body">GCC provides two non-standard attributes, <text:span text:style-name="Source_20_Text">const</text:span> and <text:span text:style-name="Source_20_Text">pure</text:span>, that are similar to this proposal. These attributes mostly communicate intent to calling code rather than impose restrictions on the function body itself. They are only applied to functions and do not substantially change the way C features can be used in expressions. <text:span text:style-name="Source_20_Text">const</text:span> is closer to <text:span text:style-name="Source_20_Text">constexpr</text:span> as it prevents the function from reading mutable state (<text:span text:style-name="Source_20_Text">pure</text:span> merely says the function will not modify external state).</text:p>
      <text:p text:style-name="Text_20_body">n2539 "Unsequenced functions" by Alepin and Gustedt brought a number of proposed <text:span text:style-name="Source_20_Text">[[attributes]]</text:span> that could annotate functions as having one of five levels of "unsequence", from full referential transparency (<text:span text:style-name="Source_20_Text">const</text:span>) through to simply not leaking resources (<text:span text:style-name="Source_20_Text">noloeak</text:span>). The stricter levels were a direct attempt to standardize the GNU attributes.</text:p>
      <text:p text:style-name="Text_20_body">Unfortunately an attribute-based solution does not provide the user-facing functionality of being able to simply use more complicated expressions within initializers and static assertions, because a standard C attribute <text:span text:style-name="Emphasis">must</text:span> leave the program correct when it is removed. If the <text:span text:style-name="Source_20_Text">constexpr</text:span> nature of a function depends on an attribute, ignoring the attribute would change whether a program is valid at all. Therefore these attributes are mostly in aid of a slightly different goal of communicating more intent to the compiler about which external calls can be reordered or optimized away; they do not change the code a user can directly write.</text:p>
      <text:p text:style-name="Text_20_body">Some enhancements in the above proposal are also worth separate discussion:</text:p>
      <text:list xml:id="list2868053664" text:style-name="L5">
        <text:list-item>
          <text:p text:style-name="P62">the C++11 rules do not allow local variables to be declared within a <text:span text:style-name="Source_20_Text">constexpr</text:span> function. This is an overly-strict restriction if such definitions were always <text:span text:style-name="Source_20_Text">const</text:span> themselves (but not <text:span text:style-name="Source_20_Text">constexpr</text:span>, so a local automatic could not contribute to the initialization of a local static). Allowing local variables would greatly improve the clarity of complicated expressions that might currently involve a lot of repetition. Under the C++11 rules, temporary values can only be established by recursively calling another <text:span text:style-name="Source_20_Text">constexpr</text:span> function and passing them as arguments.</text:p>
        </text:list-item>
        <text:list-item>
          <text:p text:style-name="P62">under the currently-proposed rules a pointer to a <text:span text:style-name="Source_20_Text">constexpr</text:span> function cannot be passed as an argument to another <text:span text:style-name="Source_20_Text">constexpr</text:span> function and used at compile-time. This may be useful but is not within the proposed rules.</text:p>
        </text:list-item>
        <text:list-item>
          <text:p text:style-name="P62">allowing recursion means that evaluating a poorly-written function may fail at compile time due to an infinite loop or compiler resource exhaustion. If we disallow recursion, all <text:span text:style-name="Source_20_Text">constexpr</text:span> calls would become fully inlinable. This is a strengthening of the C++11 ruleset.</text:p>
        </text:list-item>
      </text:list>
      <text:p text:style-name="P35">We can also observe that compilers are currently free to extend the set of valid constant expressions in an implementation-defined way (6.6 p10 “An implementation may accept other forms of constant expressions”). This implies that a suitably-designed compiler can potentially feed information back from its inliner/optimizer, all the way to the type system. However, we do not consider dataflow-based optimizations relevant as prior art, as this feature needs to exist at a pre-optimization stage of compilation.</text:p>
      <text:p text:style-name="P37"><text:soft-page-break/>We received user feedback that it would also be useful to mandate that one or more parameters to a function always receive a constant argument. This has been proposed as another use for the <text:span text:style-name="T4">constexpr</text:span> specifier in C++, but was rejected. C++ does not fundamentally need this feature because it can use <text:span text:style-name="T86">non-type </text:span>template arguments instead. (C++20 <text:span text:style-name="T4">consteval</text:span> functions partially overlap here, but do not allow for only some arguments to be constant.)</text:p>
      <text:p text:style-name="P38">We inevitably received <text:span text:style-name="T29">user</text:span><text:span text:style-name="T36"> feedback that C++14-style further relaxations of the rules would be useful. This observation is true, but we received no corresponding feedback from implementers that the burden of providing it would be reasonable.</text:span></text:p>
      <text:h text:style-name="Heading_20_2" text:outline-level="2"><text:bookmark text:name="impact"/>Impact</text:h>
      <text:p text:style-name="Text_20_body">The first question is of implementation burden. Barring recursive calls (or the possible extension to allow calls by pointer), a <text:span text:style-name="Source_20_Text">constexpr</text:span> function call would be fully inlinable down to a fixed size expression tree which could then be evaluated the same way that an implementation currently evaluates a constant-expression with no function calls. Simple replacement of parameters by the argument values (as currently happens with macros used to abstract constant expressions) would be semantically correct. We consider this to be a modest implementation requirement.</text:p>
      <text:h text:style-name="P6" text:outline-level="3">Recursion</text:h>
      <text:p text:style-name="P32"><text:span text:style-name="T35">In the initial version of this proposal we chose to disallow recursion, on the grounds that this was helpful to simple implementations by allowing them to fully inline all function calls before evaluating the expanded expression tree. This would imply a phased-evaluation of function calls vs. the expressions themselves, conceptually not too far removed from the existing macro-expansion translation phase. Further examination revealed that Stroustrup and Dos Reis started with a similar assumption, and relaxed it after further work indicated that allowing (but not mandating) recursion did not pose a problem in practice (</text:span><text:a xlink:type="simple" xlink:href="http://www.open-std.org/jtc1/sc22/wg21/docs/papers/2009/n2826.html" text:style-name="Internet_20_link" text:visited-style-name="Visited_20_Internet_20_Link"><text:span text:style-name="T35">C++ n2826</text:span></text:a><text:span text:style-name="T35">).</text:span></text:p>
      <text:p text:style-name="P31">Since the runtime C language does not mandate a minimum<text:span text:style-name="T36"> </text:span><text:span text:style-name="T39">recursion depth either, leaving the actual succeeding nested call depth entirely down to the implementation – and importantly, allowing for </text:span><text:span text:style-name="T32">completely non-reentrant</text:span><text:span text:style-name="T39"> implementations of C that do not support even one level of recursion, to still be conforming – we believe it is not necessary to state this restriction. If an implementation chooses to inline all visible </text:span><text:span text:style-name="T9">constexpr</text:span><text:span text:style-name="T39"> function calls in a pass before attempting to evaluate the expanded expression trees, the depth to which it can succeed is a matter of QoI, exactly the same as in the runtime language.</text:span></text:p>
      <text:p text:style-name="P63">Allowing recursion does not introduce the kind of complicated interpreter-like behaviour implied by requiring statements, mutable locals, readable addresses etc. introduced by C++14. A slightly more powerful implementation can interleave a macro-like expansion of the expression trees (or even token-sequences, for a super-simple push/pop evaluator that doesn’t build trees) with the general expression evaluator, and can handle recursion by not expanding calls within an unevaluated ternary/logical branch just the same as it ignores the values of the expressions there (already left alone, as they might otherwise have UB).</text:p>
      <text:p text:style-name="P31"><text:span text:style-name="T39">We believe that for a classical tree-based expression evaluator, the implementation is relatively trivial. QAC’s C compiler provides implementation experience integrating into such an evaluator. We believe that integration into a non-tree-based evaluator would not be substantially more difficult because in that case the call-expansion would take a very similar form to function-like macro </text:span><text:soft-page-break/><text:span text:style-name="T39">expansion. Implementations using more complicated, low-level/VM-like models for their constant evaluators are unlikely to have difficulty here.</text:span></text:p>
      <text:p text:style-name="P32"><text:span text:style-name="T40">We received feedback from one third-party “small compiler” implementor: the developer of </text:span><text:a xlink:type="simple" xlink:href="https://github.com/rui314/chibicc" text:style-name="Internet_20_link" text:visited-style-name="Visited_20_Internet_20_Link">ChibiCC</text:a><text:span text:style-name="T40"> reported that </text:span><text:span text:style-name="T41">implementation would not be hard, in their opinion.</text:span></text:p>
      <text:p text:style-name="P33"><text:span text:style-name="T39">Again, we believe that since the core language does not mandate recursive calls succeed in a conforming implementation, it is safe to let the </text:span><text:span text:style-name="T9">constexpr</text:span><text:span text:style-name="T39"> subset mirror this and provide recursion of depth greater than zero as a QoI feature; or not, if this is too difficult to achieve.</text:span></text:p>
      <text:h text:style-name="P6" text:outline-level="3">C++</text:h>
      <text:p text:style-name="Text_20_body">As above, the existing incompatibility of <text:span text:style-name="Source_20_Text">const</text:span> between C and C++ is preserved because the proposal does not intend to break or change any existing C code. Code that intends to express identical constant semantics for values in both C and C++ should start using <text:span text:style-name="Source_20_Text">constexpr</text:span> objects instead.</text:p>
      <text:p text:style-name="P34"><text:span text:style-name="T44">We received some repeated community feedback about whether the feature needed new ODR-style rules to control where the runtime definitions of functions reside and which TUs had visibility. We do not believe </text:span><text:span text:style-name="T30">any</text:span><text:span text:style-name="T44"> new rules are required – C99’s </text:span><text:span text:style-name="T11">inline</text:span><text:span text:style-name="T44"> rules have the exact same set of (non-)issues and have been adopted well in practice.</text:span></text:p>
      <text:p text:style-name="P34"><text:span text:style-name="T44">Similarly as</text:span> <text:span text:style-name="T44">for </text:span><text:span text:style-name="T11">const</text:span>, the existing differences between <text:span text:style-name="Source_20_Text">inline</text:span> in C and C++ should be preserved for consistency across all <text:span text:style-name="Source_20_Text">inline</text:span> functions defined in a C program.</text:p>
      <text:p text:style-name="P34">This change improves C's header compatibility with C++ by allowing the same headers to make use of better compile-time initialization features. This increases the <text:span text:style-name="T3">s</text:span>ubset of C++ headers which can be used from C and does not impose any new runtime cost on any C program.</text:p>
      <text:p text:style-name="P36">In C++ a core constant expression cannot invoke any undefined behaviour (C++20 [expr.const] paragraph [5.7]). We could add wording to this effect to C as well; but we do not consider it directly relevant to the feature proposed here, rather this would be a general improvement to all constant expressions in C, including the existing rules.</text:p>
      <text:p text:style-name="Text_20_body"/>
      <text:p text:style-name="Text_20_body">An almost-unrelated but extremely useful impact emerges from the change to make aggregate element access a constant expression: this would make it possible to statically assert that a string is a string literal (or semantically equivalent to one, at any rate), by checking the final <text:span text:style-name="Source_20_Text">char</text:span> equals <text:span text:style-name="Source_20_Text">'\0'</text:span> in a constant-expression context. This is useful in a number of other situations such as <text:span text:style-name="Source_20_Text">printf</text:span> successors.</text:p>
      <text:h text:style-name="P4" text:outline-level="2">Implementation Experience</text:h>
      <text:p text:style-name="P38">There is widespread implementation experience of <text:span text:style-name="T4">constexpr</text:span> as a C++ feature.</text:p>
      <text:p text:style-name="P39">Internally to the QAC team, we have experience fitting C++11 ruleset <text:span text:style-name="T4">constexpr</text:span> to the C constant evaluator. Our C frontend does not share this component with the C++ compiler, so we were able to compare and contrast which work was reasonable to import and which was not (i.e. we have implemented <text:span text:style-name="T4">constexpr</text:span> fully before). We felt that full C++20 ruleset <text:span text:style-name="T4">constexpr</text:span> was <text:soft-page-break/>completely unreasonable (probably not controversial!), but that the C++11 rules, designed to build-up from a minimalist perspective, were not difficult for a single-person team to add to a C evaluator.</text:p>
      <text:p text:style-name="P40">We do not consider optimizer-based inlining to be direct implementation experience because it does not feed back the results of the expansion in a program-observable way. However, the technology itself may be shareable depending on the compiler architecture.</text:p>
      <text:h text:style-name="Heading_20_2" text:outline-level="2"><text:bookmark text:name="proposed-wording"/>Proposed wording</text:h>
      <text:p text:style-name="Text_20_body">Changes are proposed against the wording in C2<text:span text:style-name="T25">3</text:span> draft n2<text:span text:style-name="T25">731</text:span>. Bolded text is new text.</text:p>
      <text:p text:style-name="P30">Add two new bulleted entries to 5.2.4.1 “Translation limits”, with values matching those in C++20:</text:p>
      <text:p text:style-name="P26">- <text:span text:style-name="T26">512 nested </text:span><text:span text:style-name="T8">constexpr</text:span><text:span text:style-name="T26"> function invocations</text:span></text:p>
      <text:p text:style-name="P3"><text:span text:style-name="T26">- 1048576 </text:span><text:span text:style-name="T27">nested </text:span><text:span text:style-name="T28">constant expressions</text:span><text:span text:style-name="T27"> within the evaluation of a single </text:span><text:span text:style-name="T28">constant expression</text:span></text:p>
      <text:p text:style-name="P44">Modify 6.5.2, “Postfix operators”:</text:p>
      <text:p text:style-name="P44">Paragraph 1, add the <text:span text:style-name="T4">constexpr</text:span> specifier to compound literal syntax:</text:p>
      <text:p text:style-name="P27">postfix-expression:</text:p>
      <text:p text:style-name="P27">primary-expression</text:p>
      <text:p text:style-name="P27">postfix-expression <text:span text:style-name="T10">[</text:span> expression <text:span text:style-name="T10">]</text:span></text:p>
      <text:p text:style-name="P27">postfix-expression <text:span text:style-name="T10">( </text:span>argument-expression-list opt <text:span text:style-name="T10">)</text:span></text:p>
      <text:p text:style-name="P27">postfix-expression <text:span text:style-name="T10">.</text:span> identifier</text:p>
      <text:p text:style-name="P27">postfix-expression <text:span text:style-name="T10">-&gt;</text:span> identifier</text:p>
      <text:p text:style-name="P27">postfix-expression <text:span text:style-name="T10">++</text:span></text:p>
      <text:p text:style-name="P27">postfix-expression <text:span text:style-name="T10">--</text:span></text:p>
      <text:p text:style-name="P27"><text:span text:style-name="T10">(</text:span> <text:span text:style-name="T64">compound</text:span><text:span text:style-name="T48">-name</text:span> <text:span text:style-name="T10">) {</text:span> initializer-list <text:span text:style-name="T10">}</text:span></text:p>
      <text:p text:style-name="P19"><text:span text:style-name="T10">(</text:span><text:span text:style-name="T79"> </text:span><text:span text:style-name="T64">compound</text:span><text:span text:style-name="T48">-name</text:span> <text:span text:style-name="T10">) {</text:span> initializer-list <text:span text:style-name="T10">, }</text:span></text:p>
      <text:p text:style-name="P28">compound-name:</text:p>
      <text:p text:style-name="P28"><text:span text:style-name="T10">constexpr</text:span> type-name</text:p>
      <text:p text:style-name="P20">type-name</text:p>
      <text:p text:style-name="P44">Modify 6.5.2.5, “Compound literals”:</text:p>
      <text:p text:style-name="P44">Modify paragraph 2:</text:p>
      <text:p text:style-name="P8">If the <text:span text:style-name="T29">type name</text:span><text:span text:style-name="T36"> is prefixed by the </text:span><text:span text:style-name="T10">constexpr</text:span><text:span text:style-name="T36"> specifier, all the expressions in the initializer list shall be constant expressions.</text:span></text:p>
      <text:p text:style-name="P44">Modify paragraph 3:</text:p>
      <text:p text:style-name="Quotations">A postfix expression that consists of a parenthesized type name<text:span text:style-name="T48">, </text:span><text:span text:style-name="T64">optionally prefixed by </text:span><text:span text:style-name="T20">constexpr</text:span><text:span text:style-name="T64">,</text:span> followed by a brace-enclosed list of initializers is a <text:span text:style-name="T29">compound literal</text:span>.</text:p>
      <text:p text:style-name="P41">Modify 6.2.2, “Linkages of identifiers”, paragraph 3:</text:p>
      <text:p text:style-name="Quotations">If the declaration of a file scope identifier for an object or a function contains the storage-class specifier <text:span text:style-name="T4">static</text:span>, <text:span text:style-name="T53">or the declaration of a file scope identifier for an </text:span><text:soft-page-break/><text:span text:style-name="T53">object contains the storage-class specifier </text:span><text:span text:style-name="T16">constexpr</text:span><text:span text:style-name="T53">,</text:span><text:span text:style-name="T92"> </text:span>the identifier has internal linkage.</text:p>
      <text:p text:style-name="P64">Modify 6.3.2.3 “Pointers”:</text:p>
      <text:p text:style-name="P64">Modify paragraph 3:</text:p>
      <text:p text:style-name="Quotations">An integer constant expression with the value 0, or such an expression cast to type <text:span text:style-name="T4">void *</text:span>, <text:span text:style-name="T67">or such an expression returned from a constexpr function,</text:span> is called a <text:span text:style-name="T29">null pointer constant</text:span>.</text:p>
      <text:p text:style-name="Text_20_body">Add a forward reference:</text:p>
      <text:p text:style-name="Quotations">equality operators (6.5.9), <text:span text:style-name="T67">function specifiers (6.7.4),</text:span><text:span text:style-name="T104"> </text:span>integer types capable of holding object pointers (7.20.1.4)</text:p>
      <text:p text:style-name="P45">Modify 6.6 "Constant expressions":</text:p>
      <text:p text:style-name="Text_20_body">Paragraph 3, relax the constraint against function calls:</text:p>
      <text:p text:style-name="P10">Constant expressions shall not contain assignment, increment, decrement, or comma operators, except when they are contained within a subexpression that is not evaluated. <text:span text:style-name="T49">If a</text:span><text:span text:style-name="Strong_20_Emphasis"><text:span text:style-name="T48"> fun</text:span></text:span><text:span text:style-name="Strong_20_Emphasis">ction-call operator appear</text:span><text:span text:style-name="Strong_20_Emphasis"><text:span text:style-name="T49">s</text:span></text:span><text:span text:style-name="Strong_20_Emphasis"> in a</text:span><text:span text:style-name="Strong_20_Emphasis"><text:span text:style-name="T106">n evaluated part of a</text:span></text:span><text:span text:style-name="Strong_20_Emphasis"> constant expression, </text:span><text:span text:style-name="Strong_20_Emphasis"><text:span text:style-name="T74">the </text:span></text:span><text:span text:style-name="Strong_20_Emphasis"><text:span text:style-name="T31">postfix-expression</text:span></text:span><text:span text:style-name="Strong_20_Emphasis"><text:span text:style-name="T37"> designating the function to call shall </text:span></text:span><text:span text:style-name="Strong_20_Emphasis"><text:span text:style-name="T38">consist</text:span></text:span><text:span text:style-name="Strong_20_Emphasis"> only </text:span><text:span text:style-name="Strong_20_Emphasis"><text:span text:style-name="T49">of </text:span></text:span><text:span text:style-name="Strong_20_Emphasis">the </text:span><text:span text:style-name="Strong_20_Emphasis"><text:span text:style-name="T47">(possibly-parenthesized) </text:span></text:span><text:span text:style-name="Strong_20_Emphasis">identifier of a function declared with the </text:span><text:span text:style-name="Strong_20_Emphasis"><text:span text:style-name="Source_20_Text">constexpr</text:span></text:span><text:span text:style-name="Strong_20_Emphasis"> function specifier. </text:span><text:span text:style-name="Strong_20_Emphasis"><text:span text:style-name="T75">The function to call shall be defined in the translation unit before the </text:span></text:span><text:span text:style-name="Strong_20_Emphasis"><text:span text:style-name="T50">evaluation</text:span></text:span><text:span text:style-name="Strong_20_Emphasis"><text:span text:style-name="T75"> of the outermost constant-expression containing the (possibly-nested) call.</text:span></text:span></text:p>
      <text:p text:style-name="Text_20_body">Add a new paragraph after paragraph 3 explaining that aggregate elements can be constants:</text:p>
      <text:p text:style-name="Quotations"><text:span text:style-name="Strong_20_Emphasis">An expression accessing an element of a structure or union type is a constant if the structure or union object was declared with the </text:span><text:span text:style-name="Strong_20_Emphasis"><text:span text:style-name="Source_20_Text">constexpr</text:span></text:span><text:span text:style-name="Strong_20_Emphasis"> storage-class specifier, </text:span><text:span text:style-name="Strong_20_Emphasis"><text:span text:style-name="T107">and the accessed element was previously initialized </text:span></text:span><text:span text:style-name="Strong_20_Emphasis"><text:span text:style-name="T82">footnote)</text:span></text:span><text:span text:style-name="Strong_20_Emphasis">. An expression accessing an element of an array using the subscript operator is a constant if the array was declared with the </text:span><text:span text:style-name="Strong_20_Emphasis"><text:span text:style-name="Source_20_Text">constexpr</text:span></text:span><text:span text:style-name="Strong_20_Emphasis"> storage-class specifier, and the subscript index is an integer constant expression </text:span><text:span text:style-name="Strong_20_Emphasis"><text:span text:style-name="T96">designating an element within the array</text:span></text:span><text:span text:style-name="Strong_20_Emphasis">.</text:span></text:p>
      <text:p text:style-name="P23"><text:span text:style-name="Strong_20_Emphasis"><text:span text:style-name="T107">footnote) therefore an expression accessing a union member is not constant if it accesses a different member from the one that was initialized.</text:span></text:span></text:p>
      <text:p text:style-name="Text_20_body">Paragraph 6, include function calls returning integer values:</text:p>
      <text:p text:style-name="Quotations">An integer constant expression 127) shall have integer type and shall only have operands that are integer constants, enumeration constants, character constants, <text:span text:style-name="Source_20_Text">sizeof</text:span> expressions whose results are integer constants, <text:span text:style-name="Source_20_Text">_Alignof</text:span> expressions, <text:span text:style-name="Strong_20_Emphasis">calls to </text:span><text:span text:style-name="Strong_20_Emphasis"><text:span text:style-name="Source_20_Text">constexpr</text:span></text:span><text:span text:style-name="Strong_20_Emphasis"> functions that return a value with integer type,</text:span> and floating constants that are the immediate operands of casts. Cast operators in an integer constant expression shall only convert arithmetic types to integer types, except as part of an operand to the <text:span text:style-name="Source_20_Text">sizeof</text:span> or <text:span text:style-name="Source_20_Text">_Alignof</text:span> operator.</text:p>
      <text:p text:style-name="Text_20_body">Paragraph 7, add a line:</text:p>
      <text:p text:style-name="Quotations"><text:soft-page-break/>an integer constant expression <text:span text:style-name="Strong_20_Emphasis">, or</text:span></text:p>
      <text:list xml:id="list2133063915" text:style-name="L6">
        <text:list-item>
          <text:p text:style-name="P48"><text:span text:style-name="Strong_20_Emphasis">a structure or union object </text:span><text:span text:style-name="Strong_20_Emphasis"><text:span text:style-name="T81">footnote)</text:span></text:span><text:span text:style-name="Strong_20_Emphasis"> defined with the </text:span><text:span text:style-name="Strong_20_Emphasis"><text:span text:style-name="Source_20_Text">constexpr</text:span></text:span><text:span text:style-name="Strong_20_Emphasis"> storage-class specifier, or returned from a call to a </text:span><text:span text:style-name="Strong_20_Emphasis"><text:span text:style-name="Source_20_Text">constexpr</text:span></text:span><text:span text:style-name="Strong_20_Emphasis"> function; or a member of such a structure.</text:span></text:p>
          <text:p text:style-name="P50"><text:span text:style-name="Strong_20_Emphasis"><text:span text:style-name="T63">f</text:span></text:span><text:span text:style-name="Strong_20_Emphasis"><text:span text:style-name="T100">ootnote) including compound literals.</text:span></text:span></text:p>
        </text:list-item>
      </text:list>
      <text:p text:style-name="Text_20_body">Paragraph 8, include function calls:</text:p>
      <text:p text:style-name="Quotations">An <text:span text:style-name="T29">arithmetic constant expression</text:span> shall have arithmetic type and shall only have operands that are integer constants, floating constants, enumeration constants, character constants, <text:span text:style-name="Source_20_Text">sizeof</text:span> expressions whose results are integer constants, <text:span text:style-name="Source_20_Text">_Alignof</text:span> expressions<text:span text:style-name="T48">, and calls to </text:span><text:span text:style-name="Source_20_Text"><text:span text:style-name="T48">constexpr</text:span></text:span><text:span text:style-name="T48"> functions that return a value with arithmetic type</text:span>.</text:p>
      <text:p text:style-name="Text_20_body">Paragraphs 6 and 8 do not need additional text to mention aggregate elements.</text:p>
      <text:p text:style-name="Text_20_body">Paragraph 9, <text:span text:style-name="T95">modify dereferencing rules to allow member/element access:</text:span></text:p>
      <text:p text:style-name="Quotations">but the value of an object shall not be accessed by use of <text:span text:style-name="T48">the </text:span><text:span text:style-name="T15">*</text:span><text:span text:style-name="T48"> </text:span><text:span text:style-name="T55">or </text:span><text:span text:style-name="T17">-&gt;</text:span> operators <text:span text:style-name="T84">footnote</text:span><text:span text:style-name="T85">1</text:span><text:span text:style-name="T84">)</text:span>. <text:s/><text:span text:style-name="T57">A value may be </text:span><text:span text:style-name="T58">accessed by use of the subscript operator if its postfix-expression operand is an address constant designating a </text:span><text:span text:style-name="T18">constexpr</text:span><text:span text:style-name="T58"> array with static storage duration </text:span><text:span text:style-name="T85">footnote2)</text:span><text:span text:style-name="T58">.</text:span></text:p>
      <text:p text:style-name="P15"><text:span text:style-name="Strong_20_Emphasis"><text:span text:style-name="T94">footnote</text:span></text:span><text:span text:style-name="Strong_20_Emphasis"><text:span text:style-name="T97">1</text:span></text:span><text:span text:style-name="Strong_20_Emphasis"><text:span text:style-name="T94">) therefore a </text:span></text:span><text:span text:style-name="Strong_20_Emphasis"><text:span text:style-name="T21">constexpr</text:span></text:span><text:span text:style-name="Strong_20_Emphasis"><text:span text:style-name="T94"> function may receive a</text:span></text:span><text:span text:style-name="Strong_20_Emphasis"><text:span text:style-name="T54">n address constant</text:span></text:span><text:span text:style-name="Strong_20_Emphasis"><text:span text:style-name="T94"> as an argument but may not dereference it using </text:span></text:span><text:span text:style-name="Strong_20_Emphasis"><text:span text:style-name="T21">*</text:span></text:span><text:span text:style-name="Strong_20_Emphasis"><text:span text:style-name="T94">.</text:span></text:span></text:p>
      <text:p text:style-name="P17"><text:span text:style-name="Strong_20_Emphasis"><text:span text:style-name="T97">footnote2) to designate a </text:span></text:span><text:span text:style-name="Strong_20_Emphasis"><text:span text:style-name="T22">constexpr</text:span></text:span><text:span text:style-name="Strong_20_Emphasis"><text:span text:style-name="T97"> array, the array must have already been defined and initialized before the subscript operator expression is evaluated, because a </text:span></text:span><text:span text:style-name="Strong_20_Emphasis"><text:span text:style-name="T22">constexpr</text:span></text:span><text:span text:style-name="Strong_20_Emphasis"><text:span text:style-name="T97"> object declaration is a definition.</text:span></text:span></text:p>
      <text:p text:style-name="P42"><text:span text:style-name="Strong_20_Emphasis"><text:span text:style-name="T71">Add </text:span></text:span><text:span text:style-name="Strong_20_Emphasis"><text:span text:style-name="T73">two</text:span></text:span><text:span text:style-name="Strong_20_Emphasis"><text:span text:style-name="T71"> new paragraph</text:span></text:span><text:span text:style-name="Strong_20_Emphasis"><text:span text:style-name="T73">s</text:span></text:span><text:span text:style-name="Strong_20_Emphasis"><text:span text:style-name="T71"> after paragraph 9:</text:span></text:span></text:p>
      <text:p text:style-name="P16"><text:span text:style-name="Strong_20_Emphasis">An address constant may be retur</text:span><text:span text:style-name="Strong_20_Emphasis"><text:span text:style-name="T48">ned from a </text:span></text:span><text:span text:style-name="Source_20_Text"><text:span text:style-name="T48">constexpr</text:span></text:span><text:span text:style-name="Strong_20_Emphasis"><text:span text:style-name="T48"> function and </text:span></text:span><text:span text:style-name="Strong_20_Emphasis"><text:span text:style-name="T56">if so </text:span></text:span><text:span text:style-name="Strong_20_Emphasis"><text:span text:style-name="T48">remain</text:span></text:span><text:span text:style-name="Strong_20_Emphasis"><text:span text:style-name="T56">s</text:span></text:span><text:span text:style-name="Strong_20_Emphasis"><text:span text:style-name="T48"> an address constant </text:span></text:span><text:span text:style-name="Strong_20_Emphasis"><text:span text:style-name="T56">in the calling context</text:span></text:span><text:span text:style-name="Strong_20_Emphasis"><text:span text:style-name="T48">.</text:span></text:span></text:p>
      <text:p text:style-name="P21"><text:span text:style-name="Strong_20_Emphasis"><text:span text:style-name="T65">A </text:span></text:span><text:span text:style-name="Strong_20_Emphasis"><text:span text:style-name="T33">structure constant expression</text:span></text:span><text:span text:style-name="Strong_20_Emphasis"><text:span text:style-name="T42"> shall be a value of structure type whose elements are all constant expressions. </text:span></text:span><text:span text:style-name="Strong_20_Emphasis"><text:span text:style-name="T43">A structure constant expression is copied by value from an initialized constant structure object, including compound literals.</text:span></text:span></text:p>
      <text:p text:style-name="Text_20_body"><text:span text:style-name="Strong_20_Emphasis"><text:span text:style-name="T69">Add </text:span></text:span><text:span text:style-name="Strong_20_Emphasis"><text:span text:style-name="T70">a forward reference:</text:span></text:span></text:p>
      <text:p text:style-name="P11"><text:span text:style-name="Strong_20_Emphasis"><text:span text:style-name="T69">array declarators (6.7.6.2), </text:span></text:span><text:span text:style-name="Strong_20_Emphasis">function specifiers (6.7.4),</text:span><text:span text:style-name="Strong_20_Emphasis"><text:span text:style-name="T69"> initialization (6.7.9).</text:span></text:span></text:p>
      <text:p text:style-name="Text_20_body">Modify 6.7.1 "Storage-class specifiers":</text:p>
      <text:p text:style-name="Text_20_body">Paragraph 1, add the <text:span text:style-name="Source_20_Text">constexpr</text:span> specifier:</text:p>
      <text:p text:style-name="Quotations"><text:span text:style-name="Emphasis">storage-class-specifier</text:span>:<text:line-break/><text:span text:style-name="Source_20_Text">typedef</text:span><text:line-break/><text:span text:style-name="Source_20_Text">extern</text:span><text:line-break/><text:span text:style-name="Source_20_Text">static</text:span><text:line-break/><text:span text:style-name="Source_20_Text">_Thread_local</text:span><text:line-break/><text:soft-page-break/><text:span text:style-name="Source_20_Text">auto</text:span><text:line-break/><text:span text:style-name="Source_20_Text">register</text:span><text:line-break/><text:span text:style-name="Source_20_Text"><text:span text:style-name="T48">constexpr</text:span></text:span></text:p>
      <text:p text:style-name="Text_20_body">Add to paragraph 2:</text:p>
      <text:p text:style-name="Quotations">At most, one storage-class specifier may be given in the declaration specifiers in a declaration, except that <text:span text:style-name="Source_20_Text">_Thread_local</text:span> <text:span text:style-name="Strong_20_Emphasis">or </text:span><text:span text:style-name="Strong_20_Emphasis"><text:span text:style-name="Source_20_Text">constexpr</text:span></text:span> may appear with <text:span text:style-name="Source_20_Text">static</text:span> or <text:span text:style-name="Source_20_Text">extern</text:span>.</text:p>
      <text:p text:style-name="P46">Add a new paragraph after paragraph 3:</text:p>
      <text:p text:style-name="P9"><text:span text:style-name="T4">constexpr</text:span> shall not appear in the declarators of an object of pointer type, or of an aggregate containing a subobject of pointer type.</text:p>
      <text:p text:style-name="Text_20_body">Add <text:span text:style-name="T91">two</text:span> new paragraph<text:span text:style-name="T91">s</text:span> after paragraph 5:</text:p>
      <text:p text:style-name="Quotations"><text:span text:style-name="Strong_20_Emphasis">The </text:span><text:span text:style-name="Strong_20_Emphasis"><text:span text:style-name="Source_20_Text">constexpr</text:span></text:span><text:span text:style-name="Strong_20_Emphasis"> specifier is treated as a function specifier when applied to a function declaration.</text:span></text:p>
      <text:p text:style-name="P13"><text:span text:style-name="Strong_20_Emphasis"><text:span text:style-name="T91">When the </text:span></text:span><text:span text:style-name="Strong_20_Emphasis"><text:span text:style-name="T14">constexpr</text:span></text:span><text:span text:style-name="Strong_20_Emphasis"><text:span text:style-name="T91"> specifier is applied to an object declaration, the declaration shall be a definition.</text:span></text:span></text:p>
      <text:p text:style-name="Text_20_body">Add <text:span text:style-name="T108">three</text:span> new paragraph<text:span text:style-name="T92">s</text:span> after paragraph 8:</text:p>
      <text:p text:style-name="P24"><text:span text:style-name="Strong_20_Emphasis">An object declared with the </text:span><text:span text:style-name="Strong_20_Emphasis"><text:span text:style-name="Source_20_Text">constexpr</text:span></text:span><text:span text:style-name="Strong_20_Emphasis"> storage-class specifier has its value permanently fixed at </text:span><text:span text:style-name="Strong_20_Emphasis"><text:span text:style-name="T60">translation</text:span></text:span><text:span text:style-name="Strong_20_Emphasis">-time. Its value can therefore be used as a constant expression </text:span><text:span text:style-name="Strong_20_Emphasis"><text:span text:style-name="T108">of the respective kind </text:span></text:span><text:span text:style-name="Strong_20_Emphasis">(6.6). </text:span><text:span text:style-name="Strong_20_Emphasis"><text:span text:style-name="T108">A constexpr integer object may be used as an integer constant expression; a constexpr arithmetic object may be used as an arithmetic constant expression; a constexpr structure may be used as a structure constant expression; as well as any other kinds of constant expression supported by the implementation </text:span></text:span><text:span text:style-name="Strong_20_Emphasis"><text:span text:style-name="T83">footnote)</text:span></text:span><text:span text:style-name="Strong_20_Emphasis"><text:span text:style-name="T108">.</text:span></text:span></text:p>
      <text:p text:style-name="P24"><text:span text:style-name="Strong_20_Emphasis"><text:span text:style-name="T108">footnote) since a pointer object cannot be defined with the </text:span></text:span><text:span text:style-name="Strong_20_Emphasis"><text:span text:style-name="T23">constexpr</text:span></text:span><text:span text:style-name="Strong_20_Emphasis"><text:span text:style-name="T108"> specifier, a constexpr object cannot be used as an address constant.</text:span></text:span></text:p>
      <text:p text:style-name="P25"><text:span text:style-name="Strong_20_Emphasis"><text:span text:style-name="Source_20_Text">const</text:span></text:span><text:span text:style-name="Strong_20_Emphasis">-qualification of the object's type is implied. </text:span></text:p>
      <text:p text:style-name="Quotations"><text:span text:style-name="Strong_20_Emphasis"><text:span text:style-name="T109">NOTE: a</text:span></text:span><text:span text:style-name="Strong_20_Emphasis">n object with automatic storage duration declared with the </text:span><text:span text:style-name="Strong_20_Emphasis"><text:span text:style-name="Source_20_Text">constexpr</text:span></text:span><text:span text:style-name="Strong_20_Emphasis"> storage-class specifier still has a unique address, </text:span><text:span text:style-name="Strong_20_Emphasis"><text:span text:style-name="T109">obtainable with </text:span></text:span><text:span text:style-name="Strong_20_Emphasis"><text:span text:style-name="T24">&amp;</text:span></text:span><text:span text:style-name="Strong_20_Emphasis">.</text:span></text:p>
      <text:p text:style-name="P14"><text:span text:style-name="Strong_20_Emphasis"><text:span text:style-name="T92">An object with static storage duration that is declared with th</text:span></text:span><text:span text:style-name="Strong_20_Emphasis"><text:span text:style-name="T53">e </text:span></text:span><text:span text:style-name="Source_20_Text"><text:span text:style-name="T53">constexpr</text:span></text:span><text:span text:style-name="Strong_20_Emphasis"><text:span text:style-name="T53"> storage</text:span></text:span><text:span text:style-name="Strong_20_Emphasis"><text:span text:style-name="T92">-class specifier has internal linkage.</text:span></text:span></text:p>
      <text:p text:style-name="Text_20_body">Add a forward reference:</text:p>
      <text:p text:style-name="Quotations">type definitions (6.7.8)<text:span text:style-name="Strong_20_Emphasis">, function specifiers (6.7.4)</text:span>.</text:p>
      <text:p text:style-name="Text_20_body">Modify 6.7.4 "Function specifiers":</text:p>
      <text:p text:style-name="Text_20_body">Paragraph 1, add the <text:span text:style-name="Source_20_Text">constexpr</text:span> specifier:</text:p>
      <text:p text:style-name="Quotations"><text:span text:style-name="Emphasis">function-specifier</text:span>:<text:line-break/><text:span text:style-name="Source_20_Text">inline</text:span><text:line-break/><text:soft-page-break/><text:span text:style-name="Source_20_Text">_Noreturn</text:span><text:line-break/><text:span text:style-name="Strong_20_Emphasis"><text:span text:style-name="Source_20_Text">constexpr</text:span></text:span></text:p>
      <text:p text:style-name="Text_20_body">Add <text:span text:style-name="T110">four</text:span> new paragraphs after paragraph 3:</text:p>
      <text:p text:style-name="Quotations"><text:span text:style-name="Strong_20_Emphasis">A function declared with the </text:span><text:span text:style-name="Strong_20_Emphasis"><text:span text:style-name="Source_20_Text">constexpr</text:span></text:span><text:span text:style-name="Strong_20_Emphasis"> function specifier shall </text:span><text:span text:style-name="Strong_20_Emphasis"><text:span text:style-name="T61">not have </text:span></text:span><text:span text:style-name="Strong_20_Emphasis"><text:span text:style-name="T19">void</text:span></text:span><text:span text:style-name="Strong_20_Emphasis"><text:span text:style-name="T61"> return type</text:span></text:span><text:span text:style-name="Strong_20_Emphasis">.</text:span></text:p>
      <text:p text:style-name="Quotations"><text:span text:style-name="Strong_20_Emphasis">A function </text:span><text:span text:style-name="Strong_20_Emphasis"><text:span text:style-name="T62">defined</text:span></text:span><text:span text:style-name="Strong_20_Emphasis"> with the </text:span><text:span text:style-name="Strong_20_Emphasis"><text:span text:style-name="Source_20_Text">constexpr</text:span></text:span><text:span text:style-name="Strong_20_Emphasis"> function specifier shall </text:span><text:span text:style-name="Strong_20_Emphasis"><text:span text:style-name="T99">return a value, and shall </text:span></text:span><text:span text:style-name="Strong_20_Emphasis">contain only:</text:span></text:p>
      <text:list xml:id="list2706493398" text:style-name="L7">
        <text:list-item>
          <text:p text:style-name="P53"><text:span text:style-name="Strong_20_Emphasis">null statements</text:span> </text:p>
        </text:list-item>
        <text:list-item>
          <text:p text:style-name="P53"><text:span text:style-name="Strong_20_Emphasis">static assertions</text:span> </text:p>
        </text:list-item>
        <text:list-item>
          <text:p text:style-name="P53"><text:span text:style-name="Strong_20_Emphasis">typedef declarations</text:span> </text:p>
        </text:list-item>
        <text:list-item>
          <text:p text:style-name="P49"><text:span text:style-name="Strong_20_Emphasis">a single return statement, which evaluates a constant-expression </text:span><text:span text:style-name="Strong_20_Emphasis"><text:span text:style-name="T75">according to the rules of 6.6, </text:span></text:span><text:span text:style-name="Strong_20_Emphasis"><text:span text:style-name="T50">treating</text:span></text:span><text:span text:style-name="Strong_20_Emphasis"> the parameters of the function as constant </text:span><text:span text:style-name="Strong_20_Emphasis"><text:span text:style-name="T75">primary identifier </text:span></text:span><text:span text:style-name="Strong_20_Emphasis">expressions </text:span><text:span text:style-name="Strong_20_Emphasis"><text:span text:style-name="T50">within</text:span></text:span><text:span text:style-name="Strong_20_Emphasis"> the </text:span><text:span text:style-name="Strong_20_Emphasis"><text:span text:style-name="Source_20_Text">return</text:span></text:span><text:span text:style-name="Strong_20_Emphasis"><text:span text:style-name="Source_20_Text"><text:span text:style-name="T77"> </text:span></text:span></text:span><text:span text:style-name="Strong_20_Emphasis"><text:span text:style-name="Source_20_Text"><text:span text:style-name="T78">footnote)</text:span></text:span></text:span><text:span text:style-name="Strong_20_Emphasis">.</text:span></text:p>
          <text:p text:style-name="P51"><text:span text:style-name="Strong_20_Emphasis"><text:span text:style-name="T76">footnote) the parameters are not treated as constant identifiers within any static assertions, only within the return statement </text:span></text:span><text:span text:style-name="Strong_20_Emphasis"><text:span text:style-name="T110">and within array sizes</text:span></text:span><text:span text:style-name="Strong_20_Emphasis"><text:span text:style-name="T76">.</text:span></text:span></text:p>
          <text:p text:style-name="P51"><text:span text:style-name="Strong_20_Emphasis">If any declaration of a function has a </text:span><text:span text:style-name="Strong_20_Emphasis"><text:span text:style-name="T4">constexpr</text:span></text:span><text:span text:style-name="Strong_20_Emphasis"> specifier, then all </text:span><text:span text:style-name="Strong_20_Emphasis"><text:span text:style-name="T90">of </text:span></text:span><text:span text:style-name="Strong_20_Emphasis">its declarations shall contain </text:span><text:span text:style-name="Strong_20_Emphasis"><text:span text:style-name="T90">a </text:span></text:span><text:span text:style-name="Strong_20_Emphasis"><text:span text:style-name="T13">constexpr</text:span></text:span><text:span text:style-name="Strong_20_Emphasis"> specifier.</text:span></text:p>
          <text:p text:style-name="P52"><text:span text:style-name="Strong_20_Emphasis"><text:span text:style-name="T110">Any array types specified within the prototype or body of a constexpr function shall not be variably-modified, except that the constant expression specifying the array size may </text:span></text:span><text:span text:style-name="Strong_20_Emphasis"><text:span text:style-name="T68">treat</text:span></text:span><text:span text:style-name="Strong_20_Emphasis"><text:span text:style-name="T110"> the function parameters as constant primary identifier expressions.</text:span></text:span></text:p>
        </text:list-item>
      </text:list>
      <text:p text:style-name="Text_20_body">Add <text:span text:style-name="T101">five </text:span>new paragraphs after paragraph 7:</text:p>
      <text:p text:style-name="Quotations"><text:span text:style-name="Strong_20_Emphasis">A function declared with a </text:span><text:span text:style-name="Strong_20_Emphasis"><text:span text:style-name="Source_20_Text">constexpr</text:span></text:span><text:span text:style-name="Strong_20_Emphasis"> function specifier is a constexpr function. A call to a constexpr function identifier with arguments that are all constant expressions is itself a constant expression </text:span><text:span text:style-name="Strong_20_Emphasis"><text:span text:style-name="T101">of the same kind as its return expression</text:span></text:span><text:span text:style-name="Strong_20_Emphasis">, and may be </text:span><text:span text:style-name="Strong_20_Emphasis"><text:span text:style-name="T51">called</text:span></text:span><text:span text:style-name="Strong_20_Emphasis"> in contexts such as static assertions or initialization of ob</text:span><text:span text:style-name="Strong_20_Emphasis"><text:span text:style-name="T76">j</text:span></text:span><text:span text:style-name="Strong_20_Emphasis">ects with static storage duration after it has been defined.</text:span></text:p>
      <text:p text:style-name="P22"><text:span text:style-name="Strong_20_Emphasis"><text:span text:style-name="T101">A constexpr function whose return expression is an integer constant expression and has an integer return type returns an integer constant expression. A constexpr function whose return expression is an arithmetic constant expression and has an arithmetic return type returns an arithmetic constant expression. A constexpr function whose return expression is an address constant expression and </text:span></text:span><text:span text:style-name="Strong_20_Emphasis"><text:span text:style-name="T66">has</text:span></text:span><text:span text:style-name="Strong_20_Emphasis"><text:span text:style-name="T101"> a pointer return type returns an address constant expression. A constexpr function whose return expression is a structure constant expression and has the same structure return type returns a structure constant expression. </text:span></text:span><text:span text:style-name="Strong_20_Emphasis"><text:span text:style-name="T105">A constexpr function whose return expression is a null pointer constant and has the same return type returns a null pointer constant.</text:span></text:span></text:p>
      <text:p text:style-name="P22"><text:span text:style-name="Strong_20_Emphasis"><text:span text:style-name="T101">An implementation may allow constexpr functions to return other kinds of constant expression, consistent with any others it accepts </text:span></text:span><text:span text:style-name="Strong_20_Emphasis"><text:span text:style-name="T102">(</text:span></text:span><text:span text:style-name="Strong_20_Emphasis"><text:span text:style-name="T101">6.6</text:span></text:span><text:span text:style-name="Strong_20_Emphasis"><text:span text:style-name="T102">)</text:span></text:span><text:span text:style-name="Strong_20_Emphasis"><text:span text:style-name="T101">.</text:span></text:span></text:p>
      <text:p text:style-name="Quotations"><text:soft-page-break/><text:span text:style-name="Strong_20_Emphasis">A constexpr function does not modify </text:span><text:span text:style-name="Strong_20_Emphasis"><text:span text:style-name="T76">any state, </text:span></text:span><text:span text:style-name="Strong_20_Emphasis">or observe any state outside of its own argument </text:span><text:span text:style-name="Strong_20_Emphasis"><text:span text:style-name="T76">values</text:span></text:span><text:span text:style-name="Strong_20_Emphasis">.</text:span></text:p>
      <text:p text:style-name="Quotations"><text:span text:style-name="Strong_20_Emphasis">A constexpr function is implicitly also an inline function.</text:span></text:p>
      <text:p text:style-name="Text_20_body">Add a NOTE:</text:p>
      <text:p text:style-name="Quotations"><text:span text:style-name="Strong_20_Emphasis">NOTE: a constexpr function may also be called with non-constant values or have its address taken, in which case it behaves like any other function. </text:span><text:span text:style-name="Strong_20_Emphasis"><text:span text:style-name="T90">The type of the function is not affected by the </text:span></text:span><text:span text:style-name="Strong_20_Emphasis"><text:span text:style-name="T13">constexpr</text:span></text:span><text:span text:style-name="Strong_20_Emphasis"><text:span text:style-name="T90"> specifier.</text:span></text:span></text:p>
      <text:p text:style-name="P12"><text:span text:style-name="Strong_20_Emphasis"><text:span text:style-name="T88">NOTE: the </text:span></text:span><text:span text:style-name="Strong_20_Emphasis"><text:span text:style-name="T12">constexpr</text:span></text:span><text:span text:style-name="Strong_20_Emphasis"><text:span text:style-name="T88"> specifier may be applied to a forward definition, but a call to it is not a constant expression unless the definition is visible </text:span></text:span><text:span text:style-name="Strong_20_Emphasis"><text:span text:style-name="T52">when </text:span></text:span><text:span text:style-name="Strong_20_Emphasis"><text:span text:style-name="T75">the outermost constant-expression containing the (possibly-nested) call </text:span></text:span><text:span text:style-name="Strong_20_Emphasis"><text:span text:style-name="T89">is evaluated.</text:span></text:span></text:p>
      <text:p text:style-name="P43"><text:span text:style-name="Strong_20_Emphasis"><text:span text:style-name="T72">Add a Recommended Practice:</text:span></text:span></text:p>
      <text:p text:style-name="P18"><text:span text:style-name="Strong_20_Emphasis"><text:span text:style-name="T59">Recommended Practice</text:span></text:span></text:p>
      <text:p text:style-name="P18"><text:span text:style-name="Strong_20_Emphasis"><text:span text:style-name="T59">Implementations are encouraged to issue a diagnostic message when a constexpr function is called with constant arguments and the definition is not visible.</text:span></text:span></text:p>
      <text:h text:style-name="Heading_20_2" text:outline-level="2"><text:bookmark text:name="references"/>References</text:h>
      <text:list xml:id="list895502361" text:style-name="L8">
        <text:list-item>
          <text:p text:style-name="P68"><text:a xlink:type="simple" xlink:href="http://www.open-std.org/jtc1/sc22/wg14/www/docs/n2731.pdf" office:target-frame-name="_blank" xlink:show="new" text:style-name="Internet_20_link" text:visited-style-name="Visited_20_Internet_20_Link"><text:span text:style-name="T25">C23 n2731</text:span></text:a> </text:p>
        </text:list-item>
        <text:list-item>
          <text:p text:style-name="P68"><text:a xlink:type="simple" xlink:href="http://www.open-std.org/jtc1/sc22/wg21/docs/papers/2012/n3337.pdf" office:target-frame-name="_blank" xlink:show="new" text:style-name="Internet_20_link" text:visited-style-name="Visited_20_Internet_20_Link">C++11 n3337</text:a> </text:p>
        </text:list-item>
        <text:list-item>
          <text:p text:style-name="P69"><text:a xlink:type="simple" xlink:href="http://open-std.org/jtc1/sc22/wg21/docs/papers/2020/n4868.pdf" text:style-name="Internet_20_link" text:visited-style-name="Visited_20_Internet_20_Link">C++20 n4868</text:a></text:p>
        </text:list-item>
        <text:list-item>
          <text:p text:style-name="P68"><text:a xlink:type="simple" xlink:href="http://www.open-std.org/jtc1/sc22/wg14/www/docs/n2539.pdf" office:target-frame-name="_blank" xlink:show="new" text:style-name="Internet_20_link" text:visited-style-name="Visited_20_Internet_20_Link">n2539 Unsequenced functions</text:a> </text:p>
        </text:list-item>
        <text:list-item>
          <text:p text:style-name="P70"><text:a xlink:type="simple" xlink:href="http://www.open-std.org/jtc1/sc22/wg21/docs/papers/2009/n2826.html" text:style-name="Internet_20_link" text:visited-style-name="Visited_20_Internet_20_Link">(C++) n2826 “Issues with </text:a><text:a xlink:type="simple" xlink:href="http://www.open-std.org/jtc1/sc22/wg21/docs/papers/2009/n2826.html" text:style-name="Internet_20_link" text:visited-style-name="Visited_20_Internet_20_Link"><text:span text:style-name="T4">constexpr</text:span></text:a><text:a xlink:type="simple" xlink:href="http://www.open-std.org/jtc1/sc22/wg21/docs/papers/2009/n2826.html" text:style-name="Internet_20_link" text:visited-style-name="Visited_20_Internet_20_Link">”</text:a></text:p>
        </text:list-item>
        <text:list-item>
          <text:p text:style-name="P71"><text:a xlink:type="simple" xlink:href="http://www.open-std.org/jtc1/sc22/wg21/docs/papers/2019/p1063r2.pdf" text:style-name="Internet_20_link" text:visited-style-name="Visited_20_Internet_20_Link">(C++) p1063r2 “Core coroutines”</text:a></text:p>
        </text:list-item>
        <text:list-item>
          <text:p text:style-name="P65"><text:a xlink:type="simple" xlink:href="https://gcc.gnu.org/onlinedocs/gcc/Common-Function-Attributes.html" office:target-frame-name="_blank" xlink:show="new" text:style-name="Internet_20_link" text:visited-style-name="Visited_20_Internet_20_Link">GNU attribute const</text:a></text:p>
        </text:list-item>
        <text:list-item>
          <text:p text:style-name="P65"><text:a xlink:type="simple" xlink:href="https://github.com/rui314/chibicc" text:style-name="Internet_20_link" text:visited-style-name="Visited_20_Internet_20_Link"><text:span text:style-name="T44">ChibiCC</text:span></text:a></text:p>
        </text:list-item>
      </text:list>
      <text:p text:style-name="P29">Additional thanks to Jens Gustedt, Martin Uecker, Joseph Myers for detailed wording improvement sugges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0T16:24:15.161996095</meta:creation-date>
    <dc:date>2022-01-31T05:23:44.708628140</dc:date>
    <meta:editing-duration>PT2H55M3S</meta:editing-duration>
    <meta:editing-cycles>63</meta:editing-cycles>
    <meta:generator>LibreOffice/7.0.4.2$Linux_X86_64 LibreOffice_project/00$Build-2</meta:generator>
    <meta:document-statistic meta:table-count="0" meta:image-count="0" meta:object-count="0" meta:page-count="13" meta:paragraph-count="194" meta:word-count="4679" meta:character-count="30480" meta:non-whitespace-character-count="25922"/>
  </office:meta>
</office:document-meta>
</file>
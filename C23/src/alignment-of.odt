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paragraph-properties fo:break-before="page"/>
      <style:text-properties officeooo:paragraph-rsid="00082c65"/>
    </style:style>
    <style:style style:name="P2" style:family="paragraph" style:parent-style-name="Heading_20_2">
      <style:text-properties officeooo:paragraph-rsid="00082c65"/>
    </style:style>
    <style:style style:name="P3" style:family="paragraph" style:parent-style-name="Heading_20_2">
      <style:text-properties officeooo:paragraph-rsid="00173508"/>
    </style:style>
    <style:style style:name="P4" style:family="paragraph" style:parent-style-name="Preformatted_20_Text">
      <style:paragraph-properties fo:margin-top="0cm" fo:margin-bottom="0.499cm" style:contextual-spacing="false"/>
    </style:style>
    <style:style style:name="P5" style:family="paragraph" style:parent-style-name="Preformatted_20_Text">
      <style:paragraph-properties fo:margin-left="1cm" fo:margin-right="1cm" fo:text-indent="0cm" style:auto-text-indent="false"/>
    </style:style>
    <style:style style:name="P6" style:family="paragraph" style:parent-style-name="Preformatted_20_Text">
      <style:paragraph-properties fo:margin-left="1cm" fo:margin-right="1cm" fo:margin-top="0cm" fo:margin-bottom="0.499cm" style:contextual-spacing="false" fo:text-indent="0cm" style:auto-text-indent="false"/>
    </style:style>
    <style:style style:name="P7" style:family="paragraph" style:parent-style-name="Heading_20_3">
      <style:text-properties officeooo:rsid="0009e8e7" officeooo:paragraph-rsid="0009e8e7"/>
    </style:style>
    <style:style style:name="P8" style:family="paragraph" style:parent-style-name="Preformatted_20_Text">
      <style:text-properties officeooo:paragraph-rsid="000b6da3"/>
    </style:style>
    <style:style style:name="P9" style:family="paragraph" style:parent-style-name="Preformatted_20_Text">
      <style:text-properties officeooo:paragraph-rsid="001b815b"/>
    </style:style>
    <style:style style:name="P10" style:family="paragraph" style:parent-style-name="Quotations">
      <style:text-properties officeooo:paragraph-rsid="000fd3e7"/>
    </style:style>
    <style:style style:name="P11" style:family="paragraph" style:parent-style-name="Text_20_body">
      <style:text-properties officeooo:rsid="000b6da3" officeooo:paragraph-rsid="000b6da3"/>
    </style:style>
    <style:style style:name="P12" style:family="paragraph" style:parent-style-name="Text_20_body">
      <style:text-properties officeooo:rsid="000ce77f" officeooo:paragraph-rsid="000ce77f"/>
    </style:style>
    <style:style style:name="P13" style:family="paragraph" style:parent-style-name="Text_20_body">
      <style:text-properties officeooo:rsid="000ddac1" officeooo:paragraph-rsid="000ddac1"/>
    </style:style>
    <style:style style:name="P14" style:family="paragraph" style:parent-style-name="Heading_20_3">
      <style:text-properties officeooo:rsid="001e1550" officeooo:paragraph-rsid="001e1550"/>
    </style:style>
    <style:style style:name="P15" style:family="paragraph" style:parent-style-name="Preformatted_20_Text">
      <style:text-properties officeooo:paragraph-rsid="0021b442"/>
    </style:style>
    <style:style style:name="P16" style:family="paragraph" style:parent-style-name="Quotations">
      <style:text-properties officeooo:paragraph-rsid="000ce77f"/>
    </style:style>
    <style:style style:name="P17" style:family="paragraph" style:parent-style-name="Quotations">
      <style:text-properties officeooo:rsid="001d0c0b" officeooo:paragraph-rsid="0021e8fa"/>
    </style:style>
    <style:style style:name="P18" style:family="paragraph" style:parent-style-name="Text_20_body" style:list-style-name="L1">
      <style:text-properties officeooo:rsid="0009e8e7" officeooo:paragraph-rsid="0009e8e7"/>
    </style:style>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text-properties fo:font-style="normal" officeooo:rsid="000ce77f" officeooo:paragraph-rsid="000ce77f" style:font-style-asian="normal" style:font-style-complex="normal"/>
    </style:style>
    <style:style style:name="P22" style:family="paragraph" style:parent-style-name="Text_20_body">
      <style:text-properties officeooo:paragraph-rsid="001e1550"/>
    </style:style>
    <style:style style:name="P23" style:family="paragraph" style:parent-style-name="Text_20_body" style:list-style-name="L4">
      <style:text-properties officeooo:rsid="001fd0de" officeooo:paragraph-rsid="001fd0de"/>
    </style:style>
    <style:style style:name="P24" style:family="paragraph" style:parent-style-name="Text_20_body">
      <style:text-properties officeooo:rsid="001fd0de" officeooo:paragraph-rsid="001fd0de"/>
    </style:style>
    <style:style style:name="P25" style:family="paragraph" style:parent-style-name="Text_20_body">
      <style:text-properties officeooo:rsid="001fd0de" officeooo:paragraph-rsid="0021e8fa"/>
    </style:style>
    <style:style style:name="P26" style:family="paragraph" style:parent-style-name="Text_20_body">
      <style:text-properties officeooo:rsid="0021e8fa" officeooo:paragraph-rsid="0021e8fa"/>
    </style:style>
    <style:style style:name="P27" style:family="paragraph" style:parent-style-name="Text_20_body">
      <style:text-properties officeooo:paragraph-rsid="0021e8fa"/>
    </style:style>
    <style:style style:name="P28" style:family="paragraph" style:parent-style-name="Text_20_body" style:list-style-name="L3">
      <style:paragraph-properties fo:margin-top="0cm" fo:margin-bottom="0cm" style:contextual-spacing="false"/>
    </style:style>
    <style:style style:name="T1" style:family="text">
      <style:text-properties fo:language="en" fo:country="GB"/>
    </style:style>
    <style:style style:name="T2" style:family="text">
      <style:text-properties fo:language="en" fo:country="GB" officeooo:rsid="0021b442"/>
    </style:style>
    <style:style style:name="T3" style:family="text">
      <style:text-properties officeooo:rsid="0009e8e7"/>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officeooo:rsid="000b8c98"/>
    </style:style>
    <style:style style:name="T7" style:family="text">
      <style:text-properties officeooo:rsid="000ce77f"/>
    </style:style>
    <style:style style:name="T8" style:family="text">
      <style:text-properties fo:font-style="normal" style:font-style-asian="normal" style:font-style-complex="normal"/>
    </style:style>
    <style:style style:name="T9" style:family="text">
      <style:text-properties fo:font-weight="normal" style:font-weight-asian="normal" style:font-weight-complex="normal"/>
    </style:style>
    <style:style style:name="T10" style:family="text">
      <style:text-properties fo:font-weight="normal" officeooo:rsid="000fd3e7" style:font-weight-asian="normal" style:font-weight-complex="normal"/>
    </style:style>
    <style:style style:name="T11" style:family="text">
      <style:text-properties fo:font-weight="normal" officeooo:rsid="0011a575" style:font-weight-asian="normal" style:font-weight-complex="normal"/>
    </style:style>
    <style:style style:name="T12" style:family="text">
      <style:text-properties fo:font-weight="normal" officeooo:rsid="000ce77f" style:font-weight-asian="normal" style:font-weight-complex="normal"/>
    </style:style>
    <style:style style:name="T13" style:family="text">
      <style:text-properties style:font-name="Liberation Mono"/>
    </style:style>
    <style:style style:name="T14" style:family="text">
      <style:text-properties style:font-name="Liberation Mono" fo:font-size="10pt" fo:language="en" fo:country="GB" officeooo:rsid="000ddac1" style:font-name-asian="Liberation Mono" style:font-size-asian="10pt" style:font-name-complex="Liberation Mono" style:font-size-complex="10pt"/>
    </style:style>
    <style:style style:name="T15" style:family="text">
      <style:text-properties style:font-name="Liberation Mono" fo:font-size="10pt" fo:language="en" fo:country="GB" officeooo:rsid="0011a575" style:font-name-asian="Liberation Mono" style:font-size-asian="10pt" style:font-name-complex="Liberation Mono" style:font-size-complex="10pt"/>
    </style:style>
    <style:style style:name="T16" style:family="text">
      <style:text-properties style:font-name="Liberation Mono" fo:font-size="10pt" fo:language="en" fo:country="GB" officeooo:rsid="001a9102" style:font-name-asian="Liberation Mono" style:font-size-asian="10pt" style:font-name-complex="Liberation Mono" style:font-size-complex="10pt"/>
    </style:style>
    <style:style style:name="T17" style:family="text">
      <style:text-properties style:font-name="Liberation Mono" fo:font-size="10pt" fo:language="en" fo:country="GB" officeooo:rsid="0021b442" style:font-name-asian="Liberation Mono" style:font-size-asian="10pt" style:font-name-complex="Liberation Mono" style:font-size-complex="10pt"/>
    </style:style>
    <style:style style:name="T18" style:family="text">
      <style:text-properties style:font-name="Liberation Mono" officeooo:rsid="000fd3e7" style:font-name-asian="Liberation Mono" style:font-name-complex="Liberation Mono"/>
    </style:style>
    <style:style style:name="T19" style:family="text">
      <style:text-properties officeooo:rsid="000ddac1"/>
    </style:style>
    <style:style style:name="T20" style:family="text">
      <style:text-properties style:font-name="Liberation Serif"/>
    </style:style>
    <style:style style:name="T21" style:family="text">
      <style:text-properties style:font-name="Liberation Serif" fo:font-size="14pt" fo:font-weight="bold" officeooo:rsid="001a9102" style:font-name-asian="DejaVu Sans" style:font-size-asian="14pt" style:font-weight-asian="bold" style:font-name-complex="DejaVu Sans" style:font-size-complex="14pt" style:font-weight-complex="bold"/>
    </style:style>
    <style:style style:name="T22" style:family="text">
      <style:text-properties officeooo:rsid="000fd3e7"/>
    </style:style>
    <style:style style:name="T23" style:family="text">
      <style:text-properties fo:font-weight="bold" style:font-weight-asian="bold" style:font-weight-complex="bold"/>
    </style:style>
    <style:style style:name="T24" style:family="text">
      <style:text-properties fo:font-weight="bold" officeooo:rsid="0011d321" style:font-weight-asian="bold" style:font-weight-complex="bold"/>
    </style:style>
    <style:style style:name="T25" style:family="text">
      <style:text-properties fo:font-weight="bold" officeooo:rsid="000ce77f" style:font-weight-asian="bold" style:font-weight-complex="bold"/>
    </style:style>
    <style:style style:name="T26" style:family="text">
      <style:text-properties fo:font-weight="bold" officeooo:rsid="001fd0de" style:font-weight-asian="bold" style:font-weight-complex="bold"/>
    </style:style>
    <style:style style:name="T27" style:family="text">
      <style:text-properties officeooo:rsid="001d0c0b"/>
    </style:style>
    <style:style style:name="T28" style:family="text">
      <style:text-properties style:font-name="Liberation Serif"/>
    </style:style>
    <style:style style:name="T29" style:family="text">
      <style:text-properties style:font-name="Liberation Serif" fo:font-style="normal" officeooo:rsid="001e1550" style:font-style-asian="normal" style:font-style-complex="normal"/>
    </style:style>
    <style:style style:name="T30" style:family="text">
      <style:text-properties style:text-position="super 58%"/>
    </style:style>
    <style:style style:name="T31" style:family="text">
      <style:text-properties style:text-position="super 58%" style:font-name="Liberation Serif" officeooo:rsid="001d0c0b"/>
    </style:style>
    <style:style style:name="T32" style:family="text">
      <style:text-properties style:text-position="super 58%" fo:font-weight="normal" style:font-weight-asian="normal" style:font-weight-complex="normal"/>
    </style:style>
    <style:style style:name="T33" style:family="text">
      <style:text-properties style:font-name="Liberation Mono"/>
    </style:style>
    <style:style style:name="T34" style:family="text">
      <style:text-properties style:font-name="Liberation Mono" fo:font-weight="normal" style:font-weight-asian="normal" style:font-weight-complex="normal"/>
    </style:style>
    <style:style style:name="T35" style:family="text">
      <style:text-properties style:font-name="Liberation Mono" officeooo:rsid="001e1550"/>
    </style:style>
    <style:style style:name="T36" style:family="text">
      <style:text-properties style:font-name="Liberation Mono" fo:font-style="normal" officeooo:rsid="001e1550" style:font-style-asian="normal" style:font-style-complex="normal"/>
    </style:style>
    <style:style style:name="T37" style:family="text">
      <style:text-properties style:font-name="Liberation Mono" fo:font-weight="bold" officeooo:rsid="001fd0de" style:font-weight-asian="bold" style:font-weight-complex="bold"/>
    </style:style>
    <style:style style:name="T38" style:family="text">
      <style:text-properties officeooo:rsid="001e1550"/>
    </style:style>
    <style:style style:name="T39" style:family="text">
      <style:text-properties officeooo:rsid="001fd0de"/>
    </style:style>
    <style:style style:name="T40" style:family="text">
      <style:text-properties officeooo:rsid="0021b442"/>
    </style:style>
    <style:style style:name="T41" style:family="text">
      <style:text-properties officeooo:rsid="0021e8f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text:bookmark text:name="LC1"/><text:span text:style-name="Source_20_Text"><text:span text:style-name="T1">Proposal for C23</text:span></text:span></text:p>
      <text:p text:style-name="Preformatted_20_Text"><text:bookmark text:name="LC2"/><text:span text:style-name="Source_20_Text"><text:span text:style-name="T1">WG14 </text:span></text:span><text:span text:style-name="Source_20_Text"><text:span text:style-name="T16">29</text:span></text:span><text:span text:style-name="Source_20_Text"><text:span text:style-name="T17">74</text:span></text:span></text:p>
      <text:p text:style-name="Preformatted_20_Text"><text:bookmark text:name="LC3"/></text:p>
      <text:p text:style-name="Preformatted_20_Text"><text:bookmark text:name="LC4"/><text:span text:style-name="Source_20_Text"><text:span text:style-name="T1">Title: <text:s text:c="14"/>Queryable pointer alignment, </text:span></text:span><text:span text:style-name="Source_20_Text"><text:span text:style-name="T2">v3</text:span></text:span></text:p>
      <text:p text:style-name="Preformatted_20_Text"><text:bookmark text:name="LC5"/><text:span text:style-name="Source_20_Text"><text:span text:style-name="T1">Author, affiliation: Alex Gilding, Perforce</text:span></text:span></text:p>
      <text:p text:style-name="P9"><text:bookmark text:name="LC6"/><text:span text:style-name="Source_20_Text"><text:span text:style-name="T1">Date: <text:s text:c="15"/>202</text:span></text:span><text:span text:style-name="Source_20_Text"><text:span text:style-name="T14">2</text:span></text:span><text:span text:style-name="Source_20_Text"><text:span text:style-name="T1">-</text:span></text:span><text:span text:style-name="Source_20_Text"><text:span text:style-name="T14">0</text:span></text:span><text:span text:style-name="Source_20_Text"><text:span text:style-name="T17">4</text:span></text:span><text:span text:style-name="Source_20_Text"><text:span text:style-name="T1">-</text:span></text:span><text:span text:style-name="Source_20_Text"><text:span text:style-name="T17">1</text:span></text:span><text:span text:style-name="Source_20_Text"><text:span text:style-name="T14">5</text:span></text:span></text:p>
      <text:p text:style-name="Preformatted_20_Text"><text:bookmark text:name="LC7"/><text:span text:style-name="Source_20_Text"><text:span text:style-name="T1">Proposal category: <text:s text:c="2"/>New features</text:span></text:span></text:p>
      <text:p text:style-name="P4"><text:bookmark text:name="LC8"/><text:span text:style-name="Source_20_Text"><text:span text:style-name="T1">Target audience: <text:s text:c="4"/>Library developers</text:span></text:span></text:p>
      <text:h text:style-name="P2" text:outline-level="2"><text:bookmark text:name="abstract"/>Abstract</text:h>
      <text:p text:style-name="Text_20_body">A pointer has an alignment that it satisfies, and an object type has an alignment that it requires. But C does not provide a portable way to check whether a pointer satisfies the alignment requirement for an object type. This means it is not currently safe to convert pointers (usually <text:span text:style-name="Source_20_Text">void *</text:span>) to other types without making at last one unverified assumption.</text:p>
      <text:p text:style-name="Text_20_body">If C added a Standard Library function that tested whether a pointer satisf<text:span text:style-name="T3">i</text:span>ed an alignment, it would be possible to portably know if a pointer is safe to convert.</text:p>
      <text:h text:style-name="P1" text:outline-level="1"><text:bookmark text:name="queryable-pointer-alignment"/>Queryable pointer alignment, <text:span text:style-name="T40">v3</text:span></text:h>
      <text:p text:style-name="Preformatted_20_Text"><text:bookmark text:name="LC15"/><text:span text:style-name="Source_20_Text"><text:span text:style-name="T1">Reply-to: <text:s text:c="11"/>Alex Gilding (agilding@perforce.com)</text:span></text:span></text:p>
      <text:p text:style-name="P15"><text:bookmark text:name="LC24"/><text:span text:style-name="Source_20_Text"><text:span text:style-name="T1">Document No: <text:s text:c="8"/>N</text:span></text:span><text:span text:style-name="Source_20_Text"><text:span text:style-name="T16">29</text:span></text:span><text:span text:style-name="Source_20_Text"><text:span text:style-name="T17">74</text:span></text:span></text:p>
      <text:p text:style-name="P15"><text:bookmark text:name="LC34"/><text:span text:style-name="Source_20_Text"><text:span text:style-name="T1">Revises Document No: N</text:span></text:span><text:span text:style-name="Source_20_Text"><text:span text:style-name="T16">2918</text:span></text:span></text:p>
      <text:p text:style-name="P4"><text:bookmark text:name="LC44"/><text:span text:style-name="Source_20_Text"><text:span text:style-name="T1">Date: <text:s text:c="15"/>202</text:span></text:span><text:span text:style-name="Source_20_Text"><text:span text:style-name="T14">2</text:span></text:span><text:span text:style-name="Source_20_Text"><text:span text:style-name="T1">-</text:span></text:span><text:span text:style-name="Source_20_Text"><text:span text:style-name="T14">0</text:span></text:span><text:span text:style-name="Source_20_Text"><text:span text:style-name="T17">4</text:span></text:span><text:span text:style-name="Source_20_Text"><text:span text:style-name="T1">-</text:span></text:span><text:span text:style-name="Source_20_Text"><text:span text:style-name="T17">1</text:span></text:span><text:span text:style-name="Source_20_Text"><text:span text:style-name="T14">5</text:span></text:span></text:p>
      <text:h text:style-name="Heading_20_2" text:outline-level="2"><text:bookmark text:name="summary-of-changes"/>Summary of Changes</text:h>
      <text:h text:style-name="P14" text:outline-level="3">N<text:span text:style-name="T39">2974</text:span></text:h>
      <text:list xml:id="list764752746" text:style-name="L4">
        <text:list-item>
          <text:p text:style-name="P23">Remove alternative 2 and focus on alternative 1. Move to <text:span text:style-name="T13">stdlib.h</text:span> following Committee discussion.</text:p>
        </text:list-item>
      </text:list>
      <text:h text:style-name="P7" text:outline-level="3">N<text:span text:style-name="T21">2918</text:span></text:h>
      <text:list xml:id="list2326180827" text:style-name="L1">
        <text:list-item>
          <text:p text:style-name="P18">Provide full alternative signatures; move declaration from <text:span text:style-name="T13">stddef.h</text:span>; add discussion of void-pointer alignment; <text:span text:style-name="T7">null alignment; </text:span>typo fixes; <text:span text:style-name="T19">C23 draft version update</text:span></text:p>
        </text:list-item>
      </text:list>
      <text:h text:style-name="Heading_20_3" text:outline-level="3"><text:bookmark text:name="n2852"/>N2852</text:h>
      <text:list xml:id="list3464155401" text:style-name="L2">
        <text:list-item>
          <text:p text:style-name="P19">original proposal </text:p>
        </text:list-item>
      </text:list>
      <text:h text:style-name="Heading_20_2" text:outline-level="2"><text:bookmark text:name="introduction"/>Introduction</text:h>
      <text:p text:style-name="Text_20_body">C provides a concept of object <text:span text:style-name="Emphasis">alignment</text:span>: "an implementation-defined integer value representing the number of bytes between successive addresses at which a given object can be allocated".</text:p>
      <text:p text:style-name="Text_20_body">However, while object types may impose an alignment requirement, there is no <text:span text:style-name="Emphasis">portable</text:span> way to query the alignment of a generic address to see whether it can safely (in the absence of other concerns) be converted to a pointer to an object with the aligned type.</text:p>
      <text:p text:style-name="Text_20_body">We propose that a standard library function is added to abstract the implementation-defined mapping between pointers and integers so that programmers can check pointers for alignment without needing to know about the addressing structure of the platform target.</text:p>
      <text:h text:style-name="Heading_20_2" text:outline-level="2"><text:bookmark text:name="rationale"/>Rationale</text:h>
      <text:p text:style-name="Text_20_body">Some types, most commonly floating types and atomic types, have strict alignment requirements. Others may have no hard alignment requirement but provide better performance when placed on their natural boundaries.</text:p>
      <text:p text:style-name="Text_20_body">Unfortunately when a pointer that is not already strongly typed as pointing to an object of an aligned type is received, there is no way to check whether it is suitably aligned to convert to a pointer to a type with a stricter alignment, without knowing details of the target platform's addressing structure - the exact details that C's pointer types, pointer arithmetic, and mapping between integer and pointers, are supposed to abstract and protect the user from.</text:p>
      <text:p text:style-name="Text_20_body"><text:soft-page-break/>There is no obvious way to query this either without resorting to runtime derivations that would severely impact the performance of a conversion. Since the mapping is fixed to the entire platform adding any kind of runtime element to it is extremely wasteful.</text:p>
      <text:p text:style-name="Text_20_body">However, the authors of a Standard Library for any given target must know what the addressing structure for that target is. It is possible to express this query correctly in native C code as long as the implementation details of the target are known, so the Library should provide a query that uses this secret platform knowledge so that users are not forced to arbitrarily guard entire program sections behind a "this probably only works on x86 <text:span text:style-name="Emphasis">shrug</text:span>" with a low-performance fallback path.</text:p>
      <text:p text:style-name="Text_20_body">Many users assume that a) pointer conversion to integer is a no-op, and that b) all addresses proceed in a linear "big array" indexed fashion. This is true for the most popular platforms like x64, but is not true on many embedded targets or less common platforms. For instance, the <text:a xlink:type="simple" xlink:href="https://stackoverflow.com/a/18578480/1366431" office:target-frame-name="_blank" xlink:show="new" text:style-name="Internet_20_link" text:visited-style-name="Visited_20_Internet_20_Link">Cray T90</text:a> uses a word-addressing structure and provides C-compatible byte addressing by conveying the byte offset within a 64-bit word in the <text:span text:style-name="Emphasis">topmost</text:span> three bits of the pointer. A no-op conversion from the pointer representation to a 64-bit integer will provide surprising results to an x64-user as it increments the byte address.</text:p>
      <text:p text:style-name="Text_20_body">An x86-compatible alignment query (loosely, "what is the lowest set bit?") would not provide even remotely correct results on such a platform. The user has no way to determine what conversion and what operation on the integer representation is correct from within the portable C code; they can at most rely on identifying the platform and hoping they remembered that the address structure is different.</text:p>
      <text:h text:style-name="Heading_20_2" text:outline-level="2"><text:bookmark text:name="proposal"/>Proposal</text:h>
      <text:p text:style-name="Text_20_body">The Standard Library should provide a single function, tentatively named <text:span text:style-name="Source_20_Text">memalignment</text:span>, which accepts any pointer as an argument and returns a <text:span text:style-name="Source_20_Text">size_t</text:span> containing the maximum possible alignment supported by the given address. This acts as a dynamic counterpart to the static, type based <text:span text:style-name="Source_20_Text">_Alignof</text:span> operator.</text:p>
      <text:p text:style-name="Text_20_body">The result can be compared to an alignment requirement for a type obtained from <text:span text:style-name="Source_20_Text">_Alignof</text:span>; if it is greater or equal, the pointer is suitably aligned to point to an object of the desired type.</text:p>
      <text:p text:style-name="Text_20_body">For example:</text:p>
      <text:p text:style-name="Preformatted_20_Text"><text:bookmark text:name="LC16"/><text:span text:style-name="Source_20_Text"><text:span text:style-name="T1">// Assumes adding atomic qualification is acceptable</text:span></text:span></text:p>
      <text:p text:style-name="Preformatted_20_Text"><text:bookmark text:name="LC25"/><text:span text:style-name="Source_20_Text"><text:span text:style-name="T1">void want_atomic (void const * p) {</text:span></text:span></text:p>
      <text:p text:style-name="Preformatted_20_Text"><text:bookmark text:name="LC35"/><text:span text:style-name="Source_20_Text"><text:s text:c="2"/></text:span><text:span text:style-name="Source_20_Text"><text:span text:style-name="T1">size_t atomic_int_align = _Alignof (_Atomic int);</text:span></text:span></text:p>
      <text:p text:style-name="Preformatted_20_Text"><text:bookmark text:name="LC45"/><text:span text:style-name="Source_20_Text"><text:s text:c="2"/></text:span><text:span text:style-name="Source_20_Text"><text:span text:style-name="T1">size_t p_align = memalignment (p);</text:span></text:span></text:p>
      <text:p text:style-name="Preformatted_20_Text"><text:bookmark text:name="LC52"/><text:span text:style-name="Source_20_Text"><text:s text:c="2"/></text:span><text:span text:style-name="Source_20_Text"><text:span text:style-name="T1">if (p_align &gt;= atomic_int_align) {</text:span></text:span></text:p>
      <text:p text:style-name="Preformatted_20_Text"><text:bookmark text:name="LC62"/><text:span text:style-name="Source_20_Text"><text:s text:c="4"/></text:span><text:span text:style-name="Source_20_Text"><text:span text:style-name="T1">_Atomic int * ai = (_Atomic int *)p;</text:span></text:span></text:p>
      <text:p text:style-name="Preformatted_20_Text"><text:bookmark text:name="LC72"/><text:span text:style-name="Source_20_Text"><text:s text:c="4"/></text:span><text:span text:style-name="Source_20_Text"><text:span text:style-name="T1">...work with ai...</text:span></text:span></text:p>
      <text:p text:style-name="Preformatted_20_Text"><text:bookmark text:name="LC82"/><text:span text:style-name="Source_20_Text"><text:s text:c="2"/></text:span><text:span text:style-name="Source_20_Text"><text:span text:style-name="T1">}</text:span></text:span></text:p>
      <text:p text:style-name="P4"><text:bookmark text:name="LC9"/><text:span text:style-name="Source_20_Text"><text:span text:style-name="T1">}</text:span></text:span></text:p>
      <text:p text:style-name="Text_20_body">A possible implementation of <text:span text:style-name="Source_20_Text">memalignment</text:span> that would work on x64 might be:</text:p>
      <text:p text:style-name="Preformatted_20_Text"><text:bookmark text:name="LC17"/><text:span text:style-name="Source_20_Text"><text:span text:style-name="T1">size_t memalignment (void const * p) {</text:span></text:span></text:p>
      <text:p text:style-name="P8"><text:span text:style-name="Source_20_Text"><text:s text:c="2"/></text:span><text:span text:style-name="Source_20_Text"><text:span text:style-name="T1">intptr_t ip = (intptr_t)p;</text:span></text:span></text:p>
      <text:p text:style-name="P8"><text:bookmark text:name="LC36"/><text:span text:style-name="Source_20_Text"><text:s text:c="2"/></text:span><text:span text:style-name="Source_20_Text"><text:span text:style-name="T1">return ip &amp; -ip; // convert to LSB value</text:span></text:span></text:p>
      <text:p text:style-name="P4"><text:bookmark text:name="LC46"/><text:span text:style-name="Source_20_Text"><text:span text:style-name="T1">}</text:span></text:span></text:p>
      <text:p text:style-name="P11"><text:soft-page-break/>This returns zero when the pointer is null, because it cannot be usefully used to access aligned <text:span text:style-name="T6">memory (the user would need to perform a null test either way, so this is more defensive)</text:span>.</text:p>
      <text:p text:style-name="Text_20_body">Because x64 does provide a flat address structure, the alignment, which is always a pure power of two per 6.2.8 paragraph 4, is described by the least significant value bit. Other architectures would provide other implementations as appropriate.</text:p>
      <text:p text:style-name="P13">The question was asked whether a pointer to <text:span text:style-name="T13">void</text:span><text:span text:style-name="T20"> preserves the same alignment requirements as the typed pointer it was converted from. We do not consider any additional clarification needed for the purposes of this library feature – a pointer to </text:span><text:span text:style-name="T13">void</text:span><text:span text:style-name="T20"> is required (C23 6.2.5 “Types” p30) to have the same representation as a character pointer, i.e. it is required to be a byte-address. This doesn’t preclude the converted-from pointer from being word-addressed and the conversion to </text:span><text:span text:style-name="T13">void *</text:span><text:span text:style-name="T20"> from being a representation-changing operation; but it does imply that the abstract address itself is maintained. The resulting </text:span><text:span text:style-name="T13">void *</text:span><text:span text:style-name="T20"> must still compare equal to the pointer it converted from and compare unequal to a pointer to any other byte in the same or any other object.</text:span></text:p>
      <text:p text:style-name="P13"><text:span text:style-name="T20">Alignment being defined in terms of the byte distance between pointers, this means there is already enough normative wording to establish that the alignment of a pointer is stored in the converted </text:span><text:span text:style-name="T13">void *</text:span><text:span text:style-name="T20"> representation. It is merely stored in an inaccessible, secret-platform-knowledge way.</text:span></text:p>
      <text:h text:style-name="Heading_20_2" text:outline-level="2"><text:bookmark text:name="alternatives"/>Alternatives</text:h>
      <text:p text:style-name="Text_20_body">An alternative might be to provide a function that accepts a pointer and an alignment and returns a true/false value describing whether the pointer is sufficiently aligned for the alignment. This might provide a more concise macro interface. This would also hide considerations of over- aligned pointers from the user.</text:p>
      <text:p text:style-name="Text_20_body">Another alternative might be to provide a function-like macro that accepts a type as the target alignment to compare against rather than an alignment value.</text:p>
      <text:p text:style-name="Text_20_body">For example:</text:p>
      <text:p text:style-name="P4"><text:bookmark text:name="LC18"/><text:span text:style-name="Source_20_Text"><text:span text:style-name="T1">#define isaligned(P, T) (memalignment (P) &gt;= _Alignof (T))</text:span></text:span></text:p>
      <text:p text:style-name="Text_20_body">Which option is most user-friendly is largely subjective. The basic <text:span text:style-name="Source_20_Text">memalignment</text:span> function provides the most information to the user, but the uses for that information beyond turning it into a true/false - especially if the result is beyond the implementation extended-alignments - are probably very limited.</text:p>
      <text:p text:style-name="P22"><text:span text:style-name="T29">In the first round of discussion the Committee indicated a preference for the more general-purpose </text:span><text:span text:style-name="T36">memalignment</text:span><text:span text:style-name="T29"> query. All other interesting queries – including alignment to a type, and multi-level “preferred-alignment” queries – can be built on top of this most flexible API, while the reverse is not true. Therefore the other alternatives are withdrawn.</text:span></text:p>
      <text:p text:style-name="Text_20_body">The names <text:span text:style-name="Source_20_Text">memalignment</text:span> and <text:span text:style-name="Source_20_Text">isaligned</text:span> are suggested because they are already in the reserved namespace for memory/string functions. Names beginning with <text:span text:style-name="Source_20_Text">alig*</text:span> are not currently reserved. We do not wish to drive the identifier-reservation explosion unnecessarily.</text:p>
      <text:p text:style-name="P22">The proposal places the new function in <text:span text:style-name="Source_20_Text">std</text:span><text:span text:style-name="Source_20_Text"><text:span text:style-name="T38">lib</text:span></text:span><text:span text:style-name="Source_20_Text">.h</text:span>. Availability in freestanding is important, <text:span text:style-name="T38">so we propose an addition to the freestanding availability list</text:span> <text:span text:style-name="T38">in Section 4 to add this function only, </text:span><text:soft-page-break/><text:span text:style-name="T38">from this header. The function was previously proposed for </text:span><text:span text:style-name="T35">stddef.h</text:span><text:span text:style-name="T38"> or </text:span><text:span text:style-name="T35">stdalign.h</text:span><text:span text:style-name="T38">, but neither of these headers introduce functions with external linkage and the opinion of the Committee was that it is more user-friendly to ensure existing behaviour is preserved with respect to pulling in linkable libraries. (While this would potentially add a new linkable object for freestanding, it would be effectively original rather than changing the meaning of an existing available header.)</text:span></text:p>
      <text:p text:style-name="P22">Should the proposed <text:span text:style-name="Source_20_Text">stdbit.h</text:span> header gain acceptance, it might also make sense to be placed there.</text:p>
      <text:p text:style-name="P12">Previously we proposed returning the maximum possible alignment when the argument is a null pointer. Although a pointer to any type can be null, regardless of the alignment requirement , the result didn’t make much sense because it implies that the address can be used to access aligned memory. Returning zero adds a layer of defensiveness <text:s/>by indicating that the pointer cannot access <text:span text:style-name="T4">objects</text:span><text:span text:style-name="T8"> of the required type, and is consistent with the null check the user requires anyway if they are working with nullable-pointers.</text:span></text:p>
      <text:p text:style-name="P21">It also removes a branch, which users tend to care about quite a lot.</text:p>
      <text:h text:style-name="Heading_20_2" text:outline-level="2"><text:bookmark text:name="prior-art"/>Prior art</text:h>
      <text:p text:style-name="Text_20_body">Prior art for this functionality exists and is mostly aimed at C++.</text:p>
      <text:p text:style-name="Text_20_body">C++ proposal <text:a xlink:type="simple" xlink:href="https://rawgit.com/fmatthew5876/stdcxx-align/master/proposal/draft.html" office:target-frame-name="_blank" xlink:show="new" text:style-name="Internet_20_link" text:visited-style-name="Visited_20_Internet_20_Link">n4201</text:a> provided <text:span text:style-name="Source_20_Text">is_aligned</text:span>, which was not adopted.</text:p>
      <text:p text:style-name="Text_20_body"><text:a xlink:type="simple" xlink:href="https://www.boost.org/doc/libs/1_77_0/doc/html/align/reference.html#align.reference.functions.is_aligned" office:target-frame-name="_blank" xlink:show="new" text:style-name="Internet_20_link" text:visited-style-name="Visited_20_Internet_20_Link">Boost.Align</text:a> provides <text:span text:style-name="Source_20_Text">is_aligned</text:span>.</text:p>
      <text:p text:style-name="Text_20_body"><text:a xlink:type="simple" xlink:href="https://docs.microsoft.com/en-us/previous-versions/ff549486(v=vs.85)" office:target-frame-name="_blank" xlink:show="new" text:style-name="Internet_20_link" text:visited-style-name="Visited_20_Internet_20_Link">Microsoft</text:a> provide <text:span text:style-name="Source_20_Text">IS_ALIGNED</text:span>.</text:p>
      <text:p text:style-name="Text_20_body">All three of these correspond to the alternative proposal above <text:span text:style-name="Source_20_Text">isaligned</text:span>, accepting two arguments and returning true if the first, a pointer, is aligned enough to satisfy the second, an alignment.</text:p>
      <text:h text:style-name="Heading_20_2" text:outline-level="2"><text:bookmark text:name="impact"/>Impact</text:h>
      <text:p text:style-name="Text_20_body">The impact on compiler authors is zero because the feature can be implemented entirely in target aware C code. Converting a pointer to an integer and inspecting it is implementation-defined so the Library authors should know what the correct algorithm to use is. The maintenance impact is zero because this will not change once established for any given target.</text:p>
      <text:h text:style-name="P3" text:outline-level="2"><text:bookmark text:name="proposed-wording"/>Proposed wording</text:h>
      <text:p text:style-name="Text_20_body">Changes are proposed against the wording in C2<text:span text:style-name="T22">3</text:span> draft n2<text:span text:style-name="T22">731</text:span>. <text:span text:style-name="T39">Bolded text is new text in modified sections.</text:span></text:p>
      <text:p text:style-name="P27"><text:span text:style-name="T41">The changes are listed separately so that if the exception for freestanding is not acceptable, the Committee is still able to adopt the wording as-is for hosted implementations and work out a solution for freestanding in a later pass.</text:span></text:p>
      <text:p text:style-name="P26">Change 1:</text:p>
      <text:p text:style-name="Text_20_body">Add a new section to 7.<text:span text:style-name="T22">22</text:span> "General utilities <text:span text:style-name="Source_20_Text">&lt;std</text:span><text:span text:style-name="Source_20_Text"><text:span text:style-name="T18">lib</text:span></text:span><text:span text:style-name="Source_20_Text">.h&gt;</text:span>":</text:p>
      <text:p text:style-name="P10"><text:soft-page-break/><text:span text:style-name="Strong_20_Emphasis"><text:span text:style-name="T22">7.22.</text:span></text:span><text:span text:style-name="Strong_20_Emphasis"><text:span text:style-name="T24">9</text:span></text:span><text:span text:style-name="Strong_20_Emphasis"><text:span text:style-name="T10"> </text:span></text:span><text:span text:style-name="Strong_20_Emphasis"><text:span text:style-name="T11">Alignment of memory</text:span></text:span></text:p>
      <text:p text:style-name="Quotations"><text:span text:style-name="Strong_20_Emphasis">7.</text:span><text:span text:style-name="Strong_20_Emphasis"><text:span text:style-name="T22">22</text:span></text:span><text:span text:style-name="Strong_20_Emphasis">.</text:span><text:span text:style-name="Strong_20_Emphasis"><text:span text:style-name="T24">9</text:span></text:span><text:span text:style-name="Strong_20_Emphasis"><text:span text:style-name="T22">.1</text:span></text:span> The <text:span text:style-name="Source_20_Text">memalignment</text:span> function</text:p>
      <text:p text:style-name="Quotations"><text:span text:style-name="Strong_20_Emphasis">Synopsis</text:span></text:p>
      <text:p text:style-name="P5"><text:bookmark text:name="LC19"/><text:span text:style-name="Source_20_Text"><text:span text:style-name="T1">#include &lt;std</text:span></text:span><text:span text:style-name="Source_20_Text"><text:span text:style-name="T15">lib</text:span></text:span><text:span text:style-name="Source_20_Text"><text:span text:style-name="T1">.h&gt;</text:span></text:span></text:p>
      <text:p text:style-name="P6"><text:bookmark text:name="LC27"/><text:span text:style-name="Source_20_Text"><text:span text:style-name="T1">size_t memalignment(const void* p);</text:span></text:span></text:p>
      <text:p text:style-name="Quotations"><text:span text:style-name="Strong_20_Emphasis">Description</text:span></text:p>
      <text:p text:style-name="Quotations">The <text:span text:style-name="Source_20_Text">memalignment</text:span> function accepts a pointer to any object and returns the maximum alignment satisfie<text:span text:style-name="T27">d by its address value</text:span>. The alignment may be an extended alignment and may also be beyond the range supported by the implementation for explicit use by <text:span text:style-name="Source_20_Text">_Alignas</text:span><text:span text:style-name="Source_20_Text"><text:span text:style-name="T20"> </text:span></text:span><text:span text:style-name="Source_20_Text"><text:span text:style-name="T31">footnote)</text:span></text:span>. If so, it will satisfy all alignments usable by the implementation. The value returned can be compared to the result of <text:span text:style-name="Source_20_Text">_Align</text:span><text:span text:style-name="Source_20_Text"><text:span text:style-name="T3">of</text:span></text:span>, and if it is greater or equal, the alignment requirement for the type operand is satisfied.</text:p>
      <text:p text:style-name="Quotations"><text:span text:style-name="Strong_20_Emphasis">Returns</text:span></text:p>
      <text:p text:style-name="Quotations">The alignment of the pointer <text:span text:style-name="Source_20_Text">p</text:span>, which is a power of two. If <text:span text:style-name="Source_20_Text">p</text:span> is a null pointer, <text:span text:style-name="T7">an alignment of zero</text:span> is returned.</text:p>
      <text:p text:style-name="P16"><text:span text:style-name="T25">NOTE</text:span><text:span text:style-name="T12"> an alignment of zero indicates that the tested pointer cannot be used to access an object of any type.</text:span></text:p>
      <text:p text:style-name="P17"><text:span text:style-name="T9">footnote: the actual alignment of an object may be stricter than the alignment requested for an object by </text:span><text:span text:style-name="T34">_Alignas</text:span><text:span text:style-name="T9"> or (implicitly) by an allocation function, but will always satisfy it.</text:span></text:p>
      <text:p text:style-name="P26">Change 2:</text:p>
      <text:p text:style-name="P25">Modify section 4 “Conformance”, paragraph 6:</text:p>
      <text:p text:style-name="P17"><text:span text:style-name="T9">The two forms of </text:span><text:span text:style-name="T5">conforming implementation</text:span><text:span text:style-name="T9"> are hosted and freestanding. A </text:span><text:span text:style-name="T5">conforming hosted implementation</text:span><text:span text:style-name="T9"> shall accept any strictly conforming program. A </text:span><text:span text:style-name="T5">conforming freestanding implementation</text:span><text:span text:style-name="T9"> shall accept any strictly conforming program in which the use of the features specified in the library clause (clause 7) is confined to the </text:span><text:span text:style-name="T26">complete</text:span><text:span text:style-name="T9"> contents of the standard headers </text:span><text:span text:style-name="T34">&lt;float.h&gt;</text:span><text:span text:style-name="T9"> , </text:span><text:span text:style-name="T34">&lt;iso646.h&gt;</text:span><text:span text:style-name="T9"> , </text:span><text:span text:style-name="T34">&lt;limits.h&gt;</text:span><text:span text:style-name="T9"> , </text:span><text:span text:style-name="T34">&lt;stdalign.h&gt;</text:span><text:span text:style-name="T9"> , </text:span><text:span text:style-name="T34">&lt;stdarg.h&gt;</text:span><text:span text:style-name="T9"> , </text:span><text:span text:style-name="T34">&lt;stdbool.h&gt;</text:span><text:span text:style-name="T9"> , </text:span><text:span text:style-name="T34">&lt;stddef.h&gt;</text:span><text:span text:style-name="T9"> , </text:span><text:span text:style-name="T34">&lt;stdint.h&gt;</text:span><text:span text:style-name="T9"> , and </text:span><text:span text:style-name="T34">&lt;stdnoreturn.h&gt;</text:span><text:span text:style-name="T9"> </text:span><text:span text:style-name="T23">; </text:span><text:span text:style-name="T26">and the selected function </text:span><text:span text:style-name="T37">memalignment</text:span><text:span text:style-name="T26"> from </text:span><text:span text:style-name="T37">&lt;stdlib.h&gt;</text:span><text:span text:style-name="T9">. A conforming implementation may have extensions (including additional library functions), provided they do not alter the behavior of any strictly conforming program. </text:span><text:span text:style-name="T32">4)</text:span></text:p>
      <text:h text:style-name="P3" text:outline-level="2"><text:bookmark text:name="references"/>References</text:h>
      <text:list xml:id="list1833058828" text:style-name="L3">
        <text:list-item>
          <text:p text:style-name="P28"><text:a xlink:type="simple" xlink:href="http://www.open-std.org/jtc1/sc22/wg14/www/docs/n2731.pdf" office:target-frame-name="_blank" xlink:show="new" text:style-name="Internet_20_link" text:visited-style-name="Visited_20_Internet_20_Link"><text:span text:style-name="T22">C23 n2731</text:span></text:a> </text:p>
        </text:list-item>
        <text:list-item>
          <text:p text:style-name="P28"><text:a xlink:type="simple" xlink:href="https://stackoverflow.com/a/18578480/1366431" office:target-frame-name="_blank" xlink:show="new" text:style-name="Internet_20_link" text:visited-style-name="Visited_20_Internet_20_Link">Cray T90</text:a> </text:p>
        </text:list-item>
        <text:list-item>
          <text:p text:style-name="P28"><text:a xlink:type="simple" xlink:href="https://rawgit.com/fmatthew5876/stdcxx-align/master/proposal/draft.html" office:target-frame-name="_blank" xlink:show="new" text:style-name="Internet_20_link" text:visited-style-name="Visited_20_Internet_20_Link">C++ n4201</text:a> </text:p>
        </text:list-item>
        <text:list-item>
          <text:p text:style-name="P28"><text:a xlink:type="simple" xlink:href="https://www.boost.org/doc/libs/1_77_0/doc/html/align/reference.html#align.reference.functions.is_aligned" office:target-frame-name="_blank" xlink:show="new" text:style-name="Internet_20_link" text:visited-style-name="Visited_20_Internet_20_Link">Boost.Align</text:a> </text:p>
        </text:list-item>
        <text:list-item>
          <text:p text:style-name="P20"><text:soft-page-break/><text:a xlink:type="simple" xlink:href="https://docs.microsoft.com/en-us/previous-versions/ff549486(v=vs.85)" office:target-frame-name="_blank" xlink:show="new" text:style-name="Internet_20_link" text:visited-style-name="Visited_20_Internet_20_Link">IS_ALIGNED</text:a> </text:p>
        </text:list-item>
      </text:list>
      <text:p text:style-name="Preformatted_20_Text"><text:span text:style-name="Source_20_Text"><text:span text:style-name="T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0T16:06:38.071325495</meta:creation-date>
    <dc:date>2022-04-18T21:46:47.528526681</dc:date>
    <meta:editing-duration>PT1H47M56S</meta:editing-duration>
    <meta:editing-cycles>19</meta:editing-cycles>
    <meta:generator>LibreOffice/7.0.4.2$Linux_X86_64 LibreOffice_project/00$Build-2</meta:generator>
    <meta:document-statistic meta:table-count="0" meta:image-count="0" meta:object-count="0" meta:page-count="7" meta:paragraph-count="100" meta:word-count="2021" meta:character-count="12781" meta:non-whitespace-character-count="10769"/>
  </office:meta>
</office:document-meta>
</file>
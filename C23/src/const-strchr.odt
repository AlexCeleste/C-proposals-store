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text-properties officeooo:paragraph-rsid="001468e1"/>
    </style:style>
    <style:style style:name="P2" style:family="paragraph" style:parent-style-name="Heading_20_2">
      <style:paragraph-properties fo:break-before="page"/>
      <style:text-properties officeooo:paragraph-rsid="001468e1"/>
    </style:style>
    <style:style style:name="P3" style:family="paragraph" style:parent-style-name="Heading_20_2">
      <style:text-properties officeooo:paragraph-rsid="001468e1"/>
    </style:style>
    <style:style style:name="P4" style:family="paragraph" style:parent-style-name="Heading_20_3">
      <style:text-properties officeooo:rsid="00062a88" officeooo:paragraph-rsid="001468e1"/>
    </style:style>
    <style:style style:name="P5" style:family="paragraph" style:parent-style-name="Heading_20_3">
      <style:text-properties officeooo:paragraph-rsid="001468e1"/>
    </style:style>
    <style:style style:name="P6" style:family="paragraph" style:parent-style-name="Heading_20_3">
      <style:text-properties officeooo:rsid="001a5bb6" officeooo:paragraph-rsid="001a5bb6"/>
    </style:style>
    <style:style style:name="P7" style:family="paragraph" style:parent-style-name="Heading_20_3">
      <style:text-properties officeooo:rsid="002213e3" officeooo:paragraph-rsid="002213e3"/>
    </style:style>
    <style:style style:name="P8" style:family="paragraph" style:parent-style-name="Heading_20_3">
      <style:text-properties officeooo:rsid="00341ac4" officeooo:paragraph-rsid="00341ac4"/>
    </style:style>
    <style:style style:name="P9" style:family="paragraph" style:parent-style-name="Heading_20_3">
      <style:text-properties officeooo:rsid="0040723f" officeooo:paragraph-rsid="0040723f"/>
    </style:style>
    <style:style style:name="P10" style:family="paragraph" style:parent-style-name="Heading_20_3">
      <style:text-properties officeooo:rsid="004bb9e2" officeooo:paragraph-rsid="004bb9e2"/>
    </style:style>
    <style:style style:name="P11" style:family="paragraph" style:parent-style-name="Preformatted_20_Text">
      <style:text-properties officeooo:paragraph-rsid="001468e1"/>
    </style:style>
    <style:style style:name="P12" style:family="paragraph" style:parent-style-name="Preformatted_20_Text">
      <style:text-properties officeooo:paragraph-rsid="00414b45"/>
    </style:style>
    <style:style style:name="P13" style:family="paragraph" style:parent-style-name="Preformatted_20_Text">
      <style:text-properties officeooo:paragraph-rsid="00468544"/>
    </style:style>
    <style:style style:name="P14" style:family="paragraph" style:parent-style-name="Preformatted_20_Text">
      <style:text-properties officeooo:paragraph-rsid="004bb9e2"/>
    </style:style>
    <style:style style:name="P15" style:family="paragraph" style:parent-style-name="Preformatted_20_Text">
      <style:paragraph-properties fo:margin-top="0cm" fo:margin-bottom="0.499cm" style:contextual-spacing="false"/>
      <style:text-properties officeooo:paragraph-rsid="001468e1"/>
    </style:style>
    <style:style style:name="P16" style:family="paragraph" style:parent-style-name="Preformatted_20_Text">
      <style:paragraph-properties fo:margin-left="1.251cm" fo:margin-right="0cm" fo:text-indent="0cm" style:auto-text-indent="false"/>
    </style:style>
    <style:style style:name="P17" style:family="paragraph" style:parent-style-name="Preformatted_20_Text">
      <style:paragraph-properties fo:margin-left="1.251cm" fo:margin-right="0cm" fo:text-indent="0cm" style:auto-text-indent="false"/>
      <style:text-properties officeooo:paragraph-rsid="002c66c5"/>
    </style:style>
    <style:style style:name="P18" style:family="paragraph" style:parent-style-name="Preformatted_20_Text">
      <style:paragraph-properties fo:margin-left="1.251cm" fo:margin-right="0cm" fo:text-indent="0cm" style:auto-text-indent="false"/>
      <style:text-properties officeooo:paragraph-rsid="002cb0d9"/>
    </style:style>
    <style:style style:name="P19" style:family="paragraph" style:parent-style-name="Preformatted_20_Text">
      <style:paragraph-properties fo:margin-left="1.251cm" fo:margin-right="0cm" fo:text-indent="0cm" style:auto-text-indent="false"/>
      <style:text-properties officeooo:paragraph-rsid="00414b45"/>
    </style:style>
    <style:style style:name="P20" style:family="paragraph" style:parent-style-name="Text_20_body">
      <style:paragraph-properties fo:margin-left="1.251cm" fo:margin-right="0cm" fo:text-indent="0cm" style:auto-text-indent="false"/>
      <style:text-properties officeooo:paragraph-rsid="001468e1"/>
    </style:style>
    <style:style style:name="P21" style:family="paragraph" style:parent-style-name="Preformatted_20_Text">
      <style:paragraph-properties fo:margin-left="2.501cm" fo:margin-right="0cm" fo:text-indent="0cm" style:auto-text-indent="false"/>
    </style:style>
    <style:style style:name="P22" style:family="paragraph" style:parent-style-name="Preformatted_20_Text">
      <style:paragraph-properties fo:margin-left="2.501cm" fo:margin-right="0cm" fo:text-indent="0cm" style:auto-text-indent="false"/>
      <style:text-properties officeooo:paragraph-rsid="00233592"/>
    </style:style>
    <style:style style:name="P23" style:family="paragraph" style:parent-style-name="Standard">
      <style:text-properties officeooo:paragraph-rsid="001468e1"/>
    </style:style>
    <style:style style:name="P24" style:family="paragraph" style:parent-style-name="Text_20_body">
      <style:text-properties officeooo:rsid="0011fe2d" officeooo:paragraph-rsid="001468e1"/>
    </style:style>
    <style:style style:name="P25" style:family="paragraph" style:parent-style-name="Text_20_body">
      <style:text-properties officeooo:paragraph-rsid="001468e1"/>
    </style:style>
    <style:style style:name="P26" style:family="paragraph" style:parent-style-name="Text_20_body">
      <style:text-properties officeooo:paragraph-rsid="0016248d"/>
    </style:style>
    <style:style style:name="P27" style:family="paragraph" style:parent-style-name="Text_20_body">
      <style:text-properties officeooo:rsid="001a5bb6" officeooo:paragraph-rsid="001a5bb6"/>
    </style:style>
    <style:style style:name="P28" style:family="paragraph" style:parent-style-name="Text_20_body">
      <style:text-properties officeooo:rsid="0027116b" officeooo:paragraph-rsid="0027116b"/>
    </style:style>
    <style:style style:name="P29" style:family="paragraph" style:parent-style-name="Text_20_body">
      <style:text-properties officeooo:paragraph-rsid="0028d617"/>
    </style:style>
    <style:style style:name="P30" style:family="paragraph" style:parent-style-name="Text_20_body">
      <style:text-properties officeooo:paragraph-rsid="002cb0d9"/>
    </style:style>
    <style:style style:name="P31" style:family="paragraph" style:parent-style-name="Text_20_body">
      <style:text-properties officeooo:rsid="00302814" officeooo:paragraph-rsid="00302814"/>
    </style:style>
    <style:style style:name="P32" style:family="paragraph" style:parent-style-name="Text_20_body">
      <style:text-properties fo:font-style="normal" officeooo:rsid="0011fe2d" officeooo:paragraph-rsid="001468e1" style:font-style-asian="normal" style:font-style-complex="normal"/>
    </style:style>
    <style:style style:name="P33" style:family="paragraph" style:parent-style-name="Text_20_body">
      <style:text-properties fo:font-style="normal" officeooo:rsid="002e4f50" officeooo:paragraph-rsid="002e4f50" style:font-style-asian="normal" style:font-style-complex="normal"/>
    </style:style>
    <style:style style:name="P34" style:family="paragraph" style:parent-style-name="Text_20_body">
      <style:text-properties fo:font-style="normal" officeooo:rsid="001a5bb6" officeooo:paragraph-rsid="001a5bb6" style:font-style-asian="normal" style:font-style-complex="normal"/>
    </style:style>
    <style:style style:name="P35" style:family="paragraph" style:parent-style-name="Text_20_body">
      <style:text-properties officeooo:rsid="003522ff" officeooo:paragraph-rsid="003522ff"/>
    </style:style>
    <style:style style:name="P36" style:family="paragraph" style:parent-style-name="Text_20_body">
      <style:text-properties officeooo:paragraph-rsid="002597bd"/>
    </style:style>
    <style:style style:name="P37" style:family="paragraph" style:parent-style-name="Text_20_body">
      <style:text-properties officeooo:rsid="0040723f" officeooo:paragraph-rsid="0040723f"/>
    </style:style>
    <style:style style:name="P38" style:family="paragraph" style:parent-style-name="Text_20_body">
      <style:text-properties officeooo:rsid="00414b45" officeooo:paragraph-rsid="00414b45"/>
    </style:style>
    <style:style style:name="P39" style:family="paragraph" style:parent-style-name="Text_20_body">
      <style:text-properties officeooo:paragraph-rsid="00414b45"/>
    </style:style>
    <style:style style:name="P40" style:family="paragraph" style:parent-style-name="Text_20_body">
      <style:text-properties officeooo:rsid="004bb9e2" officeooo:paragraph-rsid="004bb9e2"/>
    </style:style>
    <style:style style:name="P41" style:family="paragraph" style:parent-style-name="Quotations">
      <style:text-properties officeooo:rsid="002c36f3" officeooo:paragraph-rsid="0039f005"/>
    </style:style>
    <style:style style:name="P42" style:family="paragraph" style:parent-style-name="Quotations">
      <style:text-properties officeooo:paragraph-rsid="0039f005"/>
    </style:style>
    <style:style style:name="P43" style:family="paragraph" style:parent-style-name="Quotations">
      <style:text-properties officeooo:rsid="002b7c5e" officeooo:paragraph-rsid="003bc5ce"/>
    </style:style>
    <style:style style:name="P44" style:family="paragraph" style:parent-style-name="Quotations">
      <style:text-properties officeooo:rsid="002b7c5e" officeooo:paragraph-rsid="00414b45"/>
    </style:style>
    <style:style style:name="P45" style:family="paragraph" style:parent-style-name="Quotations">
      <style:text-properties officeooo:rsid="0040723f" officeooo:paragraph-rsid="0040723f"/>
    </style:style>
    <style:style style:name="P46" style:family="paragraph" style:parent-style-name="Quotations">
      <style:text-properties officeooo:rsid="00414b45" officeooo:paragraph-rsid="00414b45"/>
    </style:style>
    <style:style style:name="P47" style:family="paragraph" style:parent-style-name="Quotations">
      <style:text-properties officeooo:rsid="004d2de3" officeooo:paragraph-rsid="004d76f9"/>
    </style:style>
    <style:style style:name="P48" style:family="paragraph" style:parent-style-name="Quotations">
      <style:text-properties officeooo:rsid="004d2de3" officeooo:paragraph-rsid="004e2c46"/>
    </style:style>
    <style:style style:name="P49" style:family="paragraph" style:parent-style-name="Quotations">
      <style:text-properties officeooo:paragraph-rsid="004d76f9"/>
    </style:style>
    <style:style style:name="P50" style:family="paragraph" style:parent-style-name="Quotations">
      <style:text-properties officeooo:paragraph-rsid="004eb486"/>
    </style:style>
    <style:style style:name="P51" style:family="paragraph" style:parent-style-name="Quotations">
      <style:text-properties officeooo:rsid="004eb486" officeooo:paragraph-rsid="004eb486"/>
    </style:style>
    <style:style style:name="P52" style:family="paragraph" style:parent-style-name="Heading_20_3">
      <style:text-properties officeooo:paragraph-rsid="0053e71c"/>
    </style:style>
    <style:style style:name="P53" style:family="paragraph" style:parent-style-name="Quotations">
      <style:text-properties officeooo:paragraph-rsid="0040723f"/>
    </style:style>
    <style:style style:name="P54" style:family="paragraph" style:parent-style-name="Heading_20_2">
      <style:text-properties officeooo:paragraph-rsid="004637b2"/>
    </style:style>
    <style:style style:name="P55" style:family="paragraph" style:parent-style-name="Text_20_body" style:list-style-name="L1">
      <style:text-properties officeooo:rsid="004bb9e2" officeooo:paragraph-rsid="004bb9e2"/>
    </style:style>
    <style:style style:name="P56" style:family="paragraph" style:parent-style-name="Text_20_body" style:list-style-name="L2">
      <style:text-properties officeooo:rsid="003522ff" officeooo:paragraph-rsid="003522ff"/>
    </style:style>
    <style:style style:name="P57" style:family="paragraph" style:parent-style-name="Text_20_body" style:list-style-name="L2">
      <style:text-properties officeooo:rsid="00365a26" officeooo:paragraph-rsid="00365a26"/>
    </style:style>
    <style:style style:name="P58" style:family="paragraph" style:parent-style-name="Text_20_body" style:list-style-name="L2">
      <style:text-properties style:font-name="Liberation Serif" officeooo:rsid="0038bcd0" officeooo:paragraph-rsid="0038bcd0"/>
    </style:style>
    <style:style style:name="P59" style:family="paragraph" style:parent-style-name="Text_20_body" style:list-style-name="L2">
      <style:text-properties style:font-name="Liberation Serif" officeooo:rsid="003f78a9" officeooo:paragraph-rsid="003f78a9"/>
    </style:style>
    <style:style style:name="P60" style:family="paragraph" style:parent-style-name="Text_20_body" style:list-style-name="L2">
      <style:text-properties style:font-name="Liberation Serif" officeooo:rsid="0040723f" officeooo:paragraph-rsid="0040723f"/>
    </style:style>
    <style:style style:name="P61" style:family="paragraph" style:parent-style-name="Text_20_body" style:list-style-name="L2">
      <style:text-properties style:font-name="Liberation Serif" officeooo:rsid="004637b2" officeooo:paragraph-rsid="004637b2"/>
    </style:style>
    <style:style style:name="P62" style:family="paragraph" style:parent-style-name="Text_20_body" style:list-style-name="L3">
      <style:text-properties officeooo:rsid="001468e1" officeooo:paragraph-rsid="001468e1"/>
    </style:style>
    <style:style style:name="P63" style:family="paragraph" style:parent-style-name="Text_20_body" style:list-style-name="L3">
      <style:text-properties officeooo:rsid="00278b3c" officeooo:paragraph-rsid="00278b3c"/>
    </style:style>
    <style:style style:name="P64" style:family="paragraph" style:parent-style-name="Text_20_body" style:list-style-name="L4">
      <style:text-properties officeooo:paragraph-rsid="001468e1"/>
    </style:style>
    <style:style style:name="P65" style:family="paragraph" style:parent-style-name="Text_20_body" style:list-style-name="L5">
      <style:text-properties officeooo:paragraph-rsid="001468e1"/>
    </style:style>
    <style:style style:name="P66" style:family="paragraph" style:parent-style-name="Text_20_body" style:list-style-name="L6">
      <style:text-properties officeooo:paragraph-rsid="001468e1"/>
    </style:style>
    <style:style style:name="P67" style:family="paragraph" style:parent-style-name="Text_20_body" style:list-style-name="L7">
      <style:text-properties officeooo:paragraph-rsid="001468e1"/>
    </style:style>
    <style:style style:name="P68" style:family="paragraph" style:parent-style-name="Text_20_body" style:list-style-name="L7">
      <style:text-properties officeooo:rsid="0024abc6" officeooo:paragraph-rsid="0024abc6"/>
    </style:style>
    <style:style style:name="P69" style:family="paragraph" style:parent-style-name="Text_20_body" style:list-style-name="L1">
      <style:text-properties style:font-name="Liberation Serif" officeooo:rsid="005291a5" officeooo:paragraph-rsid="005291a5"/>
    </style:style>
    <style:style style:name="T1" style:family="text">
      <style:text-properties fo:language="en" fo:country="GB"/>
    </style:style>
    <style:style style:name="T2" style:family="text">
      <style:text-properties fo:language="en" fo:country="GB" officeooo:rsid="001468e1"/>
    </style:style>
    <style:style style:name="T3" style:family="text">
      <style:text-properties fo:language="en" fo:country="GB" officeooo:rsid="0031f36e"/>
    </style:style>
    <style:style style:name="T4" style:family="text">
      <style:text-properties style:font-name="Liberation Mono"/>
    </style:style>
    <style:style style:name="T5" style:family="text">
      <style:text-properties style:font-name="Liberation Mono" fo:font-size="10pt" fo:language="en" fo:country="GB" officeooo:rsid="000ddac1" style:font-name-asian="Liberation Mono" style:font-size-asian="10pt" style:font-name-complex="Liberation Mono" style:font-size-complex="10pt"/>
    </style:style>
    <style:style style:name="T6" style:family="text">
      <style:text-properties style:font-name="Liberation Mono" fo:font-size="10pt" fo:language="en" fo:country="GB" officeooo:rsid="001468e1" style:font-name-asian="Liberation Mono" style:font-size-asian="10pt" style:font-name-complex="Liberation Mono" style:font-size-complex="10pt"/>
    </style:style>
    <style:style style:name="T7" style:family="text">
      <style:text-properties style:font-name="Liberation Mono" fo:font-size="10pt" fo:language="en" fo:country="GB" officeooo:rsid="00336fe8" style:font-name-asian="Liberation Mono" style:font-size-asian="10pt" style:font-name-complex="Liberation Mono" style:font-size-complex="10pt"/>
    </style:style>
    <style:style style:name="T8" style:family="text">
      <style:text-properties style:font-name="Liberation Mono" fo:font-size="10pt" fo:language="en" fo:country="GB" officeooo:rsid="00337177" style:font-name-asian="Liberation Mono" style:font-size-asian="10pt" style:font-name-complex="Liberation Mono" style:font-size-complex="10pt"/>
    </style:style>
    <style:style style:name="T9" style:family="text">
      <style:text-properties style:font-name="Liberation Mono" fo:font-size="10pt" fo:language="en" fo:country="GB" officeooo:rsid="00463935" style:font-name-asian="Liberation Mono" style:font-size-asian="10pt" style:font-name-complex="Liberation Mono" style:font-size-complex="10pt"/>
    </style:style>
    <style:style style:name="T10" style:family="text">
      <style:text-properties style:font-name="Liberation Mono" fo:font-size="10pt" fo:language="en" fo:country="GB" officeooo:rsid="00468544" style:font-name-asian="Liberation Mono" style:font-size-asian="10pt" style:font-name-complex="Liberation Mono" style:font-size-complex="10pt"/>
    </style:style>
    <style:style style:name="T11" style:family="text">
      <style:text-properties style:font-name="Liberation Mono" fo:font-size="10pt" fo:language="en" fo:country="GB" officeooo:rsid="004bb9e2" style:font-name-asian="Liberation Mono" style:font-size-asian="10pt" style:font-name-complex="Liberation Mono" style:font-size-complex="10pt"/>
    </style:style>
    <style:style style:name="T12" style:family="text">
      <style:text-properties style:font-name="Liberation Mono" fo:font-size="10pt" fo:language="en" fo:country="GB" officeooo:rsid="00528ec0" style:font-name-asian="Liberation Mono" style:font-size-asian="10pt" style:font-name-complex="Liberation Mono" style:font-size-complex="10pt"/>
    </style:style>
    <style:style style:name="T13" style:family="text">
      <style:text-properties style:font-name="Liberation Mono" fo:font-size="10pt" fo:font-style="italic" officeooo:rsid="002cb0d9" style:font-name-asian="Liberation Mono" style:font-size-asian="10pt" style:font-style-asian="italic" style:font-name-complex="Liberation Mono" style:font-size-complex="10pt" style:font-style-complex="italic"/>
    </style:style>
    <style:style style:name="T14" style:family="text">
      <style:text-properties style:font-name="Liberation Mono" fo:font-size="10pt" fo:font-style="italic" officeooo:rsid="00414b45" style:font-name-asian="Liberation Mono" style:font-size-asian="10pt" style:font-style-asian="italic" style:font-name-complex="Liberation Mono" style:font-size-complex="10pt" style:font-style-complex="italic"/>
    </style:style>
    <style:style style:name="T15" style:family="text">
      <style:text-properties style:font-name="Liberation Mono" fo:font-style="normal" style:font-style-asian="normal" style:font-style-complex="normal"/>
    </style:style>
    <style:style style:name="T16" style:family="text">
      <style:text-properties style:font-name="Liberation Mono" fo:font-style="normal" officeooo:rsid="001a5bb6" style:font-style-asian="normal" style:font-style-complex="normal"/>
    </style:style>
    <style:style style:name="T17" style:family="text">
      <style:text-properties style:font-name="Liberation Mono" fo:font-style="normal" officeooo:rsid="001b9b4e" style:font-style-asian="normal" style:font-style-complex="normal"/>
    </style:style>
    <style:style style:name="T18" style:family="text">
      <style:text-properties style:font-name="Liberation Mono" officeooo:rsid="001d940d"/>
    </style:style>
    <style:style style:name="T19" style:family="text">
      <style:text-properties style:font-name="Liberation Mono" officeooo:rsid="002aaa62"/>
    </style:style>
    <style:style style:name="T20" style:family="text">
      <style:text-properties style:font-name="Liberation Mono" officeooo:rsid="002b7c5e"/>
    </style:style>
    <style:style style:name="T21" style:family="text">
      <style:text-properties style:font-name="Liberation Mono" officeooo:rsid="002cb0d9"/>
    </style:style>
    <style:style style:name="T22" style:family="text">
      <style:text-properties style:font-name="Liberation Mono" officeooo:rsid="002e4f50"/>
    </style:style>
    <style:style style:name="T23" style:family="text">
      <style:text-properties style:font-name="Liberation Mono" fo:font-style="italic" officeooo:rsid="002e4f50" style:font-style-asian="italic" style:font-style-complex="italic"/>
    </style:style>
    <style:style style:name="T24" style:family="text">
      <style:text-properties style:font-name="Liberation Mono" officeooo:rsid="00365a26"/>
    </style:style>
    <style:style style:name="T25" style:family="text">
      <style:text-properties style:font-name="Liberation Mono" officeooo:rsid="00414b45"/>
    </style:style>
    <style:style style:name="T26" style:family="text">
      <style:text-properties style:font-name="Liberation Mono" officeooo:rsid="004bfd65"/>
    </style:style>
    <style:style style:name="T27" style:family="text">
      <style:text-properties style:font-name="Liberation Mono" officeooo:rsid="0040723f"/>
    </style:style>
    <style:style style:name="T28" style:family="text">
      <style:text-properties style:font-name="Liberation Serif"/>
    </style:style>
    <style:style style:name="T29" style:family="text">
      <style:text-properties style:font-name="Liberation Serif" fo:font-size="14pt" fo:font-weight="bold" officeooo:rsid="001e460a" style:font-name-asian="DejaVu Sans" style:font-size-asian="14pt" style:font-weight-asian="bold" style:font-name-complex="DejaVu Sans" style:font-size-complex="14pt" style:font-weight-complex="bold"/>
    </style:style>
    <style:style style:name="T30" style:family="text">
      <style:text-properties style:font-name="Liberation Serif" fo:font-size="14pt" fo:font-weight="bold" officeooo:rsid="001468e1" style:font-name-asian="DejaVu Sans" style:font-size-asian="14pt" style:font-weight-asian="bold" style:font-name-complex="DejaVu Sans" style:font-size-complex="14pt" style:font-weight-complex="bold"/>
    </style:style>
    <style:style style:name="T31" style:family="text">
      <style:text-properties style:font-name="Liberation Serif" fo:font-size="14pt" fo:font-weight="bold" officeooo:rsid="00468544" style:font-name-asian="DejaVu Sans" style:font-size-asian="14pt" style:font-weight-asian="bold" style:font-name-complex="DejaVu Sans" style:font-size-complex="14pt" style:font-weight-complex="bold"/>
    </style:style>
    <style:style style:name="T32" style:family="text">
      <style:text-properties style:font-name="Liberation Serif" fo:font-size="14pt" fo:font-weight="bold" officeooo:rsid="00528ec0" style:font-name-asian="DejaVu Sans" style:font-size-asian="14pt" style:font-weight-asian="bold" style:font-name-complex="DejaVu Sans" style:font-size-complex="14pt" style:font-weight-complex="bold"/>
    </style:style>
    <style:style style:name="T33" style:family="text">
      <style:text-properties style:font-name="Liberation Serif" fo:font-size="14pt" fo:font-weight="bold" officeooo:rsid="0053e71c" style:font-name-asian="DejaVu Sans" style:font-size-asian="14pt" style:font-weight-asian="bold" style:font-name-complex="DejaVu Sans" style:font-size-complex="14pt" style:font-weight-complex="bold"/>
    </style:style>
    <style:style style:name="T34" style:family="text">
      <style:text-properties style:font-name="Liberation Serif" fo:font-style="normal" officeooo:rsid="001a5bb6" style:font-style-asian="normal" style:font-style-complex="normal"/>
    </style:style>
    <style:style style:name="T35" style:family="text">
      <style:text-properties style:font-name="Liberation Serif" officeooo:rsid="002c36f3"/>
    </style:style>
    <style:style style:name="T36" style:family="text">
      <style:text-properties style:font-name="Liberation Serif" fo:font-size="24pt" fo:font-weight="bold" officeooo:rsid="004bb9e2" style:font-name-asian="DejaVu Sans" style:font-size-asian="24pt" style:font-weight-asian="bold" style:font-name-complex="DejaVu Sans" style:font-size-complex="24pt" style:font-weight-complex="bold"/>
    </style:style>
    <style:style style:name="T37" style:family="text">
      <style:text-properties style:font-name="Liberation Serif" officeooo:rsid="002b7c5e"/>
    </style:style>
    <style:style style:name="T38" style:family="text">
      <style:text-properties style:font-name="Liberation Serif" officeooo:rsid="00414b45"/>
    </style:style>
    <style:style style:name="T39" style:family="text">
      <style:text-properties style:font-name="Liberation Serif" officeooo:rsid="0040723f"/>
    </style:style>
    <style:style style:name="T40" style:family="text">
      <style:text-properties fo:font-style="italic" style:font-style-asian="italic" style:font-style-complex="italic"/>
    </style:style>
    <style:style style:name="T41" style:family="text">
      <style:text-properties fo:font-style="italic" officeooo:rsid="001a5bb6" style:font-style-asian="italic" style:font-style-complex="italic"/>
    </style:style>
    <style:style style:name="T42" style:family="text">
      <style:text-properties fo:font-style="italic" officeooo:rsid="001d940d" style:font-style-asian="italic" style:font-style-complex="italic"/>
    </style:style>
    <style:style style:name="T43" style:family="text">
      <style:text-properties fo:font-style="italic" officeooo:rsid="002b7c5e" style:font-style-asian="italic" style:font-style-complex="italic"/>
    </style:style>
    <style:style style:name="T44" style:family="text">
      <style:text-properties fo:font-style="italic" officeooo:rsid="002c66c5" style:font-style-asian="italic" style:font-style-complex="italic"/>
    </style:style>
    <style:style style:name="T45" style:family="text">
      <style:text-properties fo:font-style="italic" officeooo:rsid="002e4f50"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normal" style:font-style-asian="normal" style:font-style-complex="normal"/>
    </style:style>
    <style:style style:name="T48" style:family="text">
      <style:text-properties fo:font-style="normal" officeooo:rsid="0011fe2d" style:font-style-asian="normal" style:font-style-complex="normal"/>
    </style:style>
    <style:style style:name="T49" style:family="text">
      <style:text-properties fo:font-style="normal" officeooo:rsid="0017e8a2" style:font-style-asian="normal" style:font-style-complex="normal"/>
    </style:style>
    <style:style style:name="T50" style:family="text">
      <style:text-properties fo:font-style="normal" officeooo:rsid="001a5bb6" style:font-style-asian="normal" style:font-style-complex="normal"/>
    </style:style>
    <style:style style:name="T51" style:family="text">
      <style:text-properties fo:font-style="normal" officeooo:rsid="001b9b4e"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officeooo:rsid="001c1d6a"/>
    </style:style>
    <style:style style:name="T55" style:family="text">
      <style:text-properties officeooo:rsid="0016248d"/>
    </style:style>
    <style:style style:name="T56" style:family="text">
      <style:text-properties officeooo:rsid="001d940d"/>
    </style:style>
    <style:style style:name="T57" style:family="text">
      <style:text-properties officeooo:rsid="001f183a"/>
    </style:style>
    <style:style style:name="T58" style:family="text">
      <style:text-properties officeooo:rsid="00201d49"/>
    </style:style>
    <style:style style:name="T59" style:family="text">
      <style:text-properties fo:font-weight="bold" style:font-weight-asian="bold" style:font-weight-complex="bold"/>
    </style:style>
    <style:style style:name="T60" style:family="text">
      <style:text-properties officeooo:rsid="00233592"/>
    </style:style>
    <style:style style:name="T61" style:family="text">
      <style:text-properties officeooo:rsid="00278b3c"/>
    </style:style>
    <style:style style:name="T62" style:family="text">
      <style:text-properties officeooo:rsid="0028d617"/>
    </style:style>
    <style:style style:name="T63" style:family="text">
      <style:text-properties officeooo:rsid="002aaa62"/>
    </style:style>
    <style:style style:name="T64" style:family="text">
      <style:text-properties officeooo:rsid="002b7c5e"/>
    </style:style>
    <style:style style:name="T65" style:family="text">
      <style:text-properties officeooo:rsid="002c36f3"/>
    </style:style>
    <style:style style:name="T66" style:family="text">
      <style:text-properties officeooo:rsid="002cb0d9"/>
    </style:style>
    <style:style style:name="T67" style:family="text">
      <style:text-properties officeooo:rsid="002d3408"/>
    </style:style>
    <style:style style:name="T68" style:family="text">
      <style:text-properties officeooo:rsid="002e009f"/>
    </style:style>
    <style:style style:name="T69" style:family="text">
      <style:text-properties officeooo:rsid="002e4f50"/>
    </style:style>
    <style:style style:name="T70" style:family="text">
      <style:text-properties officeooo:rsid="0031f36e"/>
    </style:style>
    <style:style style:name="T71" style:family="text">
      <style:text-properties officeooo:rsid="00365a26"/>
    </style:style>
    <style:style style:name="T72" style:family="text">
      <style:text-properties officeooo:rsid="00381b37"/>
    </style:style>
    <style:style style:name="T73" style:family="text">
      <style:text-properties officeooo:rsid="0038d5df"/>
    </style:style>
    <style:style style:name="T74" style:family="text">
      <style:text-properties officeooo:rsid="0039f005"/>
    </style:style>
    <style:style style:name="T75" style:family="text">
      <style:text-properties officeooo:rsid="003ae1bf"/>
    </style:style>
    <style:style style:name="T76" style:family="text">
      <style:text-properties officeooo:rsid="0040723f"/>
    </style:style>
    <style:style style:name="T77" style:family="text">
      <style:text-properties officeooo:rsid="00414b45"/>
    </style:style>
    <style:style style:name="T78" style:family="text">
      <style:text-properties officeooo:rsid="00425c13"/>
    </style:style>
    <style:style style:name="T79" style:family="text">
      <style:text-properties officeooo:rsid="004bb9e2"/>
    </style:style>
    <style:style style:name="T80" style:family="text">
      <style:text-properties officeooo:rsid="004bfd65"/>
    </style:style>
    <style:style style:name="T81" style:family="text">
      <style:text-properties style:text-position="super 58%" officeooo:rsid="004d2de3"/>
    </style:style>
    <style:style style:name="T82" style:family="text">
      <style:text-properties style:text-position="super 58%" officeooo:rsid="004eb486"/>
    </style:style>
    <style:style style:name="T83" style:family="text">
      <style:text-properties officeooo:rsid="004d76f9"/>
    </style:style>
    <style:style style:name="T84" style:family="text">
      <style:text-properties officeooo:rsid="004e2c46"/>
    </style:style>
    <style:style style:name="T85" style:family="text">
      <style:text-properties officeooo:rsid="004eb486"/>
    </style:style>
    <style:style style:name="T86" style:family="text">
      <style:text-properties fo:font-size="12pt" style:font-size-asian="12pt" style:font-size-complex="12pt"/>
    </style:style>
    <style:style style:name="T87" style:family="text">
      <style:text-properties officeooo:rsid="004637b2"/>
    </style:style>
    <style:style style:name="T88" style:family="text">
      <style:text-properties officeooo:rsid="0053e71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Source_20_Text"><text:span text:style-name="T1">Proposal for C23 <text:s/></text:span></text:span></text:p>
      <text:p text:style-name="P11"><text:bookmark text:name="LC2"/><text:span text:style-name="Source_20_Text"><text:span text:style-name="T1">WG14 </text:span></text:span><text:span text:style-name="Source_20_Text"><text:span text:style-name="T12">3020</text:span></text:span><text:span text:style-name="Source_20_Text"><text:span text:style-name="T1"> <text:s/></text:span></text:span></text:p>
      <text:p text:style-name="P11"><text:bookmark text:name="LC3"/></text:p>
      <text:p text:style-name="P11"><text:bookmark text:name="LC4"/><text:span text:style-name="Source_20_Text"><text:span text:style-name="T1">Title: <text:s text:c="14"/>Qualifier-preserving standard library functions, </text:span></text:span><text:span text:style-name="Source_20_Text"><text:span text:style-name="T3">v</text:span></text:span><text:span text:style-name="Source_20_Text"><text:span text:style-name="T11">4</text:span></text:span><text:span text:style-name="Source_20_Text"><text:span text:style-name="T1"> <text:s/></text:span></text:span></text:p>
      <text:p text:style-name="P11"><text:bookmark text:name="LC5"/><text:span text:style-name="Source_20_Text"><text:span text:style-name="T1">Author, affiliation: Alex Gilding, Perforce <text:s/></text:span></text:span></text:p>
      <text:p text:style-name="P11"><text:bookmark text:name="LC6"/><text:span text:style-name="Source_20_Text"><text:span text:style-name="T1">Date: <text:s text:c="15"/>202</text:span></text:span><text:span text:style-name="Source_20_Text"><text:span text:style-name="T5">2</text:span></text:span><text:span text:style-name="Source_20_Text"><text:span text:style-name="T1">-</text:span></text:span><text:span text:style-name="Source_20_Text"><text:span text:style-name="T5">0</text:span></text:span><text:span text:style-name="Source_20_Text"><text:span text:style-name="T7">6</text:span></text:span><text:span text:style-name="Source_20_Text"><text:span text:style-name="T1">-</text:span></text:span><text:span text:style-name="Source_20_Text"><text:span text:style-name="T6">1</text:span></text:span><text:span text:style-name="Source_20_Text"><text:span text:style-name="T7">3</text:span></text:span><text:span text:style-name="Source_20_Text"><text:span text:style-name="T1"> <text:s/></text:span></text:span></text:p>
      <text:p text:style-name="P11"><text:bookmark text:name="LC7"/><text:span text:style-name="Source_20_Text"><text:span text:style-name="T1">Proposal category: <text:s text:c="2"/>Feature enhancement <text:s/></text:span></text:span></text:p>
      <text:p text:style-name="P15"><text:bookmark text:name="LC8"/><text:span text:style-name="Source_20_Text"><text:span text:style-name="T1">Target audience: <text:s text:c="4"/></text:span></text:span><text:span text:style-name="Source_20_Text"><text:span text:style-name="T2">Library</text:span></text:span><text:span text:style-name="Source_20_Text"><text:span text:style-name="T1"> developers, </text:span></text:span><text:span text:style-name="Source_20_Text"><text:span text:style-name="T6">library users</text:span></text:span><text:span text:style-name="Source_20_Text"><text:span text:style-name="T1"> <text:s/></text:span></text:span></text:p>
      <text:h text:style-name="P3" text:outline-level="2"><text:bookmark text:name="abstract"/>Abstract</text:h>
      <text:p text:style-name="P25">Proposal to improve type safety of existing C Standard library functions by preventing the ability to silently remove <text:span text:style-name="T4">const</text:span>-qualification without a cast. This introduces a suggested new notation for qualifier-generic functions, and aims to slightly reduce the difference between the C and C++ Standard libraries.</text:p>
      <text:h text:style-name="P1" text:outline-level="1">Qualifier-preserving standard library functions, <text:span text:style-name="T70">v</text:span><text:span text:style-name="T36">4</text:span></text:h>
      <text:p text:style-name="P11"><text:bookmark text:name="LC11"/><text:span text:style-name="Source_20_Text"><text:span text:style-name="T1">Reply-to: <text:s text:c="11"/>Alex Gilding (agilding@perforce.com) <text:s/></text:span></text:span></text:p>
      <text:p text:style-name="P13"><text:bookmark text:name="LC21"/><text:span text:style-name="Source_20_Text"><text:span text:style-name="T1">Document No: <text:s text:c="8"/></text:span></text:span><text:span text:style-name="Source_20_Text"><text:span text:style-name="T10">N</text:span></text:span><text:span text:style-name="Source_20_Text"><text:span text:style-name="T12">3020</text:span></text:span><text:span text:style-name="Source_20_Text"><text:span text:style-name="T1"> <text:s/></text:span></text:span></text:p>
      <text:p text:style-name="P14"><text:bookmark text:name="LC31"/><text:span text:style-name="Source_20_Text"><text:span text:style-name="T1">Revises Document No: </text:span></text:span><text:span text:style-name="Source_20_Text"><text:span text:style-name="T10">N</text:span></text:span><text:span text:style-name="Source_20_Text"><text:span text:style-name="T7">3</text:span></text:span><text:span text:style-name="Source_20_Text"><text:span text:style-name="T9">012</text:span></text:span><text:span text:style-name="Source_20_Text"><text:span text:style-name="T1"> <text:s/></text:span></text:span></text:p>
      <text:p text:style-name="P15"><text:bookmark text:name="LC41"/><text:span text:style-name="Source_20_Text"><text:span text:style-name="T1">Date: <text:s text:c="15"/>202</text:span></text:span><text:span text:style-name="Source_20_Text"><text:span text:style-name="T5">2</text:span></text:span><text:span text:style-name="Source_20_Text"><text:span text:style-name="T1">-</text:span></text:span><text:span text:style-name="Source_20_Text"><text:span text:style-name="T5">0</text:span></text:span><text:span text:style-name="Source_20_Text"><text:span text:style-name="T8">6</text:span></text:span><text:span text:style-name="Source_20_Text"><text:span text:style-name="T1">-</text:span></text:span><text:span text:style-name="Source_20_Text"><text:span text:style-name="T11">28</text:span></text:span><text:span text:style-name="Source_20_Text"><text:span text:style-name="T1"> <text:s/></text:span></text:span></text:p>
      <text:h text:style-name="P3" text:outline-level="2"><text:bookmark text:name="summary-of-changes"/>Summary of Changes</text:h>
      <text:h text:style-name="P10" text:outline-level="3">N<text:span text:style-name="T32">3020</text:span></text:h>
      <text:list xml:id="list4119005631" text:style-name="L1">
        <text:list-item>
          <text:p text:style-name="P55">Fix explicitness of null pointer constant, considering C++, <text:span text:style-name="T80">ignore </text:span><text:span text:style-name="T26">nullptr</text:span></text:p>
        </text:list-item>
        <text:list-item>
          <text:p text:style-name="P69">Remove optional change 2, not how we want to proceed with polymorphism</text:p>
        </text:list-item>
      </text:list>
      <text:h text:style-name="P8" text:outline-level="3">N3<text:span text:style-name="T31">012</text:span></text:h>
      <text:list xml:id="list4012192781" text:style-name="L2">
        <text:list-item>
          <text:p text:style-name="P56">Fix example implementation, consider (type of) null pointer constant</text:p>
        </text:list-item>
        <text:list-item>
          <text:p text:style-name="P57">Remove mention of <text:span text:style-name="T4">_Atomic</text:span>, do mention <text:span text:style-name="T4">restrict</text:span></text:p>
        </text:list-item>
        <text:list-item>
          <text:p text:style-name="P58">Consider ordering of <text:span text:style-name="T4">bsearch</text:span> argument conversions</text:p>
        </text:list-item>
        <text:list-item>
          <text:p text:style-name="P59">Explicitly allow suppression to access the old external declarations</text:p>
        </text:list-item>
        <text:list-item>
          <text:p text:style-name="P60">Add an option to make macro suppression for these functions obsolescent</text:p>
        </text:list-item>
        <text:list-item>
          <text:p text:style-name="P61">Add an option to retain the object type for <text:span text:style-name="T4">bsearch</text:span></text:p>
        </text:list-item>
      </text:list>
      <text:h text:style-name="P4" text:outline-level="3">N<text:span text:style-name="T29">29</text:span><text:span text:style-name="T30">73</text:span></text:h>
      <text:list xml:id="list124549924" text:style-name="L3">
        <text:list-item>
          <text:p text:style-name="P62">Simplify notation to avoid possible ambiguity of nil-expansion</text:p>
        </text:list-item>
        <text:list-item>
          <text:p text:style-name="P62">Ensure external pointer type is specified <text:span text:style-name="T61">and underlying functions are addressable</text:span></text:p>
        </text:list-item>
        <text:list-item>
          <text:p text:style-name="P63">Improve example implementation to preserve object type</text:p>
        </text:list-item>
        <text:list-item>
          <text:p text:style-name="P62">Clarify which qualifiers are supported/abstracted <text:span text:style-name="T68">explicitly</text:span></text:p>
        </text:list-item>
      </text:list>
      <text:h text:style-name="P5" text:outline-level="3"><text:bookmark text:name="n2855"/>N2<text:span text:style-name="T30">603</text:span></text:h>
      <text:list xml:id="list1089465474" text:style-name="L4">
        <text:list-item>
          <text:p text:style-name="P64">original proposal </text:p>
        </text:list-item>
      </text:list>
      <text:h text:style-name="P3" text:outline-level="2"><text:bookmark text:name="introduction"/>Introduction</text:h>
      <text:p text:style-name="P25">The C Standard Library contains twelve "qualifier-losing" search functions:</text:p>
      <text:p text:style-name="Preformatted_20_Text">bsearch</text:p>
      <text:p text:style-name="Preformatted_20_Text">bsearch_s</text:p>
      <text:p text:style-name="Preformatted_20_Text">memchr</text:p>
      <text:p text:style-name="Preformatted_20_Text">strchr</text:p>
      <text:p text:style-name="Preformatted_20_Text">strpbrk</text:p>
      <text:p text:style-name="Preformatted_20_Text">strrchr</text:p>
      <text:p text:style-name="Preformatted_20_Text">strstr</text:p>
      <text:p text:style-name="Preformatted_20_Text"><text:soft-page-break/>wcschr</text:p>
      <text:p text:style-name="Preformatted_20_Text">wcspbrk</text:p>
      <text:p text:style-name="Preformatted_20_Text">wcsrchr</text:p>
      <text:p text:style-name="Preformatted_20_Text">wcsstr</text:p>
      <text:p text:style-name="Preformatted_20_Text">wmemchr</text:p>
      <text:p text:style-name="Preformatted_20_Text"/>
      <text:p text:style-name="P26">These functions accept a <text:span text:style-name="T4">const</text:span>-qualified pointer to a buffer to be searched, but return the pointer to the found element without <text:span text:style-name="T4">const</text:span>-qualification.</text:p>
      <text:p text:style-name="P26">This proposal suggests that the library should specify that these functions return a found result element with the same qualification as the input buffer, as provided by the user. This avoids the risk of inadvertently "casting away" constness on an input buffer when this is not desired.</text:p>
      <text:p text:style-name="P25">This proposal is extracted from n2522, "a common C/C++ core specification", by Jens Gustedt.</text:p>
      <text:h text:style-name="P3" text:outline-level="2"><text:bookmark text:name="rationale"/>Rationale</text:h>
      <text:p text:style-name="P25">The existing APIs were designed and added to the library before C11 introduced the ability to define generic and overloaded functions. Therefore the existing signatures are by-design, so that they can be used to search both <text:span text:style-name="T4">const</text:span> and mutable buffers - since <text:span text:style-name="T4">const</text:span>-qualification can be added implicitly, the input parameter is able to accept both kinds of buffer. If the functions are used correctly, the missing qualification on the return will be restored in the same way on assignment to an appropriately-qualified result pointer. This makes the search functions provide a primitive form of genericity.</text:p>
      <text:p text:style-name="P26">Unfortunately this relies on the user to manually check that the variable for the returned pointer to the found element is of the correct type. If the user searches a <text:span text:style-name="T4">const</text:span>-qualified buffer but assigns the result to a pointer to a mutable object, the API has no way to directly communicate that this is a type error. An implementation may be able to warn anyway but this would require a hardcoded knowledge of the library functions and their contracts beyond what is communicated in-language.</text:p>
      <text:p text:style-name="P26">For example:</text:p>
      <text:p text:style-name="P16">wchar_t const buf[] = L"Hwæt! wē Gār-Dena in gēar-dagum þēod-cyningaþrym</text:p>
      <text:p text:style-name="P16">gefrūnon";</text:p>
      <text:p text:style-name="P16">wchar_t const * thr = wcschr (buf, L'þ'); // const implicitly restored</text:p>
      <text:p text:style-name="P16">wchar_t * ans = wcschr (buf, L'æ'); // currently assignment not wrong;</text:p>
      <text:p text:style-name="P16">const lost</text:p>
      <text:p text:style-name="P16">// ...</text:p>
      <text:p text:style-name="P16">*thr = L't'; // constraint violation</text:p>
      <text:p text:style-name="P16">*ans = L'a'; // currently no error, runtime undefined behaviour</text:p>
      <text:p text:style-name="Preformatted_20_Text"/>
      <text:p text:style-name="P25">The <text:span text:style-name="T4">const</text:span>-loss is purely an API-accommodation for the fact that in C99 and earlier revisions, it was not <text:span text:style-name="T55">obvious how </text:span>to express qualifier-generic functions in-language. There is no valid use case for this lossiness (intentionally passing a <text:span text:style-name="T4">const</text:span>-qualified buffer and receiving the element without restoring the qualification), because casting away <text:span text:style-name="T4">const</text:span>-qualification explicitly is already a feature of the language. If the user really needs a non-<text:span text:style-name="T4">const</text:span>-qualified pointer into a <text:span text:style-name="T4">const</text:span><text:span text:style-name="T28">-</text:span>qualified array, they can still communicate that this is an intentional decision, by casting the <text:span text:style-name="T4">const</text:span>-qualification from the pointer to the buffer before passing it as an input argument to the search API.</text:p>
      <text:p text:style-name="P16">wchar_t * ans = wcschr ((wchart *)buf, L'æ'); // explicitly strip constness</text:p>
      <text:p text:style-name="Preformatted_20_Text"/>
      <text:p text:style-name="P25"><text:soft-page-break/>Unlike the <text:span text:style-name="T4">strerror</text:span> function and others discussed in n2526, there is no scope for a library implementation to provide additional mutability features, because the returned pointer is into a buffer controlled and provided completely by the user, not to some piece of library-internal state which may have other uses, or access points elsewhere in an extended API.</text:p>
      <text:p text:style-name="P25">This vulnerability has already been fixed in C++, which is able to resolve an overloaded version of each function with the appropriate returned pointer type, based on the <text:span text:style-name="T4">const</text:span>-qualification of the buffer passed as the argument. This therefore reduces the footprint of differences between the two langauges' Standard libraries.</text:p>
      <text:h text:style-name="P3" text:outline-level="2"><text:bookmark text:name="proposal"/>Proposal</text:h>
      <text:p text:style-name="P32">We propose that each of these 12 functions be defined as a generic function, parameterized so that the qualification of the buffer pointed to by the first argument is the same as the qualification of the pointed to the found element.</text:p>
      <text:p text:style-name="P32">This can be expressed with three choices of notation. Their relative merits, or lack thereof, may provide input to a related discussion about standardizing C's notation for generic library functions.</text:p>
      <text:p text:style-name="P28"><text:span text:style-name="T47">In all three cases the notation is proposed for the API description in the Standard only, and does </text:span><text:span text:style-name="T53">not</text:span><text:span text:style-name="T52"> propose any new syntax for use in C code itself. (This was a point of confusion in the first round of discussion: the notation is not proposed C syntax.)</text:span></text:p>
      <text:p text:style-name="P31"><text:span text:style-name="T52">The concrete type of all functions is fully specified and therefore this proposal leaves the greater definition of </text:span><text:span text:style-name="T46">generic function</text:span><text:span text:style-name="T52"> unaddressed, because it is not needed. In the case of every listed function a concretely-typed external declaration is fully specified, and the new signature descriptions only impose any constraints upon the functions’ immediate uses. Unlike in the previous version of the proposal, there is no ambiguity about name redeclaration or the type of pointers to the underlying functions; it is not strictly necessary that a macro layer is implemented by the library at all, so expansion-suppression is not considered a problem or source of ambiguity.</text:span></text:p>
      <text:h text:style-name="Heading_20_3" text:outline-level="3">Parameterizing only the qualifier:</text:h>
      <text:p text:style-name="P16">char Q * strchr (char Q * s, int c);</text:p>
      <text:p text:style-name="P16">void Q * memchr (void Q * s, int c, size_t n);</text:p>
      <text:p text:style-name="Preformatted_20_Text"/>
      <text:p text:style-name="P24"><text:span text:style-name="T47">(following existing convention, </text:span><text:span text:style-name="T40">Q</text:span><text:span text:style-name="T47"> would be italicized or otherwise marked)</text:span></text:p>
      <text:p text:style-name="P24"><text:span text:style-name="T47">The advantage of this notation is that it limits the scope of the constraint to the qualification and leaves the object type either explicitly typed, or </text:span><text:span text:style-name="T15">void</text:span><text:span text:style-name="T47">. This retains the explicit typing of those functions that examine characters, and does not place additional restrictions on how objects found in opaque buffers should be interpreted.</text:span></text:p>
      <text:p text:style-name="P33">WG14 rejected the use of this notation.</text:p>
      <text:h text:style-name="Heading_20_3" text:outline-level="3">Parameterizing the entire pointed-to type, including qualifier and object <text:span text:style-name="T48">components:</text:span></text:h>
      <text:p text:style-name="P16">C * strrchr (C * s, int c);</text:p>
      <text:p text:style-name="P16">W * wcsrchr (W * s, wchar_t c);</text:p>
      <text:p text:style-name="P16">C * strpbrk (C * s1, char const * s2);</text:p>
      <text:p text:style-name="Preformatted_20_Text"/>
      <text:p text:style-name="P32"><text:soft-page-break/>The advantage of this convention is that the entire pointed-to type is parameterized, which may be visually clearer by communicating that the qualification is a preserved part of the complete derived type. It also does not imply that there is necessarily any qualification at all (i.e. Q can be empty / missing). However, by removing the explicit mention of the qualifier it also removes the focus on the fact that it is preserved.</text:p>
      <text:p text:style-name="P24"><text:span text:style-name="T47">This highlights an advantage: other pseudo-generic parameters (such as the </text:span><text:span text:style-name="T15">int</text:span><text:span text:style-name="T47"> or </text:span><text:span text:style-name="T15">wint_t</text:span><text:span text:style-name="T47"> second parameters) can </text:span><text:span text:style-name="T50">potentially </text:span><text:span text:style-name="T47">be marked as sharing the parameterized type. This indicates that the search key and the array of elements to examine are expected to be the same type of object. For </text:span><text:span text:style-name="T15">bsearch</text:span><text:span text:style-name="T47">, this might look like:</text:span></text:p>
      <text:p text:style-name="P16">E * bsearch (E const * key, E * ptr, size_t count, size_t size</text:p>
      <text:p text:style-name="P16"><text:s text:c="11"/>, int (*comp) (void const *, void const *));</text:p>
      <text:p text:style-name="Preformatted_20_Text"/>
      <text:p text:style-name="P24"><text:span text:style-name="T47">However, this highlights several problems: the notation now makes it visually ambiguous whether the parameter is supposed to include the qualification (the redundant qualification in </text:span><text:span text:style-name="T15">E const * ptr</text:span><text:span text:style-name="T47"> is consistent with </text:span><text:span text:style-name="T15">typedef</text:span><text:span text:style-name="T47"> rules, but not necessarily clear), and the fact that the </text:span><text:span text:style-name="T15">comp</text:span><text:span text:style-name="T47"> parameter actually does need to be strongly-typed to accept void pointers means it cannot be written using the parameters. In addition, in the case of the </text:span><text:span text:style-name="T15">strchr</text:span><text:span text:style-name="T47"> group, the key parameter does not have the same object representation, using </text:span><text:span text:style-name="T15">int</text:span><text:span text:style-name="T47"> as a generic character key instead.</text:span></text:p>
      <text:p text:style-name="P32">For the string search functions, this does show the possibility for further modification to the API, to unify the wide and narrow character searches into a single non-prefixed API. This would be a more intrusive change than proposed here. (see Future Directions, Generic functions)</text:p>
      <text:p text:style-name="P24"><text:span text:style-name="T47">For </text:span><text:span text:style-name="T15">bsearch</text:span><text:span text:style-name="T47">, this shows that simple parameterization in the signature is not sufficient to combine with </text:span><text:span text:style-name="T15">void</text:span><text:span text:style-name="T47"> pointers used by higher-order function types. A more powerful mechanism for describing strongly-typed </text:span><text:span text:style-name="T15">void</text:span><text:span text:style-name="T47"> pointers in generic higher-order functions is required. (see Future Directions, </text:span><text:span text:style-name="T15">void</text:span><text:span text:style-name="T47">-</text:span><text:span text:style-name="T40">which-binds</text:span><text:span text:style-name="T47">)</text:span></text:p>
      <text:h text:style-name="Heading_20_3" text:outline-level="3">Overload lists:</text:h>
      <text:p text:style-name="P16">char const * strstr (char const * s1, char const * s2);</text:p>
      <text:p text:style-name="P16">char * strstr (char * s1, char const * s2);</text:p>
      <text:p text:style-name="P16"/>
      <text:p text:style-name="P16">wchar_t const * wmemchr (wchar_t const * s, wchar_t c, size_t n);</text:p>
      <text:p text:style-name="P16">wchar_t * wmemchr (wchar_t * s, wchar_t c, size_t n);</text:p>
      <text:p text:style-name="Preformatted_20_Text"/>
      <text:p text:style-name="P32">This is consistent with C++, which actually does provide separate overloads.</text:p>
      <text:p text:style-name="P32">However, this is misleading: this is not how overloading works or is implemented in C, and has no connection at all to the declarations that would exist in the library.</text:p>
      <text:p text:style-name="P32">In C++, each overload is also a completely separate function - this declaration communicates that fact. In C, there is only ever one callable with a given name. If it exists as a non-macro entity, it has a singular type and it has a single exported external symbol. The C++ syntax is therefore not appropriate as it communicates a completely different set of assumptions about how the library makes names visible.</text:p>
      <text:h text:style-name="P6" text:outline-level="3"><text:soft-page-break/>Committee feedback</text:h>
      <text:p text:style-name="P27">Originally we proposed using the first option. In the first round of discussion the Committee found this confusing because the qualifier variable might expand to nothing, which was not visually clear from the notation. In addition there is no precedent anywhere in the document (or any existing practice at all, for C23) for abstracting qualifiers, but not whole types. This is therefore a concept with a distinct teach-ability disadvantage because it implicitly demands users to dive into the deep end of type-operators and kindedness, in order to properly understand what <text:span text:style-name="T40">should</text:span><text:span text:style-name="T47"> really be a very simple signature.</text:span></text:p>
      <text:p text:style-name="P34">Therefore the Committee settled on a preference for the second option, abstracting only whole types in generic function notation. This reduces the barriers to establishing a type for generic functions and reduces the complexity in the question of what a generic function “is” (luckily, outside of the scope of this proposal as generic functions already exist in C11).</text:p>
      <text:p text:style-name="P24"><text:span text:style-name="T47">The rest of this document will use the </text:span><text:span text:style-name="T50">second</text:span><text:span text:style-name="T47"> syntax option, parameterizing the </text:span><text:span text:style-name="T50">entire pointed-to type</text:span><text:span text:style-name="T49">. </text:span><text:span text:style-name="T50">We adopt a verbose naming scheme to make it clearer that the substituted types must match only a restricted class (e.g. </text:span><text:span text:style-name="T41">Q</text:span><text:span text:style-name="T45">C</text:span><text:span text:style-name="T41">har</text:span><text:span text:style-name="T50"> implying a pointer to a </text:span><text:span text:style-name="T16">char</text:span><text:span text:style-name="T34">, rather than admitting any type</text:span><text:span text:style-name="T50">), </text:span><text:span text:style-name="T51">and we do not extend the genericity to the </text:span><text:span text:style-name="T17">key</text:span><text:span text:style-name="T51"> parameters in this proposal, instead leaving that to future work.</text:span></text:p>
      <text:h text:style-name="P3" text:outline-level="2"><text:bookmark text:name="alternatives"/>Alternatives</text:h>
      <text:p text:style-name="P25">An alternative would be to deprecate all twelve functions and to add new APIs with the qualifier- preserving property. This has three major drawbacks:</text:p>
      <text:list xml:id="list756817620" text:style-name="L5">
        <text:list-item>
          <text:p text:style-name="P65">the new APIs would likely only be used by conscientious users who are less likely to make the underlying error in the first place.</text:p>
        </text:list-item>
        <text:list-item>
          <text:p text:style-name="P65">new APIs do not fix existing erroneous uses of the unsafe APIs; any errors will still be present and not elicit warnings.</text:p>
        </text:list-item>
        <text:list-item>
          <text:p text:style-name="P65">because C++ has already closed this loophole using its own in-language tools for these APIs, introducing new function names would widen rather than narrow the divergence between the two languages.</text:p>
        </text:list-item>
      </text:list>
      <text:p text:style-name="P25">A potential heavier-weight alternative relying on future language directions would be to convert all APIs to use typed void pointers, i.e. the <text:a xlink:type="simple" xlink:href="http://www.open-std.org/jtc1/sc22/wg14/www/docs/n2853.pdf" text:style-name="Internet_20_link" text:visited-style-name="Visited_20_Internet_20_Link"><text:span text:style-name="T4">void</text:span></text:a><text:a xlink:type="simple" xlink:href="http://www.open-std.org/jtc1/sc22/wg14/www/docs/n2853.pdf" text:style-name="Internet_20_link" text:visited-style-name="Visited_20_Internet_20_Link">-</text:a><text:a xlink:type="simple" xlink:href="http://www.open-std.org/jtc1/sc22/wg14/www/docs/n2853.pdf" text:style-name="Internet_20_link" text:visited-style-name="Visited_20_Internet_20_Link"><text:span text:style-name="T40">which-binds</text:span></text:a>. This would also allow the compiler to enforce that the object type of the element is preserved and not just its qualification. This has the significant disadvantage of not yet existing in-language.</text:p>
      <text:p text:style-name="P25">However, this may demonstrate an initial use case for such a feature.</text:p>
      <text:h text:style-name="P3" text:outline-level="2"><text:bookmark text:name="impact"/>Impact</text:h>
      <text:h text:style-name="Heading_20_3" text:outline-level="3">ABI</text:h>
      <text:p text:style-name="P25"><text:span text:style-name="T59">None.</text:span> The existing functions already work correctly when used with the appropriate operands. All this proposal does is alter the interpretation of the signature types to enable stricter checking of the invocations. The Standard guarantees that the object representation of a pointer to <text:span text:style-name="T4">T</text:span> and a pointer to <text:soft-page-break/><text:span text:style-name="T4">T const</text:span> are compatible, so the ABI <text:span text:style-name="T40">must not</text:span> change to accommodate the proposed change (limited to qualifiers). A single underlying function body remains sufficient to implement the search feature itself, without changes.</text:p>
      <text:p text:style-name="P25">C++ already provides two overloads which correctly propagate qualification. This means that the ABI problem would already be addressed in external linkage if two names are needed, and also that any existing code which compiles as both C and C++ has already been checked for qualifier- correctness by C++'s stricter library signatures. Therefore, user code in this category will be unaffected by the change as it must already be qualifier-correct.</text:p>
      <text:h text:style-name="P7" text:outline-level="3">Compilation</text:h>
      <text:p text:style-name="P25">Some existing user code should be expected to raise an error when it compiled cleanly before. However, it seems that all such new warnings would indicate a legitimate design error - unlike the <text:span text:style-name="T4">strerror</text:span> case, there is no valid use case for implicitly removing <text:span text:style-name="T4">const</text:span>-qualification from a buffer that the user has ownership of. If they meant to do so, they can still strip the qualification explicitly themselves, and communicate that intent. Therefore, this should be considered an API safety improvement and the new errors would be desirable.</text:p>
      <text:h text:style-name="Heading_20_3" text:outline-level="3">Implementation</text:h>
      <text:p text:style-name="P25">A high-quality implementation should provide a macro wrapper around the calls to the implementation function that re-applies correct qualification to the result type. The only impact of this would be to introduce a compile-time implicit pointer type conversion between two compatible pointer types, meaning that there is guaranteed to be no run-time cost.</text:p>
      <text:p text:style-name="P25">An example of this implementation wrapper might be:</text:p>
      <text:p text:style-name="P16">// string.h</text:p>
      <text:p text:style-name="P16">// ...</text:p>
      <text:p text:style-name="P16"/>
      <text:p text:style-name="P16">#define IS_POINTER_CONST(P) _Generic(1 ? (P) : (void *)(P) <text:s/>\</text:p>
      <text:p text:style-name="P16"><text:s text:c="4"/>, void const *: 1 <text:s text:c="38"/>\</text:p>
      <text:p text:style-name="P16"><text:s text:c="4"/>, default <text:s text:c="4"/>: 0)</text:p>
      <text:p text:style-name="P16"/>
      <text:p text:style-name="P16">#define STATIC_IF(P, T, E) _Generic (&amp;(char [!!(P) + 1]) {0} <text:s/>\</text:p>
      <text:p text:style-name="P16"><text:s text:c="4"/>, char (*) [2] : T <text:s text:c="39"/>\</text:p>
      <text:p text:style-name="P16"><text:s text:c="4"/>, char (*) [1] : E)</text:p>
      <text:p text:style-name="P16"/>
      <text:p text:style-name="P16">#define _STRING_SEARCH_QP(T, F, S, ...) <text:s/>\</text:p>
      <text:p text:style-name="P16"><text:s text:c="2"/>STATIC_IF (IS_POINTER_CONST ((S)) <text:s text:c="5"/>\</text:p>
      <text:p text:style-name="P16"><text:s text:c="4"/>, (T const *) (F) ((S), __VA_ARGS__) \</text:p>
      <text:p text:style-name="P16"><text:s text:c="4"/>, (T <text:s text:c="6"/>*) (F) ((S), __VA_ARGS__))</text:p>
      <text:p text:style-name="P16"/>
      <text:p text:style-name="P16">#define memchr(S, C, N) _STRING_SEARCH_QP(void, memchr, <text:s/>(S), <text:s/>(C), (N))</text:p>
      <text:p text:style-name="P16">#define strchr(S, C) <text:s text:c="3"/>_STRING_SEARCH_QP(char, strchr, <text:s/>(S), <text:s/>(C))</text:p>
      <text:p text:style-name="P16">#define strpbrk(S1, S2) _STRING_SEARCH_QP(char, strpbrk, (S1), (S2))</text:p>
      <text:p text:style-name="P16">#define strrchr(S, C) <text:s text:c="2"/>_STRING_SEARCH_QP(char, strrchr, (S), <text:s/>(C))</text:p>
      <text:p text:style-name="P16">#define strstr(S1, S2) <text:s/>_STRING_SEARCH_QP(char, strstr, <text:s/>(S1), (S2))</text:p>
      <text:p text:style-name="Preformatted_20_Text"/>
      <text:p text:style-name="P35">The null pointer constant is silently handled as a pointer to non-<text:span text:style-name="T4">const</text:span><text:span text:style-name="T28">, which is consistent with its definition</text:span>. Since calling these functions with <text:span text:style-name="T4">NULL</text:span> is undefined and should be guarded, the usefulness of either behaviour is subjective; leaving the result type a pointer to mutable is slightly simpler to define and ever so slightly reduces the impact of the change (if anything was <text:span text:style-name="T79">already </text:span>depending on the result type in an unevaluated context, <text:span text:style-name="T79">it will be unchanged</text:span>).</text:p>
      <text:p text:style-name="P40"><text:soft-page-break/>In C++, attempting to use a null pointer constant (of any syntax) as the array operand results in an ambiguous overload call (compile error) and is therefore prohibited by that type system. There is no C++ behaviour to be compatible with, and there is also therefore no <text:span text:style-name="T80">particular </text:span>reason to treat <text:span text:style-name="T4">nullptr</text:span> differently from other null pointer constants in the event that feature is adopted.</text:p>
      <text:p text:style-name="P29"><text:span text:style-name="T62">(The previous version of this proposal suggested an implementation that would be back-portable to C90 and C99, </text:span><text:span text:style-name="T63">relying on the qualifier-combining effect of the ternary operator; this is less suitable for C23 as it would risk exposing a </text:span><text:span text:style-name="T19">void *</text:span><text:span text:style-name="T63"> return type for some arguments. In any case we expect implementations would mostly use </text:span><text:span text:style-name="T19">__builtin</text:span><text:span text:style-name="T63"> magic here rather than a portable query.)</text:span></text:p>
      <text:p text:style-name="P25">A check for specific <text:span text:style-name="T63">inappropriate</text:span> qualifiers is not required, as if the argument is more heavily qualified than the signature of the underlying search function allows, it will fail to type check after expansion.</text:p>
      <text:p text:style-name="P25">A simpler implementation could continue to provide the APIs as they are and merely document that the constraint now applies. This might introduce some inconsistencies if the result of a search function is used with _<text:span text:style-name="T4">Generic</text:span>, but this is unlikely (the type is already one the user would not expect to mat<text:span text:style-name="T58">ch).</text:span></text:p>
      <text:h text:style-name="Heading_20_2" text:outline-level="2">Future directions</text:h>
      <text:p text:style-name="P25">This proposal introduces a number of ideas for further library development:</text:p>
      <text:list xml:id="list644616684" text:style-name="L6">
        <text:list-item>
          <text:p text:style-name="P66">in <text:a xlink:type="simple" xlink:href="http://www.open-std.org/jtc1/sc22/wg14/www/docs/n2522.pdf" text:style-name="Internet_20_link" text:visited-style-name="Visited_20_Internet_20_Link">n2522</text:a>, the wide and narrow versions of the string searches are all unified under the narrow-string names, and made generic in the character type. This would be a more intrusive change.</text:p>
          <text:list>
            <text:list-item>
              <text:p text:style-name="P66">this would introduce the option for additional character types to be searchable by the same set of function names.</text:p>
            </text:list-item>
            <text:list-item>
              <text:p text:style-name="P66">this significantly simplifies user-side type-generic string processing. However, this does not have precedent from C++, and would imply an ABI change. It is also unclear which headers would provide the APIs, and how completely (for instance, should the wide character searches be available from <text:span text:style-name="T4">string.h</text:span>, or should those "overloads" only become visible when both <text:span text:style-name="T4">string.h</text:span> and <text:span text:style-name="T4">wchar.h</text:span> are included? Should <text:span text:style-name="T4">wchar.h</text:span> still provide the explicit wide APIs?)</text:p>
            </text:list-item>
          </text:list>
        </text:list-item>
        <text:list-item>
          <text:p text:style-name="P66"><text:span text:style-name="T60">t</text:span>he <text:a xlink:type="simple" xlink:href="http://www.open-std.org/JTC1/SC22/WG14/www/docs/n1169.pdf" text:style-name="Internet_20_link" text:visited-style-name="Visited_20_Internet_20_Link">Embedded C TR 18037</text:a> introduces additional qualifiers to represent named address spaces. Pointers to objects in these address spaces can round-trip through <text:span text:style-name="T4">void</text:span>, but may have a different representation and can therefore not be examined by a generic pointer readthrough.</text:p>
          <text:list>
            <text:list-item>
              <text:p text:style-name="P66">the _<text:span text:style-name="T4">Atomic</text:span> qualifier is already permitted to indicate different object layout requirements, and is similarly inappropriate to use with these APIs. This is therefore consistent with the idea that the overloads may restrict the set of qualifiers abstracted; currently only to <text:span text:style-name="T4">const</text:span>.</text:p>
            </text:list-item>
            <text:list-item>
              <text:p text:style-name="P66">strongly-typed <text:span text:style-name="T4">void</text:span> pointers would be able to accommodate this when the read is only achieved through a provided access callback, so this restriction could be lifted from <text:span text:style-name="T4">bsearch</text:span> and <text:span text:style-name="T4">bsearch_s</text:span> in the presence of <text:a xlink:type="simple" xlink:href="http://www.open-std.org/jtc1/sc22/wg14/www/docs/n2853.pdf" text:style-name="Internet_20_link" text:visited-style-name="Visited_20_Internet_20_Link"><text:span text:style-name="T4">void</text:span></text:a><text:a xlink:type="simple" xlink:href="http://www.open-std.org/jtc1/sc22/wg14/www/docs/n2853.pdf" text:style-name="Internet_20_link" text:visited-style-name="Visited_20_Internet_20_Link">-</text:a><text:a xlink:type="simple" xlink:href="http://www.open-std.org/jtc1/sc22/wg14/www/docs/n2853.pdf" text:style-name="Internet_20_link" text:visited-style-name="Visited_20_Internet_20_Link"><text:span text:style-name="T40">which-binds</text:span></text:a>.</text:p>
            </text:list-item>
          </text:list>
        </text:list-item>
        <text:list-item>
          <text:p text:style-name="P66"><text:soft-page-break/>Embedded C specifies that an implementation should provide some mechanism to declare the new qualifiers. This could exist separately as a way to tag opaque types with user-side meaningful data, without indicating an incompatible object representation (similar to <text:span text:style-name="T4">const</text:span>).</text:p>
          <text:list>
            <text:list-item>
              <text:p text:style-name="P66"><text:span text:style-name="T60">i</text:span>f such "tag qualifiers" were added to the language, it would be useful to allow them to qualify the operands to these search functions and to be preserved as well. They should be distinguished from qualifiers that may affect layout (address space, _<text:span text:style-name="T4">Atomic</text:span>) or the nature of access (_<text:span text:style-name="T4">Atomic</text:span> and <text:span text:style-name="T4">volatile</text:span>), which are not appropriate to abstract.</text:p>
            </text:list-item>
          </text:list>
        </text:list-item>
        <text:list-item>
          <text:p text:style-name="P66">ideally, the object type should also be preserved, rather than allowing the result pointer to a found element to be implicitly converted to a correctly-qualified pointer to an unrelated object layout.</text:p>
        </text:list-item>
      </text:list>
      <text:p text:style-name="P20">One proposal which would allow this to be communicated is <text:a xlink:type="simple" xlink:href="http://www.open-std.org/jtc1/sc22/wg14/www/docs/n2853.pdf" text:style-name="Internet_20_link" text:visited-style-name="Visited_20_Internet_20_Link"><text:span text:style-name="T4">void</text:span></text:a><text:a xlink:type="simple" xlink:href="http://www.open-std.org/jtc1/sc22/wg14/www/docs/n2853.pdf" text:style-name="Internet_20_link" text:visited-style-name="Visited_20_Internet_20_Link">-</text:a><text:a xlink:type="simple" xlink:href="http://www.open-std.org/jtc1/sc22/wg14/www/docs/n2853.pdf" text:style-name="Internet_20_link" text:visited-style-name="Visited_20_Internet_20_Link"><text:span text:style-name="T40">which-binds</text:span></text:a>, introducing the concept of "strongly-typed <text:span text:style-name="T4">void</text:span>" to function declarations via attributes:</text:p>
      <text:p text:style-name="P21">#define Void(A) void [[bind_type (A)]]</text:p>
      <text:p text:style-name="P21"/>
      <text:p text:style-name="P21">Void(T) * memchr (Void(T) * s, int c, size_t n);</text:p>
      <text:p text:style-name="P16"/>
      <text:p text:style-name="P20">This proposal would require that all implicit conversions to or from a <text:span text:style-name="T4">void</text:span> pointer component of a signature that are annotated with the same parameter name, bind to or from the same object type. Therefore,</text:p>
      <text:p text:style-name="P21">char const buf[] = "o menel aglar elenath";</text:p>
      <text:p text:style-name="P21">char const * mp = memchr (buf, 'm', 21); // OK</text:p>
      <text:p text:style-name="P22">int const * ip = memchr (buf, 'm', 21); <text:s/>// not OK if [[type(A)]] is</text:p>
      <text:p text:style-name="P22"><text:s text:c="41"/>// enforced</text:p>
      <text:p text:style-name="P16"/>
      <text:p text:style-name="P20">This would allow typed parameterization of <text:span text:style-name="T4">bsearch's</text:span> key/buffer/result type without losing the connection to the <text:span text:style-name="T4">comp</text:span> function:</text:p>
      <text:p text:style-name="P21">Void(T) * bsearch (Void(T) const * key, Void(T) * ptr</text:p>
      <text:p text:style-name="P21"><text:s text:c="17"/>, size_t count, size_t size</text:p>
      <text:p text:style-name="P21"><text:s text:c="17"/>, int (*comp) (Void(T) const *, Void(T) const *));</text:p>
      <text:p text:style-name="P16"/>
      <text:p text:style-name="P20">The ABI is not changed at all because the parameters are still <text:span text:style-name="T4">void</text:span> pointers, but their connection to a single element type is communicated.</text:p>
      <text:list xml:id="list2483112325" text:style-name="L7">
        <text:list-item>
          <text:p text:style-name="P67">a unified notational convention for generic function signatures should be established for use throughout the Standard library. This will build consensus for whether it is better to abstract type components or whole pointed-to types, and will ensure that the signatures are easier to understand because they follow a coherent pattern. At the moment there is no formal convention because the needs of each library section are relatively distinct.</text:p>
          <text:p text:style-name="P68">Committee consensus has not yet settled on what kind of entity a generic function “is”. The eventual common notation should reflect this in a way that is clear and useful to the user and communicates the concrete type of any underlying addressable object or function clearly. The consensus was clear that abstracting only the qualifier component of a type did not achieve this.</text:p>
        </text:list-item>
      </text:list>
      <text:h text:style-name="P3" text:outline-level="2"/>
      <text:h text:style-name="P2" text:outline-level="2"><text:bookmark text:name="proposed-wording"/>Proposed wording</text:h>
      <text:p text:style-name="P25">Changes are proposed against the wording in C<text:span text:style-name="T54">23</text:span> draft <text:a xlink:type="simple" xlink:href="http://www.open-std.org/jtc1/sc22/wg14/www/docs/n2912.pdf" text:style-name="Internet_20_link" text:visited-style-name="Visited_20_Internet_20_Link">n2</text:a><text:a xlink:type="simple" xlink:href="http://www.open-std.org/jtc1/sc22/wg14/www/docs/n2912.pdf" text:style-name="Internet_20_link" text:visited-style-name="Visited_20_Internet_20_Link"><text:span text:style-name="T76">912</text:span></text:a>. Bolded text is new text.</text:p>
      <text:h text:style-name="Heading_20_3" text:outline-level="3">bsearch</text:h>
      <text:p text:style-name="P25">Modify 7.22.5.1 p1:</text:p>
      <text:p text:style-name="P16">#include &lt;stdlib.h&gt;</text:p>
      <text:p text:style-name="P16"><text:span text:style-name="T40">Q</text:span><text:span text:style-name="T43">V</text:span><text:span text:style-name="T40">oid</text:span> *bsearch (const void *key, <text:span text:style-name="T40">Q</text:span><text:span text:style-name="T43">V</text:span><text:span text:style-name="T40">oid</text:span> *base,</text:p>
      <text:p text:style-name="P16"><text:s text:c="16"/>size_t nmemb, size_t size,</text:p>
      <text:p text:style-name="P16"><text:s text:c="16"/>int (*compar)(const void *, const void *));</text:p>
      <text:p text:style-name="Preformatted_20_Text"/>
      <text:p text:style-name="P25">(<text:span text:style-name="T64">make</text:span> the return type and <text:span text:style-name="T64">type</text:span> of <text:span text:style-name="T4">base</text:span> <text:span text:style-name="T64">qualifier-generic</text:span>)</text:p>
      <text:p text:style-name="P25">Modify the first sentence of 7.22.5.1 p2:</text:p>
      <text:p text:style-name="Quotations">The <text:span text:style-name="T4">bsearch</text:span> <text:span text:style-name="T59">generic</text:span> function searches an array of ...</text:p>
      <text:p text:style-name="P25">Modify the first sentence of 7.22.5.1 p4:</text:p>
      <text:p text:style-name="Quotations">The <text:span text:style-name="T4">bsearch</text:span> <text:span text:style-name="T59">generic</text:span> function returns a pointer to ...</text:p>
      <text:p text:style-name="P25">Add <text:span text:style-name="T64">two</text:span> new paragraph<text:span text:style-name="T64">s</text:span> after 7.22.5.1 p4:</text:p>
      <text:p text:style-name="Quotations">The <text:span text:style-name="T4">bsearch</text:span> function is generic in the qualification of the type pointed to by the argument to <text:span text:style-name="T4">base</text:span>. If this argument is a pointer to <text:span text:style-name="T72">a</text:span> <text:span text:style-name="T4">const</text:span>-qualified <text:span text:style-name="T72">object type</text:span>, the returned pointer will be <text:span text:style-name="T64">a pointer </text:span>to <text:span text:style-name="T4">const</text:span>-qualified <text:span text:style-name="T20">void</text:span>. <text:span text:style-name="T64">Otherwise, the argument shall be a pointer to </text:span><text:span text:style-name="T72">an </text:span><text:span text:style-name="T64">unqualified </text:span><text:span text:style-name="T72">object type </text:span><text:span text:style-name="T85">or a null pointer constant </text:span><text:span text:style-name="T82">footnote)</text:span><text:span text:style-name="T85">,</text:span><text:span text:style-name="T72"> </text:span><text:span text:style-name="T64">and the returned pointer will be a pointer to unqualified </text:span><text:span text:style-name="T20">void</text:span><text:span text:style-name="T64">.</text:span></text:p>
      <text:p text:style-name="P51">foot<text:span text:style-name="T86">note) If the argument is a null pointer and the call is executed, the behavior is undefined.</text:span></text:p>
      <text:p text:style-name="P43">The external declaration of <text:span text:style-name="T4">bsearch</text:span> has the concrete type: <text:span text:style-name="T4">void * (const void *, const void *, size_t, size_t, int (*) (const void *, const void *))</text:span><text:span text:style-name="T28">, </text:span><text:span text:style-name="T35">which supports all correct uses</text:span>. <text:span text:style-name="T65">If a macro definition </text:span><text:span text:style-name="T73">of </text:span><text:span text:style-name="T78">this</text:span><text:span text:style-name="T73"> generic function</text:span><text:span text:style-name="T65"> is suppressed in order to access an actual function, the </text:span><text:span text:style-name="T73">external declaration with th</text:span><text:span text:style-name="T74">is concrete</text:span><text:span text:style-name="T73"> type is visible.</text:span></text:p>
      <text:h text:style-name="Heading_20_3" text:outline-level="3">7.24.5</text:h>
      <text:p text:style-name="Text_20_body">Add <text:span text:style-name="T65">three</text:span> introductory paragraph<text:span text:style-name="T65">s</text:span> before the individual function descriptions, 7.24.5 p1:</text:p>
      <text:p text:style-name="Quotations">The stateless search functions in this section (<text:span text:style-name="T4">memchr</text:span>, <text:span text:style-name="T4">strchr</text:span>, <text:span text:style-name="T4">strpbrk</text:span>, <text:span text:style-name="T4">strrchr</text:span>, <text:span text:style-name="T4">strstr</text:span>) are <text:span text:style-name="T40">generic functions</text:span>. These functions are generic in the qualification of the array to be searched and will return a result pointer to an element with the same qualification as the passed array. If the array to be searched is <text:span text:style-name="T4">const</text:span>-qualified, the result pointer will be to a <text:span text:style-name="T4">const</text:span>-qualified element. If the array to be searched is not <text:span text:style-name="T4">const</text:span>-qualified <text:span text:style-name="T81">footnote)</text:span>, the result pointer will be to an unqualified element.</text:p>
      <text:p text:style-name="P48"><text:soft-page-break/>footnote) the null pointer constant is not a pointer to a <text:span text:style-name="T4">const</text:span>-qualified type, and <text:span text:style-name="T83">therefore </text:span><text:span text:style-name="T84">the result expression has the type of a </text:span><text:span text:style-name="T83">pointer to a</text:span>n unqualified <text:span text:style-name="T83">element</text:span>; <text:span text:style-name="T83">however, </text:span>evaluating such a call is undefined.</text:p>
      <text:p text:style-name="P41">The external declarations of these generic functions have a concrete function type that returns a pointer to an unqualified element <text:span text:style-name="T69">(of type </text:span><text:span text:style-name="T22">char</text:span><text:span text:style-name="T69"> when specified as </text:span><text:span text:style-name="T23">QChar</text:span><text:span text:style-name="T69">, and </text:span><text:span text:style-name="T22">void</text:span><text:span text:style-name="T69"> when specified as </text:span><text:span text:style-name="T23">QVoid</text:span><text:span text:style-name="T69">)</text:span>, and accepts a pointer to a <text:span text:style-name="T4">const</text:span>-qualified array <text:span text:style-name="T69">of the same type </text:span>to search. This signature supports all correct uses. If a macro definition <text:span text:style-name="T73">of any of these generic functions</text:span> is suppressed in order to access an actual function, the <text:span text:style-name="T73">external declaration with </text:span><text:span text:style-name="T75">the corresponding</text:span><text:span text:style-name="T74"> concrete</text:span><text:span text:style-name="T73"> type is visible.</text:span></text:p>
      <text:p text:style-name="Quotations">The <text:span text:style-name="T4">volatile</text:span> and <text:span text:style-name="T24">restrict</text:span> qualifiers are not accepted on the elements of the array to search.</text:p>
      <text:h text:style-name="Heading_20_3" text:outline-level="3">memchr</text:h>
      <text:p text:style-name="Text_20_body">Modify 7.24.5.1 p1:</text:p>
      <text:p text:style-name="P16">#include &lt;string.h&gt;</text:p>
      <text:p text:style-name="P17"><text:span text:style-name="T40">Q</text:span><text:span text:style-name="T43">V</text:span><text:span text:style-name="T40">oid</text:span> *memchr (<text:span text:style-name="T40">Q</text:span><text:span text:style-name="T43">V</text:span><text:span text:style-name="T40">oid</text:span> *s, int c, size_t n);</text:p>
      <text:p text:style-name="Preformatted_20_Text"/>
      <text:p text:style-name="Text_20_body">Modify the first sentence of 7.24.5.1 p2:</text:p>
      <text:p text:style-name="Quotations">The <text:span text:style-name="T4">memchr</text:span> <text:span text:style-name="T59">generic</text:span> function locates the first occurrence of ...</text:p>
      <text:p text:style-name="Text_20_body">Modify 7.24.5.1 p3:</text:p>
      <text:p text:style-name="Quotations">The <text:span text:style-name="T4">memchr</text:span> <text:span text:style-name="T59">generic</text:span> function returns a pointer to ...</text:p>
      <text:h text:style-name="Heading_20_3" text:outline-level="3">strchr</text:h>
      <text:p text:style-name="Text_20_body">Modify 7.24.5.2 p1:</text:p>
      <text:p text:style-name="P16">#include &lt;string.h&gt;</text:p>
      <text:p text:style-name="P17"><text:span text:style-name="T40">Q</text:span><text:span text:style-name="T44">C</text:span><text:span text:style-name="T40">har</text:span> *strchr (<text:span text:style-name="T40">Q</text:span><text:span text:style-name="T44">C</text:span><text:span text:style-name="T40">har</text:span> *s, int c);</text:p>
      <text:p text:style-name="Preformatted_20_Text"/>
      <text:p text:style-name="Text_20_body">Modify the first sentence of 7.24.5.2 p2:</text:p>
      <text:p text:style-name="Quotations">The <text:span text:style-name="T4">strchr</text:span> <text:span text:style-name="T59">generic</text:span> function locates the first occurrence of ...</text:p>
      <text:p text:style-name="Text_20_body">Modify 7.24.5.2 p3:</text:p>
      <text:p text:style-name="Quotations">The <text:span text:style-name="T4">strchr</text:span> <text:span text:style-name="T59">generic</text:span> function returns a pointer to ...</text:p>
      <text:h text:style-name="Heading_20_3" text:outline-level="3">strpbrk</text:h>
      <text:p text:style-name="Text_20_body">Modify 7.24.5.4 p1:</text:p>
      <text:p text:style-name="P16">#include &lt;string.h&gt;</text:p>
      <text:p text:style-name="P17"><text:span text:style-name="T40">Q</text:span><text:span text:style-name="T44">C</text:span><text:span text:style-name="T40">har</text:span> *strpbrk (<text:span text:style-name="T40">Q</text:span><text:span text:style-name="T44">C</text:span><text:span text:style-name="T40">har</text:span> *s1, const char *s2);</text:p>
      <text:p text:style-name="Preformatted_20_Text"/>
      <text:p text:style-name="Text_20_body">Modify the first sentence of 7.24.5.4 p2:</text:p>
      <text:p text:style-name="Quotations">The <text:span text:style-name="T4">strpbrk</text:span> <text:span text:style-name="T59">generic</text:span> function locates the first occurrence in ...</text:p>
      <text:p text:style-name="Text_20_body"><text:soft-page-break/>Modify 7.24.5.4 p3:</text:p>
      <text:p text:style-name="Quotations">The <text:span text:style-name="T4">strpbrk</text:span> <text:span text:style-name="T59">generic</text:span> function returns a pointer to ...</text:p>
      <text:h text:style-name="Heading_20_3" text:outline-level="3">strrchr</text:h>
      <text:p text:style-name="Text_20_body">Modify 7.24.5.5 p1:</text:p>
      <text:p text:style-name="P16">#include &lt;string.h&gt;</text:p>
      <text:p text:style-name="P17"><text:span text:style-name="T40">Q</text:span><text:span text:style-name="T44">C</text:span><text:span text:style-name="T40">har</text:span> *strrchr (<text:span text:style-name="T40">Q</text:span><text:span text:style-name="T44">C</text:span><text:span text:style-name="T40">har</text:span> *s, int c);</text:p>
      <text:p text:style-name="Preformatted_20_Text"/>
      <text:p text:style-name="Text_20_body">Modify the first sentence of 7.24.5.5 p2:</text:p>
      <text:p text:style-name="Quotations">The <text:span text:style-name="T4">strrchr</text:span> <text:span text:style-name="T59">generic</text:span> function locates the last occurrence of ...</text:p>
      <text:p text:style-name="Text_20_body">Modify 7.24.5.5 p3:</text:p>
      <text:p text:style-name="Quotations">The <text:span text:style-name="T4">strrchr</text:span> <text:span text:style-name="T59">generic</text:span> function returns a pointer to ...</text:p>
      <text:h text:style-name="Heading_20_3" text:outline-level="3">strstr</text:h>
      <text:p text:style-name="Text_20_body">Modify 7.24.5.7 p1:</text:p>
      <text:p text:style-name="P16">#include &lt;string.h&gt;</text:p>
      <text:p text:style-name="P17"><text:span text:style-name="T40">Q</text:span><text:span text:style-name="T44">C</text:span><text:span text:style-name="T40">har</text:span> *strstr (<text:span text:style-name="T40">Q</text:span><text:span text:style-name="T44">C</text:span><text:span text:style-name="T40">har</text:span> *s1, const char *s2);</text:p>
      <text:p text:style-name="Preformatted_20_Text"/>
      <text:p text:style-name="Text_20_body">Modify the first sentence of 7.24.5.7 p2:</text:p>
      <text:p text:style-name="Quotations">The <text:span text:style-name="T4">strstr</text:span> <text:span text:style-name="T59">generic</text:span> function locates the first occurrence in ...</text:p>
      <text:p text:style-name="Text_20_body">Modify the first sentence of 7.24.5.7 p3:</text:p>
      <text:p text:style-name="Quotations">The <text:span text:style-name="T4">strstr</text:span> <text:span text:style-name="T59">generic</text:span> function returns a pointer to ...</text:p>
      <text:h text:style-name="Heading_20_3" text:outline-level="3">7.29.4.5</text:h>
      <text:p text:style-name="P30">Add <text:span text:style-name="T67">three</text:span> introductory paragraph<text:span text:style-name="T66">s</text:span> before the individual function descriptions, 7.29.4.5 p1:</text:p>
      <text:p text:style-name="P49">The stateless search functions in this section (<text:span text:style-name="T4">wcschr</text:span>, <text:span text:style-name="T4">wcspbrk</text:span>, <text:span text:style-name="T4">wcsrchr</text:span>, <text:span text:style-name="T4">wmemchr</text:span>, <text:span text:style-name="T4">wcsstr</text:span>) are <text:span text:style-name="T40">generic functions</text:span>. These functions are generic in the qualification of the array to be searched and will return a result pointer to an element with the same qualification as the passed array. If the array to be searched is <text:span text:style-name="T4">const</text:span>-qualified, the result pointer will be to a <text:span text:style-name="T4">const</text:span>-qualified element. If the array to be searched is not <text:span text:style-name="T4">const</text:span>-qualified <text:span text:style-name="T81">footnote)</text:span>, the result pointer will be to an unqualified element.</text:p>
      <text:p text:style-name="P47">footnote) the null pointer constant is not a pointer to a <text:span text:style-name="T4">const</text:span>-qualified type, and <text:span text:style-name="T83">therefore </text:span><text:span text:style-name="T84">the result expression has the type of a </text:span><text:span text:style-name="T83">pointer to a</text:span>n unqualified <text:span text:style-name="T83">element</text:span>; <text:span text:style-name="T83">however, </text:span>evaluating such a call is undefined.</text:p>
      <text:p text:style-name="P42">The external declarations of these generic functions have a concrete function type that returns a pointer to an unqualified element <text:span text:style-name="T69">of type </text:span><text:span text:style-name="T22">wchar_t</text:span>, and accepts a pointer to a <text:span text:style-name="T4">const</text:span>-qualified array <text:span text:style-name="T69">of the same type </text:span>to search. This signature supports all correct uses. <text:span text:style-name="T65">If a macro definition </text:span><text:span text:style-name="T73">of any of these generic functions</text:span><text:span text:style-name="T65"> is suppressed in order to access an actual function, the </text:span><text:span text:style-name="T73">external declaration with th</text:span><text:span text:style-name="T74">is concrete</text:span><text:span text:style-name="T73"> type is visible.</text:span></text:p>
      <text:p text:style-name="Quotations"><text:soft-page-break/>The <text:span text:style-name="T4">volatile</text:span> and <text:span text:style-name="T24">restrict</text:span> qualifiers are not accepted on the elements of the array to search.</text:p>
      <text:h text:style-name="Heading_20_3" text:outline-level="3">wcschr</text:h>
      <text:p text:style-name="Text_20_body">Modify 7.29.4.5.1 p1:</text:p>
      <text:p text:style-name="P16">#include &lt;string.h&gt;</text:p>
      <text:p text:style-name="P18"><text:span text:style-name="T40">Q</text:span><text:span text:style-name="T13">W</text:span><text:span text:style-name="T40">char_t</text:span> *wcschr (<text:span text:style-name="T40">Q</text:span><text:span text:style-name="T13">W</text:span><text:span text:style-name="T40">char_t</text:span> *s, wchar_t c);</text:p>
      <text:p text:style-name="Preformatted_20_Text"/>
      <text:p text:style-name="Text_20_body">Modify the first sentence of 7.29.4.5.1 p2:</text:p>
      <text:p text:style-name="Quotations">The <text:span text:style-name="T4">wcschr</text:span> <text:span text:style-name="T59">generic</text:span> function locates the first occurrence of ...</text:p>
      <text:p text:style-name="Text_20_body">Modify 7.29.4.5.1 p3:</text:p>
      <text:p text:style-name="Quotations">The <text:span text:style-name="T4">wcschr</text:span> <text:span text:style-name="T59">generic</text:span> function returns a pointer to ...</text:p>
      <text:h text:style-name="Heading_20_3" text:outline-level="3">wcspbrk</text:h>
      <text:p text:style-name="Text_20_body">Modify 7.29.4.5.3 p1:</text:p>
      <text:p text:style-name="P16">#include &lt;wchar.h&gt;</text:p>
      <text:p text:style-name="P18"><text:span text:style-name="T40">Q</text:span><text:span text:style-name="T13">W</text:span><text:span text:style-name="T40">char_t</text:span> *wcspbrk (<text:span text:style-name="T40">Q</text:span><text:span text:style-name="T13">W</text:span><text:span text:style-name="T40">char_t</text:span> *s1, const wchar_t *s2);</text:p>
      <text:p text:style-name="Preformatted_20_Text"/>
      <text:p text:style-name="Text_20_body">Modify the first sentence of 7.29.4.5.3 p2:</text:p>
      <text:p text:style-name="Quotations">The <text:span text:style-name="T4">wcspbrk</text:span> <text:span text:style-name="T59">generic</text:span> function locates the first occurrence in ...</text:p>
      <text:p text:style-name="Text_20_body">Modify 7.29.4.5.3 p3:</text:p>
      <text:p text:style-name="Quotations">The <text:span text:style-name="T4">wcspbrk</text:span> <text:span text:style-name="T59">generic</text:span> function returns a pointer to ...</text:p>
      <text:h text:style-name="Heading_20_3" text:outline-level="3">wcsrchr</text:h>
      <text:p text:style-name="Text_20_body">Modify 7.29.4.5.4 p1:</text:p>
      <text:p text:style-name="P16">#include &lt;wchar.h&gt;</text:p>
      <text:p text:style-name="P18"><text:span text:style-name="T40">Q</text:span><text:span text:style-name="T13">W</text:span><text:span text:style-name="T40">char_t</text:span> *wcsrchr (<text:span text:style-name="T40">Q</text:span><text:span text:style-name="T13">W</text:span><text:span text:style-name="T40">char_t</text:span> *s, wchar_t c);</text:p>
      <text:p text:style-name="Preformatted_20_Text"/>
      <text:p text:style-name="Text_20_body">Modify the first sentence of 7.29.4.5.4 p2:</text:p>
      <text:p text:style-name="Quotations">The <text:span text:style-name="T4">wcsrchr</text:span> <text:span text:style-name="T59">generic</text:span> function locates the last occurrence of ...</text:p>
      <text:p text:style-name="Text_20_body">Modify 7.29.4.5.4 p3:</text:p>
      <text:p text:style-name="Quotations">The <text:span text:style-name="T4">wcsrchr</text:span> <text:span text:style-name="T59">generic</text:span> function returns a pointer to ...</text:p>
      <text:h text:style-name="Heading_20_3" text:outline-level="3">wcsstr</text:h>
      <text:p text:style-name="Text_20_body">Modify 7.29.4.5.6 p1:</text:p>
      <text:p text:style-name="P16">#include &lt;wchar.h&gt;</text:p>
      <text:p text:style-name="P18"><text:span text:style-name="T40">Q</text:span><text:span text:style-name="T13">W</text:span><text:span text:style-name="T40">char_t</text:span> *wcsstr (<text:span text:style-name="T40">Q</text:span><text:span text:style-name="T13">W</text:span><text:span text:style-name="T40">char_t</text:span> *s1, const wchar_t *s2);</text:p>
      <text:p text:style-name="Preformatted_20_Text"/>
      <text:p text:style-name="Text_20_body">Modify the first sentence of 7.29.4.5.6 p2:</text:p>
      <text:p text:style-name="Quotations"><text:soft-page-break/>The <text:span text:style-name="T4">wcsstr</text:span> <text:span text:style-name="T59">generic</text:span> function locates the first occurrence in ...</text:p>
      <text:p text:style-name="Text_20_body">Modify the first sentence of 7.29.4.5.6 p3:</text:p>
      <text:p text:style-name="Quotations">The <text:span text:style-name="T4">wcsstr</text:span> <text:span text:style-name="T59">generic</text:span> function returns a pointer to ...</text:p>
      <text:h text:style-name="Heading_20_3" text:outline-level="3">wmemchr</text:h>
      <text:p text:style-name="Text_20_body">Modify 7.29.4.5.8 p1:</text:p>
      <text:p text:style-name="P16">#include &lt;wchar.h&gt;</text:p>
      <text:p text:style-name="P18"><text:span text:style-name="T40">Q</text:span><text:span text:style-name="T13">W</text:span><text:span text:style-name="T40">char_t</text:span> *wmemchr (<text:span text:style-name="T40">Q</text:span><text:span text:style-name="T13">W</text:span><text:span text:style-name="T40">char_t</text:span> *s, wchar_t c, size_t n);</text:p>
      <text:p text:style-name="Preformatted_20_Text"/>
      <text:p text:style-name="Text_20_body">Modify the first sentence of 7.29.4.5.8 p2:</text:p>
      <text:p text:style-name="Quotations">The <text:span text:style-name="T4">wmemchr</text:span> <text:span text:style-name="T59">generic</text:span> function locates the first occurrence of ...</text:p>
      <text:p text:style-name="Text_20_body">Modify 7.29.4.5.8 p3:</text:p>
      <text:p text:style-name="Quotations">The <text:span text:style-name="T4">wmemchr</text:span> <text:span text:style-name="T59">generic</text:span> function returns a pointer to …</text:p>
      <text:h text:style-name="Heading_20_3" text:outline-level="3">bsearch_s</text:h>
      <text:p text:style-name="Text_20_body">Modify K.3.6.3.1 p1:</text:p>
      <text:p text:style-name="P16">#define __STDC_WANT_LIB_EXT1__ 1</text:p>
      <text:p text:style-name="P16">#include &lt;stdlib.h&gt;</text:p>
      <text:p text:style-name="P18"><text:span text:style-name="T40">Q</text:span><text:span text:style-name="T13">V</text:span><text:span text:style-name="T40">oid</text:span> *bsearch_s(const void *key, <text:span text:style-name="T40">Q</text:span><text:span text:style-name="T13">V</text:span><text:span text:style-name="T40">oid</text:span> *base, rsize_t nmemb,</text:p>
      <text:p text:style-name="P16"><text:s text:c="17"/>rsize_t size,</text:p>
      <text:p text:style-name="P16"><text:s text:c="17"/>int (*compar)(const void *k, const void *y, void *context),</text:p>
      <text:p text:style-name="P16"><text:s text:c="17"/>void *context);</text:p>
      <text:p text:style-name="Preformatted_20_Text"/>
      <text:p text:style-name="Text_20_body">Modify the first sentence of K.3.6.3.1 p4:</text:p>
      <text:p text:style-name="Quotations">The <text:span text:style-name="T4">bsearch_s</text:span> <text:span text:style-name="T59">generic</text:span> function searches an array of ...</text:p>
      <text:p text:style-name="Text_20_body">Modify the first sentence of K.3.6.3.1 p6:</text:p>
      <text:p text:style-name="Quotations">The <text:span text:style-name="T4">bsearch_s</text:span> <text:span text:style-name="T59">generic</text:span> function returns a pointer to ...</text:p>
      <text:p text:style-name="Text_20_body">Add <text:span text:style-name="T66">two</text:span> new paragraph<text:span text:style-name="T66">s</text:span> after K.3.6.3.1 p6:</text:p>
      <text:p text:style-name="P50">The <text:span text:style-name="T4">bsearch_</text:span><text:span text:style-name="T21">s</text:span> function is generic in the qualification of the type pointed to by the argument to <text:span text:style-name="T4">base</text:span>. If this argument is a pointer to <text:span text:style-name="T72">a</text:span> <text:span text:style-name="T4">const</text:span>-qualified <text:span text:style-name="T72">object type</text:span>, the returned pointer will be <text:span text:style-name="T64">a pointer </text:span>to <text:span text:style-name="T4">const</text:span>-qualified <text:span text:style-name="T20">void</text:span>. <text:span text:style-name="T64">Otherwise, the argument shall be a pointer to </text:span><text:span text:style-name="T72">an </text:span><text:span text:style-name="T64">unqualified </text:span><text:span text:style-name="T72">object type </text:span><text:span text:style-name="T85">or a null pointer constant </text:span><text:span text:style-name="T82">footnote)</text:span><text:span text:style-name="T85">,</text:span><text:span text:style-name="T72"> </text:span><text:span text:style-name="T64">and the returned pointer will be a pointer to unqualified </text:span><text:span text:style-name="T20">void</text:span><text:span text:style-name="T64">.</text:span></text:p>
      <text:p text:style-name="P51">foot<text:span text:style-name="T86">note) If the argument is a null pointer and the call is executed, the behavior is undefined.</text:span></text:p>
      <text:p text:style-name="P44">The external declaration of <text:span text:style-name="T4">bsearch_</text:span><text:span text:style-name="T21">s</text:span> has the concrete type: <text:span text:style-name="T4">void * (const void *, const void *, </text:span><text:span text:style-name="T21">r</text:span><text:span text:style-name="T4">size_t, </text:span><text:span text:style-name="T21">r</text:span><text:span text:style-name="T4">size_t, int (*) (const void *, const void *), </text:span><text:span text:style-name="T21">void *</text:span><text:span text:style-name="T4">)</text:span><text:span text:style-name="T28">, </text:span><text:span text:style-name="T35">which supports all correct uses</text:span>. <text:span text:style-name="T65">If a macro </text:span><text:soft-page-break/><text:span text:style-name="T65">definition </text:span><text:span text:style-name="T73">of </text:span><text:span text:style-name="T78">the</text:span><text:span text:style-name="T73"> generic function</text:span><text:span text:style-name="T65"> is suppressed in order to access an actual function, the </text:span><text:span text:style-name="T73">external declaration with th</text:span><text:span text:style-name="T74">is concrete</text:span><text:span text:style-name="T73"> type is visible.</text:span></text:p>
      <text:h text:style-name="P54" text:outline-level="2"/>
      <text:h text:style-name="P54" text:outline-level="2"><text:span text:style-name="T87">Optional changes</text:span></text:h>
      <text:h text:style-name="P52" text:outline-level="3">O<text:span text:style-name="T33">bsolescence</text:span></text:h>
      <text:p text:style-name="P37">Optionally, the Committee could make suppression of the generic functions’ macro implementations an obsolescent feature to discourage future use.</text:p>
      <text:p text:style-name="P37">Add a footnote at the end of the four “the external declaration(s)” paragraphs:</text:p>
      <text:p text:style-name="P45">footnote) This is an obsolescent feature.</text:p>
      <text:p text:style-name="P37">Add a new paragraph to the end of 7.32.14:</text:p>
      <text:p text:style-name="P45">Suppressing the macro definition of <text:span text:style-name="T4">bsearch</text:span> in order to access the actual function is an obsolescent feature.</text:p>
      <text:p text:style-name="P37">Add a new paragraph to the end of 7.32.15:</text:p>
      <text:p text:style-name="P45">Suppressing the macro definitions of <text:span text:style-name="T4">memchr</text:span><text:span text:style-name="T28">, </text:span><text:span text:style-name="T4">strchr</text:span><text:span text:style-name="T28">, </text:span><text:span text:style-name="T4">strpbrk</text:span><text:span text:style-name="T28">, </text:span><text:span text:style-name="T4">strrchr</text:span><text:span text:style-name="T28">, or </text:span><text:span text:style-name="T4">strstr</text:span> in order to access the corresponding actual function is an obsolescent feature.</text:p>
      <text:p text:style-name="P37">Add a new paragraph to the end of 7.32.18:</text:p>
      <text:p text:style-name="P53"><text:span text:style-name="T76">Suppressing the macro definitions of </text:span><text:span text:style-name="T27">wcschr, wcspbrk, wcsrchr, wmemchr</text:span><text:span text:style-name="T39">, or </text:span><text:span text:style-name="T27">wcsstr</text:span><text:span text:style-name="T76"> in order to access the corresponding actual function is an obsolescent feature.</text:span></text:p>
      <text:h text:style-name="P3" text:outline-level="2"/>
      <text:h text:style-name="P3" text:outline-level="2">References</text:h>
      <text:p text:style-name="P25"><text:a xlink:type="simple" xlink:href="http://www.open-std.org/jtc1/sc22/wg14/www/docs/n2176.pdf" text:style-name="Internet_20_link" text:visited-style-name="Visited_20_Internet_20_Link">C17</text:a></text:p>
      <text:p text:style-name="P36"><text:a xlink:type="simple" xlink:href="http://www.open-std.org/jtc1/sc22/wg14/www/docs/n2912.pdf" text:style-name="Internet_20_link" text:visited-style-name="Visited_20_Internet_20_Link"><text:span text:style-name="T71">n2912 C23 Working Draft</text:span></text:a></text:p>
      <text:p text:style-name="P36"><text:a xlink:type="simple" xlink:href="https://www.open-std.org/jtc1/sc22/wg14/www/docs/n2978.htm" text:style-name="Internet_20_link" text:visited-style-name="Visited_20_Internet_20_Link"><text:span text:style-name="T71">n2978 Introduce the nullptr constant v4</text:span></text:a></text:p>
      <text:p text:style-name="P25"><text:a xlink:type="simple" xlink:href="http://www.open-std.org/jtc1/sc22/wg14/www/docs/n2522.pdf" text:style-name="Internet_20_link" text:visited-style-name="Visited_20_Internet_20_Link"><text:span text:style-name="T57">n2522 A Common C/C++ Core Specification rev 2</text:span></text:a></text:p>
      <text:p text:style-name="P25"><text:a xlink:type="simple" xlink:href="http://www.open-std.org/jtc1/sc22/wg21/docs/papers/2017/n4713.pdf" text:style-name="Internet_20_link" text:visited-style-name="Visited_20_Internet_20_Link">C++</text:a></text:p>
      <text:p text:style-name="P25"><text:a xlink:type="simple" xlink:href="http://www.open-std.org/JTC1/SC22/WG14/www/docs/n1169.pdf" text:style-name="Internet_20_link" text:visited-style-name="Visited_20_Internet_20_Link">Embedded C</text:a></text:p>
      <text:p text:style-name="P25"><text:a xlink:type="simple" xlink:href="http://www.open-std.org/jtc1/sc22/wg14/www/docs/n2526.htm" text:style-name="Internet_20_link" text:visited-style-name="Visited_20_Internet_20_Link"><text:span text:style-name="T56">n2526 use const for data from the library that shall not be modified</text:span></text:a></text:p>
      <text:p text:style-name="P25"><text:a xlink:type="simple" xlink:href="http://www.open-std.org/jtc1/sc22/wg14/www/docs/n2853.pdf" text:style-name="Internet_20_link" text:visited-style-name="Visited_20_Internet_20_Link"><text:span text:style-name="T56">n2853 The </text:span></text:a><text:a xlink:type="simple" xlink:href="http://www.open-std.org/jtc1/sc22/wg14/www/docs/n2853.pdf" text:style-name="Internet_20_link" text:visited-style-name="Visited_20_Internet_20_Link"><text:span text:style-name="T18">void</text:span></text:a><text:a xlink:type="simple" xlink:href="http://www.open-std.org/jtc1/sc22/wg14/www/docs/n2853.pdf" text:style-name="Internet_20_link" text:visited-style-name="Visited_20_Internet_20_Link"><text:span text:style-name="T56">-</text:span></text:a><text:a xlink:type="simple" xlink:href="http://www.open-std.org/jtc1/sc22/wg14/www/docs/n2853.pdf" text:style-name="Internet_20_link" text:visited-style-name="Visited_20_Internet_20_Link"><text:span text:style-name="T42">which-binds</text:span></text:a><text:a xlink:type="simple" xlink:href="http://www.open-std.org/jtc1/sc22/wg14/www/docs/n2853.pdf" text:style-name="Internet_20_link" text:visited-style-name="Visited_20_Internet_20_Link"><text:span text:style-name="T56">: typesafe parametric polymorphism</text:span></text:a></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8T23:01:30.763466952</meta:creation-date>
    <meta:generator>LibreOffice/7.0.4.2$Linux_X86_64 LibreOffice_project/00$Build-2</meta:generator>
    <dc:date>2022-07-06T11:16:26.601574429</dc:date>
    <meta:editing-duration>PT2H43M47S</meta:editing-duration>
    <meta:editing-cycles>48</meta:editing-cycles>
    <meta:document-statistic meta:table-count="0" meta:image-count="0" meta:object-count="0" meta:page-count="15" meta:paragraph-count="308" meta:word-count="4898" meta:character-count="30974" meta:non-whitespace-character-count="26016"/>
  </office:meta>
</office:document-meta>
</file>